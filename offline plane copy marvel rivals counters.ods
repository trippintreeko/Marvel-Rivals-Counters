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08in"/>
    </style:style>
    <style:style style:name="co2" style:family="table-column">
      <style:table-column-properties fo:break-before="auto" style:column-width="2.498in"/>
    </style:style>
    <style:style style:name="co3" style:family="table-column">
      <style:table-column-properties fo:break-before="auto" style:column-width="0.611in"/>
    </style:style>
    <style:style style:name="co4" style:family="table-column">
      <style:table-column-properties fo:break-before="auto" style:column-width="3.4409in"/>
    </style:style>
    <style:style style:name="co5" style:family="table-column">
      <style:table-column-properties fo:break-before="auto" style:column-width="1.0398in"/>
    </style:style>
    <style:style style:name="co6" style:family="table-column">
      <style:table-column-properties fo:break-before="auto" style:column-width="5.5638in"/>
    </style:style>
    <style:style style:name="co7" style:family="table-column">
      <style:table-column-properties fo:break-before="auto" style:column-width="0.889in"/>
    </style:style>
    <style:style style:name="co8" style:family="table-column">
      <style:table-column-properties fo:break-before="auto" style:column-width="1.7689in"/>
    </style:style>
    <style:style style:name="ro1" style:family="table-row">
      <style:table-row-properties style:row-height="0.2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number-columns-repeated="16376" table:default-cell-style-name="Default"/>
        <table:table-row table:style-name="ro1">
          <table:table-cell table:style-name="ce1" office:value-type="string" calcext:value-type="string">
            <text:p>hero</text:p>
          </table:table-cell>
          <table:table-cell table:style-name="ce1" office:value-type="string" calcext:value-type="string">
            <text:p>ability_name</text:p>
          </table:table-cell>
          <table:table-cell table:style-name="ce1" office:value-type="string" calcext:value-type="string">
            <text:p>ability_icon</text:p>
          </table:table-cell>
          <table:table-cell table:style-name="ce1" office:value-type="string" calcext:value-type="string">
            <text:p>ability_description</text:p>
          </table:table-cell>
          <table:table-cell table:style-name="ce1" office:value-type="string" calcext:value-type="string">
            <text:p>source_url</text:p>
          </table:table-cell>
          <table:table-cell table:style-name="ce1" office:value-type="string" calcext:value-type="string">
            <text:p>counter</text:p>
          </table:table-cell>
          <table:table-cell table:style-name="ce1" office:value-type="string" calcext:value-type="string">
            <text:p>Weaknesses</text:p>
          </table:table-cell>
          <table:table-cell table:style-name="ce1" office:value-type="string" calcext:value-type="string">
            <text:p>Counters (prefered Heros)</text:p>
          </table:table-cell>
          <table:table-cell table:style-name="ce1" office:value-type="string" calcext:value-type="string">
            <text:p>notes</text:p>
          </table:table-cell>
          <table:table-cell table:style-name="ce1" office:value-type="string" calcext:value-type="string">
            <text:p>Counters</text:p>
          </table:table-cell>
          <table:table-cell table:style-name="ce1" office:value-type="string" calcext:value-type="string">
            <text:p>ADAM WARLOCK</text:p>
          </table:table-cell>
          <table:table-cell table:style-name="ce2" table:number-columns-repeated="18"/>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FELINE FURY</text:p>
          </table:table-cell>
          <table:table-cell table:style-name="ce1" office:value-type="string" calcext:value-type="string">
            <text:p><text:a xlink:href="https://r.res.easebar.com/pic/20260416/b418cfa2-f3dd-4eae-b205-967e67831cf7.png" xlink:type="simple">https://r.res.easebar.com/pic/20260416/b418cfa2-f3dd-4eae-b205-967e67831cf7.png</text:a></text:p>
          </table:table-cell>
          <table:table-cell table:style-name="ce1" office:value-type="string" calcext:value-type="string">
            <text:p>Swipe forward with razor-sharp claws</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1" office:value-type="string" calcext:value-type="string">
            <text:p>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CALLING CARD</text:p>
          </table:table-cell>
          <table:table-cell table:style-name="ce1" office:value-type="string" calcext:value-type="string">
            <text:p><text:a xlink:href="https://r.res.easebar.com/pic/20260416/c1b8429e-cbce-4c01-ad81-b1255d6ddbb8.png" xlink:type="simple">https://r.res.easebar.com/pic/20260416/c1b8429e-cbce-4c01-ad81-b1255d6ddbb8.png</text:a></text:p>
          </table:table-cell>
          <table:table-cell table:style-name="ce1" office:value-type="string" calcext:value-type="string">
            <text:p>Issue a Calling Card to all enemies. Instantly dash to any enemy in sight and range, tearing into them with your claws to deal Percentage Damage</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1" office:value-type="string" calcext:value-type="string">
            <text:p>Emma Frost - Carbon Crush, Emma Frost - Psionic Seduction, Cloak&amp;Dagger - Eternal Bond, Cloak&amp;Dagger - Terror Cape, Cloak&amp;Dagger - Dark Teleportation, Psylocke - Dance of the Butterfly, Psylocke - Psychic Stealth, Namor - Horn of Proteus, Captain America - Freedom Charge, Rocket Raccon - C.Y.A., Jeff the Land Shark - It's Jeff!, Luna Snow - Ice Arts,</text:p>
          </table:table-cell>
          <table:table-cell table:style-name="ce2" table:number-columns-repeated="5"/>
          <table:table-cell table:style-name="ce1" office:value-type="string" calcext:value-type="string">
            <text:p>Adam </text:p>
          </table:table-cell>
          <table:table-cell table:style-name="ce2" table:number-columns-repeated="17"/>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CAT'S CRADLE</text:p>
          </table:table-cell>
          <table:table-cell table:style-name="ce1" office:value-type="string" calcext:value-type="string">
            <text:p><text:a xlink:href="https://r.res.easebar.com/pic/20260416/0724214f-fa9d-4530-803b-02b40f0b9af7.png" xlink:type="simple">https://r.res.easebar.com/pic/20260416/0724214f-fa9d-4530-803b-02b40f0b9af7.png</text:a></text:p>
          </table:table-cell>
          <table:table-cell table:style-name="ce1" office:value-type="string" calcext:value-type="string">
            <text:p>Lunge forward with claws bared, slicing through any enemies caught in your path</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1" office:value-type="string" calcext:value-type="string">
            <text:p>Mister Fantastic - Distended Grip, Winter Soldier - Trooper's Fist, Winter Soldier - Bionic Hook, Spider-man - Get Over Here!, Storm - Goddess Boost,</text:p>
          </table:table-cell>
          <table:table-cell table:style-name="ce2" table:number-columns-repeated="3"/>
          <table:table-cell table:style-name="ce1" office:value-type="string" calcext:value-type="string">
            <text:p>Adam Warlock - Quantum Magic,</text:p>
          </table:table-cell>
          <table:table-cell table:style-name="ce2"/>
          <table:table-cell table:style-name="ce1" office:value-type="string" calcext:value-type="string">
            <text:p>rocket raccoon</text:p>
          </table:table-cell>
          <table:table-cell table:style-name="ce2" table:number-columns-repeated="17"/>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TURN OF FORTUNE</text:p>
          </table:table-cell>
          <table:table-cell table:style-name="ce1" office:value-type="string" calcext:value-type="string">
            <text:p><text:a xlink:href="https://r.res.easebar.com/pic/20260416/46a0da80-3314-466d-aab1-41bc525fc793.png" xlink:type="simple">https://r.res.easebar.com/pic/20260416/46a0da80-3314-466d-aab1-41bc525fc793.png</text:a></text:p>
          </table:table-cell>
          <table:table-cell table:style-name="ce1" office:value-type="string" calcext:value-type="string">
            <text:p>Launch a grappling hook forward that damages an enemy on impact and steals Fortunebefore pulling it back to Black Cat</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4"/>
          <table:table-cell table:style-name="ce1" office:value-type="string" calcext:value-type="string">
            <text:p>Adam Warlock - Karmic Revival,</text:p>
          </table:table-cell>
          <table:table-cell table:style-name="ce2" table:number-columns-repeated="19"/>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THIEVING GRACE</text:p>
          </table:table-cell>
          <table:table-cell table:style-name="ce1" office:value-type="string" calcext:value-type="string">
            <text:p><text:a xlink:href="https://r.res.easebar.com/pic/20260416/331db52b-ea1e-4d74-a4c7-c27fa17ec1a5.png" xlink:type="simple">https://r.res.easebar.com/pic/20260416/331db52b-ea1e-4d74-a4c7-c27fa17ec1a5.png</text:a></text:p>
          </table:table-cell>
          <table:table-cell table:style-name="ce1" office:value-type="string" calcext:value-type="string">
            <text:p>Perform a double jump</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4"/>
          <table:table-cell table:style-name="ce1" office:value-type="string" calcext:value-type="string">
            <text:p>Adam Warlock - Soul Bond,</text:p>
          </table:table-cell>
          <table:table-cell table:style-name="ce2" table:number-columns-repeated="19"/>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FORTUNE'S FAVOR</text:p>
          </table:table-cell>
          <table:table-cell table:style-name="ce1" office:value-type="string" calcext:value-type="string">
            <text:p><text:a xlink:href="https://r.res.easebar.com/pic/20260416/f20a3d87-0110-46b5-ae9c-e942746833cd.png" xlink:type="simple">https://r.res.easebar.com/pic/20260416/f20a3d87-0110-46b5-ae9c-e942746833cd.png</text:a></text:p>
          </table:table-cell>
          <table:table-cell table:style-name="ce1" office:value-type="string" calcext:value-type="string">
            <text:p>Spend Fortuneto unleash either Grapple Swipeor Phantom Pursuit</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4"/>
          <table:table-cell table:style-name="ce1" office:value-type="string" calcext:value-type="string">
            <text:p>Adam Warlock - Regenerative Cocoon,</text:p>
          </table:table-cell>
          <table:table-cell table:style-name="ce2" table:number-columns-repeated="19"/>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STEALTHY CATWALK</text:p>
          </table:table-cell>
          <table:table-cell table:style-name="ce1" office:value-type="string" calcext:value-type="string">
            <text:p><text:a xlink:href="https://r.res.easebar.com/pic/20260416/76e1a388-8bcd-40cb-b9b9-cbfea50d5264.png" xlink:type="simple">https://r.res.easebar.com/pic/20260416/76e1a388-8bcd-40cb-b9b9-cbfea50d5264.png</text:a></text:p>
          </table:table-cell>
          <table:table-cell table:style-name="ce1" office:value-type="string" calcext:value-type="string">
            <text:p>Hold {Jump} to crawl up vertical surfaces</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MALKIN MISFORTUNE</text:p>
          </table:table-cell>
          <table:table-cell table:style-name="ce1" office:value-type="string" calcext:value-type="string">
            <text:p><text:a xlink:href="https://r.res.easebar.com/pic/20260416/048b7e20-1062-44e0-9ae2-588cbb9d4fc8.png" xlink:type="simple">https://r.res.easebar.com/pic/20260416/048b7e20-1062-44e0-9ae2-588cbb9d4fc8.png</text:a></text:p>
          </table:table-cell>
          <table:table-cell table:style-name="ce1" office:value-type="string" calcext:value-type="string">
            <text:p>Apply Jinxto enemies on hit. Jinxedfoes have a chance to lose their bonus damage when striking Black Cat with a Critical Hit</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4"/>
          <table:table-cell table:style-name="ce1" office:value-type="string" calcext:value-type="string">
            <text:p>Adam Warlock - Karmic Revival, Adam Warlock - Regenerative Cocoon,</text:p>
          </table:table-cell>
          <table:table-cell table:style-name="ce2" table:number-columns-repeated="19"/>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GIFT OF GOLD</text:p>
          </table:table-cell>
          <table:table-cell table:style-name="ce1" office:value-type="string" calcext:value-type="string">
            <text:p><text:a xlink:href="https://r.res.easebar.com/pic/20260416/dba9f061-232b-4cca-8797-cf61c520201e.png" xlink:type="simple">https://r.res.easebar.com/pic/20260416/dba9f061-232b-4cca-8797-cf61c520201e.png</text:a></text:p>
          </table:table-cell>
          <table:table-cell table:style-name="ce1" office:value-type="string" calcext:value-type="string">
            <text:p>Black Cat shares items acquired from Insider Trading with White Fox and Captain America. White Fox receives the Life Orb, which restores Spirit Fox Tail energy and converts life energy into Nine-Tailed Radiance that auto-tracks nearby allies and enemies, granting allies speed and healing while dealing damage and slowing enemies. Captain America receives the Vibranium Energy Amplifier, which expands shield block range when raised and reflects projectiles back along the crosshair direction.</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CLAW WHIP</text:p>
          </table:table-cell>
          <table:table-cell table:style-name="ce1" office:value-type="string" calcext:value-type="string">
            <text:p><text:a xlink:href="https://r.res.easebar.com/pic/20260416/5868fb3b-fb3d-4ed5-9907-0252b6687288.png" xlink:type="simple">https://r.res.easebar.com/pic/20260416/5868fb3b-fb3d-4ed5-9907-0252b6687288.png</text:a></text:p>
          </table:table-cell>
          <table:table-cell table:style-name="ce1" office:value-type="string" calcext:value-type="string">
            <text:p>Fire out tethered claws and whip them forward in a devastating arc, dealing damage to all enemies caught in range</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CALLING CARD</text:p>
          </table:table-cell>
          <table:table-cell table:style-name="ce1" office:value-type="string" calcext:value-type="string">
            <text:p><text:a xlink:href="https://r.res.easebar.com/pic/20260416/542f0f37-1553-45e5-b794-9a5804088ccb.png" xlink:type="simple">https://r.res.easebar.com/pic/20260416/542f0f37-1553-45e5-b794-9a5804088ccb.png</text:a></text:p>
          </table:table-cell>
          <table:table-cell table:style-name="ce1" office:value-type="string" calcext:value-type="string">
            <text:p>Issue a Calling Card to all enemies. Instantly dash to any enemy in sight and range, tearing into them with your claws to deal Percentage Damage</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CAT'S CRADLE</text:p>
          </table:table-cell>
          <table:table-cell table:style-name="ce1" office:value-type="string" calcext:value-type="string">
            <text:p><text:a xlink:href="https://r.res.easebar.com/pic/20260416/de907edd-e322-4e4b-b64d-26f1dd5bd08e.png" xlink:type="simple">https://r.res.easebar.com/pic/20260416/de907edd-e322-4e4b-b64d-26f1dd5bd08e.png</text:a></text:p>
          </table:table-cell>
          <table:table-cell table:style-name="ce1" office:value-type="string" calcext:value-type="string">
            <text:p>Lunge forward with claws bared, slicing through any enemies caught in your path</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PHANTOM PURSUIT</text:p>
          </table:table-cell>
          <table:table-cell table:style-name="ce1" office:value-type="string" calcext:value-type="string">
            <text:p><text:a xlink:href="https://r.res.easebar.com/pic/20260416/0f50962e-bc08-42a0-85db-7138a350d05f.png" xlink:type="simple">https://r.res.easebar.com/pic/20260416/0f50962e-bc08-42a0-85db-7138a350d05f.png</text:a></text:p>
          </table:table-cell>
          <table:table-cell table:style-name="ce1" office:value-type="string" calcext:value-type="string">
            <text:p>Swiftly dash to an enemy, unleash a rapid flurry of claw attacks, and flash back to your starting position. Black Cat is Untargetableduring this move</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1" office:value-type="string" calcext:value-type="string">
            <text:p>Phoenix - Telepathic Illusion,</text:p>
          </table:table-cell>
          <table:table-cell table:style-name="ce2" table:number-columns-repeated="23"/>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THIEVING GRACE</text:p>
          </table:table-cell>
          <table:table-cell table:style-name="ce1" office:value-type="string" calcext:value-type="string">
            <text:p><text:a xlink:href="https://r.res.easebar.com/pic/20260416/db492550-ee00-49bd-b8f2-a8725012dbe1.png" xlink:type="simple">https://r.res.easebar.com/pic/20260416/db492550-ee00-49bd-b8f2-a8725012dbe1.png</text:a></text:p>
          </table:table-cell>
          <table:table-cell table:style-name="ce1" office:value-type="string" calcext:value-type="string">
            <text:p>Perform a double jump</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FORTUNE'S FAVOR</text:p>
          </table:table-cell>
          <table:table-cell table:style-name="ce1" office:value-type="string" calcext:value-type="string">
            <text:p><text:a xlink:href="https://r.res.easebar.com/pic/20260416/aaaacbd7-f567-40c0-be49-494f0e6933db.png" xlink:type="simple">https://r.res.easebar.com/pic/20260416/aaaacbd7-f567-40c0-be49-494f0e6933db.png</text:a></text:p>
          </table:table-cell>
          <table:table-cell table:style-name="ce1" office:value-type="string" calcext:value-type="string">
            <text:p>Spend Fortuneto unleash either Grapple Swipeor Phantom Pursuit</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STEALTHY CATWALK</text:p>
          </table:table-cell>
          <table:table-cell table:style-name="ce1" office:value-type="string" calcext:value-type="string">
            <text:p><text:a xlink:href="https://r.res.easebar.com/pic/20260416/cf0e15f3-6715-49c6-8313-9513eed6fa61.png" xlink:type="simple">https://r.res.easebar.com/pic/20260416/cf0e15f3-6715-49c6-8313-9513eed6fa61.png</text:a></text:p>
          </table:table-cell>
          <table:table-cell table:style-name="ce1" office:value-type="string" calcext:value-type="string">
            <text:p>Hold {Jump} to crawl up vertical surfaces</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1" office:value-type="string" calcext:value-type="string">
            <text:p>Winter Soldier - Trooper's Fist, Winter Soldier - Bionic Hook, Spider-man - Get Over Here!, </text:p>
          </table:table-cell>
          <table:table-cell table:style-name="ce2" table:number-columns-repeated="3"/>
          <table:table-cell table:style-name="ce1" office:value-type="string" calcext:value-type="string">
            <text:p>Adam Warlock - Karmic Revival,</text:p>
          </table:table-cell>
          <table:table-cell table:style-name="ce2"/>
          <table:table-cell table:style-name="ce1" office:value-type="string" calcext:value-type="string">
            <text:p>loki</text:p>
          </table:table-cell>
          <table:table-cell table:style-name="ce2" table:number-columns-repeated="17"/>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MALKIN MISFORTUNE</text:p>
          </table:table-cell>
          <table:table-cell table:style-name="ce1" office:value-type="string" calcext:value-type="string">
            <text:p><text:a xlink:href="https://r.res.easebar.com/pic/20260416/f8475d37-2f3e-495d-8783-66a39a55e6a7.png" xlink:type="simple">https://r.res.easebar.com/pic/20260416/f8475d37-2f3e-495d-8783-66a39a55e6a7.png</text:a></text:p>
          </table:table-cell>
          <table:table-cell table:style-name="ce1" office:value-type="string" calcext:value-type="string">
            <text:p>Apply Jinxto enemies on hit. Jinxedfoes have a chance to lose their bonus damage when striking Black Cat with a Critical Hit</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GILDED DEAL</text:p>
          </table:table-cell>
          <table:table-cell table:style-name="ce1" office:value-type="string" calcext:value-type="string">
            <text:p><text:a xlink:href="https://r.res.easebar.com/pic/20260416/35b59c4e-01ea-4c4f-9321-2e378148df61.png" xlink:type="simple">https://r.res.easebar.com/pic/20260416/35b59c4e-01ea-4c4f-9321-2e378148df61.png</text:a></text:p>
          </table:table-cell>
          <table:table-cell table:style-name="ce1" office:value-type="string" calcext:value-type="string">
            <text:p>Use the Spatial Resonator to open a portal to the Elder Gods' dimension, consuming Fortune to trade with the Golden Elder and acquire items from the New York Thieves Guild vault.</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TABLET OF DESTINIES</text:p>
          </table:table-cell>
          <table:table-cell table:style-name="ce1" office:value-type="string" calcext:value-type="string">
            <text:p><text:a xlink:href="https://r.res.easebar.com/pic/20260416/ce5e92ec-444e-48f9-9a2e-73b4f86c07fe.png" xlink:type="simple">https://r.res.easebar.com/pic/20260416/ce5e92ec-444e-48f9-9a2e-73b4f86c07fe.png</text:a></text:p>
          </table:table-cell>
          <table:table-cell table:style-name="ce1" office:value-type="string" calcext:value-type="string">
            <text:p>Gain a random amount of Fortune</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HELM OF HADES</text:p>
          </table:table-cell>
          <table:table-cell table:style-name="ce1" office:value-type="string" calcext:value-type="string">
            <text:p><text:a xlink:href="https://r.res.easebar.com/pic/20260416/b4507d88-ec34-4a0b-9303-96757d10cd5b.png" xlink:type="simple">https://r.res.easebar.com/pic/20260416/b4507d88-ec34-4a0b-9303-96757d10cd5b.png</text:a></text:p>
          </table:table-cell>
          <table:table-cell table:style-name="ce1" office:value-type="string" calcext:value-type="string">
            <text:p>Enter Invisible state for a set duration</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1" office:value-type="string" calcext:value-type="string">
            <text:p>Deadpool - Deadpool in Your Area, Star-Lord - Blaster Barrage, Thor - Lightning Realm, Magik - Eldritch Whirl, Rogue - Fatal Attraction, Spider-man - Spider-Sense, Jeff the Land Shark - Joyful Splash,</text:p>
          </table:table-cell>
          <table:table-cell table:style-name="ce2" table:number-columns-repeated="3"/>
          <table:table-cell table:style-name="ce1" office:value-type="string" calcext:value-type="string">
            <text:p>Adam Warlock - Soul Bond,</text:p>
          </table:table-cell>
          <table:table-cell table:style-name="ce2" table:number-columns-repeated="19"/>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FALTINE FLAME ORB</text:p>
          </table:table-cell>
          <table:table-cell table:style-name="ce1" office:value-type="string" calcext:value-type="string">
            <text:p><text:a xlink:href="https://r.res.easebar.com/pic/20260416/004aee58-b3ee-436d-bbe7-41ef6c00b4d5.png" xlink:type="simple">https://r.res.easebar.com/pic/20260416/004aee58-b3ee-436d-bbe7-41ef6c00b4d5.png</text:a></text:p>
          </table:table-cell>
          <table:table-cell table:style-name="ce1" office:value-type="string" calcext:value-type="string">
            <text:p>Conjure an orb of mystical Faltine Flame to Revealand mark all nearby enemies</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CHERNOBOG'S CRYSTAL</text:p>
          </table:table-cell>
          <table:table-cell table:style-name="ce1" office:value-type="string" calcext:value-type="string">
            <text:p><text:a xlink:href="https://r.res.easebar.com/pic/20260416/d7499d6e-8126-4d52-b3c5-649961da300b.png" xlink:type="simple">https://r.res.easebar.com/pic/20260416/d7499d6e-8126-4d52-b3c5-649961da300b.png</text:a></text:p>
          </table:table-cell>
          <table:table-cell table:style-name="ce1" office:value-type="string" calcext:value-type="string">
            <text:p>Purify yourself, instantly removing any active control effects</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RING OF ZONA</text:p>
          </table:table-cell>
          <table:table-cell table:style-name="ce1" office:value-type="string" calcext:value-type="string">
            <text:p><text:a xlink:href="https://r.res.easebar.com/pic/20260416/37abc875-d763-4531-8095-c0d74aae0e22.png" xlink:type="simple">https://r.res.easebar.com/pic/20260416/37abc875-d763-4531-8095-c0d74aae0e22.png</text:a></text:p>
          </table:table-cell>
          <table:table-cell table:style-name="ce1" office:value-type="string" calcext:value-type="string">
            <text:p>Open a portal on a surface, allowing instant traversal to the opposite side</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MENTO-FISH</text:p>
          </table:table-cell>
          <table:table-cell table:style-name="ce1" office:value-type="string" calcext:value-type="string">
            <text:p><text:a xlink:href="https://r.res.easebar.com/pic/20260416/685beeba-23c2-457c-83a0-9beb64c100d9.png" xlink:type="simple">https://r.res.easebar.com/pic/20260416/685beeba-23c2-457c-83a0-9beb64c100d9.png</text:a></text:p>
          </table:table-cell>
          <table:table-cell table:style-name="ce1" office:value-type="string" calcext:value-type="string">
            <text:p>Create a hypnosis field. Inflicts Slow, disables movement abilities, and Groundsall enemies caught within</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BLACK CAT</text:p>
          </table:table-cell>
          <table:table-cell table:style-name="ce1" office:value-type="string" calcext:value-type="string">
            <text:p>STICKY PAWS</text:p>
          </table:table-cell>
          <table:table-cell table:style-name="ce1" office:value-type="string" calcext:value-type="string">
            <text:p><text:a xlink:href="https://r.res.easebar.com/pic/20260416/d1950ebc-6411-4006-93b9-c6db6b41ee45.png" xlink:type="simple">https://r.res.easebar.com/pic/20260416/d1950ebc-6411-4006-93b9-c6db6b41ee45.png</text:a></text:p>
          </table:table-cell>
          <table:table-cell table:style-name="ce1" office:value-type="string" calcext:value-type="string">
            <text:p>Steal a set amount of Fortunewhenever your attacks hit an enemy</text:p>
          </table:table-cell>
          <table:table-cell table:style-name="ce1" office:value-type="string" calcext:value-type="string">
            <text:p><text:a xlink:href="https://www.marvelrivals.com/20260416/41360_1296480.html" xlink:type="simple">https://www.marvelrivals.com/20260416/41360_1296480.html</text:a></text:p>
          </table:table-cell>
          <table:table-cell table:style-name="ce2" table:number-columns-repeated="24"/>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YEOWOO GUSEUL</text:p>
          </table:table-cell>
          <table:table-cell table:style-name="ce1" office:value-type="string" calcext:value-type="string">
            <text:p><text:a xlink:href="https://r.res.easebar.com/pic/20260320/c58d434c-4789-4937-961d-d27e5a1f80ef.png" xlink:type="simple">https://r.res.easebar.com/pic/20260320/c58d434c-4789-4937-961d-d27e5a1f80ef.png</text:a></text:p>
          </table:table-cell>
          <table:table-cell table:style-name="ce1" office:value-type="string" calcext:value-type="string">
            <text:p>Fire a Fox Marble forward that bounces off terrain or heroes, then homes in on nearby heroes. It damages enemies, heals allies, and restores Spirit Tail energy</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1" office:value-type="string" calcext:value-type="string">
            <text:p>Hawkeye - Piercing Arrow, Hawkeye - Ronin Slash, Hulk - Indestructible Guard,</text:p>
          </table:table-cell>
          <table:table-cell table:style-name="ce2" table:number-columns-repeated="3"/>
          <table:table-cell table:style-name="ce1" office:value-type="string" calcext:value-type="string">
            <text:p>Adam Warlock - Regenerative Cocoon,</text:p>
          </table:table-cell>
          <table:table-cell table:style-name="ce2" table:number-columns-repeated="19"/>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CLAW STRIKE</text:p>
          </table:table-cell>
          <table:table-cell table:style-name="ce1" office:value-type="string" calcext:value-type="string">
            <text:p><text:a xlink:href="https://r.res.easebar.com/pic/20260320/e738e469-d755-4bf3-93ae-0b5a252443ca.png" xlink:type="simple">https://r.res.easebar.com/pic/20260320/e738e469-d755-4bf3-93ae-0b5a252443ca.png</text:a></text:p>
          </table:table-cell>
          <table:table-cell table:style-name="ce1" office:value-type="string" calcext:value-type="string">
            <text:p>While Awakened, slash forward with a flurry of attacks</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2" table:number-columns-repeated="24"/>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SPECTRAL SURGE</text:p>
          </table:table-cell>
          <table:table-cell table:style-name="ce1" office:value-type="string" calcext:value-type="string">
            <text:p><text:a xlink:href="https://r.res.easebar.com/pic/20260320/19bc9c00-28b2-4cb5-810c-183a9635f49b.png" xlink:type="simple">https://r.res.easebar.com/pic/20260320/19bc9c00-28b2-4cb5-810c-183a9635f49b.png</text:a></text:p>
          </table:table-cell>
          <table:table-cell table:style-name="ce1" office:value-type="string" calcext:value-type="string">
            <text:p>Consume one Spirit Tail to send a spectral fox forward. It heals and grants invulnerability to allies it passes through, damages and Charms enemies, forcing foes to move toward White Fox</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1" office:value-type="string" calcext:value-type="string">
            <text:p>Star-Lord - Stellar Shift, Magik - Stepping Discs, Iron Fist - Dragon's Defense, Hulk - HULK SMASH!, Hulk - Indestructible Guard, Hulk - World Breaker,</text:p>
          </table:table-cell>
          <table:table-cell table:style-name="ce1" office:value-type="string" calcext:value-type="string">
            <text:p>There is a sublte visual cone to let you know this move is about to hit, all you have to do is stay on the edge of the cone to avoid the charm effect of this abilty which will interupt your flow, or block it all together if possible. White Fox likes to wait to see you in a vunerable state before sending one of these out, so you need to plan account for this before making any commiting decisions to keep attacking or begin retreating.</text:p>
          </table:table-cell>
          <table:table-cell table:style-name="ce2" table:number-columns-repeated="22"/>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FOX FORM AWAKENING</text:p>
          </table:table-cell>
          <table:table-cell table:style-name="ce1" office:value-type="string" calcext:value-type="string">
            <text:p><text:a xlink:href="https://r.res.easebar.com/pic/20260320/72a48398-8002-4dfa-9056-24f73c76bc01.png" xlink:type="simple">https://r.res.easebar.com/pic/20260320/72a48398-8002-4dfa-9056-24f73c76bc01.png</text:a></text:p>
          </table:table-cell>
          <table:table-cell table:style-name="ce1" office:value-type="string" calcext:value-type="string">
            <text:p>Enter Awakened state, transforming Spirit Tails into physical tails. While active, continuously drain Spirit Tail energy and heal nearby allies. Striking enemies provides additional area healing</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2" table:number-columns-repeated="24"/>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SPIRIT SANCTUARY</text:p>
          </table:table-cell>
          <table:table-cell table:style-name="ce1" office:value-type="string" calcext:value-type="string">
            <text:p><text:a xlink:href="https://r.res.easebar.com/pic/20260320/a69660c4-0140-4d93-b09e-88695bef6c4b.png" xlink:type="simple">https://r.res.easebar.com/pic/20260320/a69660c4-0140-4d93-b09e-88695bef6c4b.png</text:a></text:p>
          </table:table-cell>
          <table:table-cell table:style-name="ce1" office:value-type="string" calcext:value-type="string">
            <text:p>Teleport to a chosen ally, instantly healing allies in the area while generating a shield</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1" office:value-type="string" calcext:value-type="string">
            <text:p>Phoenix - Endsong Inferno, The Thing - Stone Haymaker, Mister Fantastic - Elastic Strength, Cloak&amp;Dagger - Terror Cape, Iron Fist - Jeet Kune Do, Namor - Horn of Proteus, Magik - Soulsword, Magik - Eldritch Whirl, Magik - Demon's Rage,</text:p>
          </table:table-cell>
          <table:table-cell table:style-name="ce2" table:number-columns-repeated="23"/>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TAIL SWEEP</text:p>
          </table:table-cell>
          <table:table-cell table:style-name="ce1" office:value-type="string" calcext:value-type="string">
            <text:p><text:a xlink:href="https://r.res.easebar.com/pic/20260320/5c67a6c1-758c-467c-a4de-62f8fcf8ac11.png" xlink:type="simple">https://r.res.easebar.com/pic/20260320/5c67a6c1-758c-467c-a4de-62f8fcf8ac11.png</text:a></text:p>
          </table:table-cell>
          <table:table-cell table:style-name="ce1" office:value-type="string" calcext:value-type="string">
            <text:p>While Awakened, sweep forward tails to launch up hit enemies</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1" office:value-type="string" calcext:value-type="string">
            <text:p>Emma Frost - Diamond Form,</text:p>
          </table:table-cell>
          <table:table-cell table:style-name="ce2" table:number-columns-repeated="23"/>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Predatory Pounce</text:p>
          </table:table-cell>
          <table:table-cell table:style-name="ce1" office:value-type="string" calcext:value-type="string">
            <text:p><text:a xlink:href="https://r.res.easebar.com/pic/20260320/5f574241-b3e7-46e1-83c5-658beb3885c9.png" xlink:type="simple">https://r.res.easebar.com/pic/20260320/5f574241-b3e7-46e1-83c5-658beb3885c9.png</text:a></text:p>
          </table:table-cell>
          <table:table-cell table:style-name="ce1" office:value-type="string" calcext:value-type="string">
            <text:p>While Awakened, dash forward. Hit an enemy to slow them, enabling a second dash that knocks back enemies</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1" office:value-type="string" calcext:value-type="string">
            <text:p>Phoenix - Telepathic Illusion, Emma Frost - Carbon Crush, Emma Frost - Diamond Form, The Thing - Unyielding Will, Mister Fantastic - Distended Grip, Hulk - HULK SMASH!, Hulk - Indestructible Guard, Hulk - World Breaker,</text:p>
          </table:table-cell>
          <table:table-cell table:style-name="ce2" table:number-columns-repeated="3"/>
          <table:table-cell table:style-name="ce1" office:value-type="string" calcext:value-type="string">
            <text:p>Adam Warlock - Quantum Magic, Adam Warlock - Karmic Revival, Adam Warlock - Soul Bond, Adam Warlock - Regenerative Cocoon,</text:p>
          </table:table-cell>
          <table:table-cell table:style-name="ce2" table:number-columns-repeated="19"/>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KUMIHO UNLEASHED</text:p>
          </table:table-cell>
          <table:table-cell table:style-name="ce1" office:value-type="string" calcext:value-type="string">
            <text:p><text:a xlink:href="https://r.res.easebar.com/pic/20260320/b089d7a9-c6dd-46d3-a000-4c0954353ad4.png" xlink:type="simple">https://r.res.easebar.com/pic/20260320/b089d7a9-c6dd-46d3-a000-4c0954353ad4.png</text:a></text:p>
          </table:table-cell>
          <table:table-cell table:style-name="ce1" office:value-type="string" calcext:value-type="string">
            <text:p>Manifest the full Nine-Tailed Fox form and continuously heal nearby allies. Cannot receive healing effects from others while in this form</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1" office:value-type="string" calcext:value-type="string">
            <text:p>Mantis - Spore Slumber, Luna Snow - Ice Arts, Blade - Scarlet Shroud, Blade - Thousand-Fold Slash, Ultron - Rage of Ultron, Emma Frost - Carbon Crush, Emma Frost - Psionic Seduction, The Thing - Clobberin' Time, Human Torch - Supernova, Wolverine - Last Stand, Wolverine - Feral Leap, Iron Fist - Dragon's Defense, Iron Fist - Living Chi, Iron Man - Invincible Pulse Cannon, Moon Knight - Hand of Khonshu, Moon Knight - Ancient Ankh, Winter Soldier - Trooper's Fist, Winter Soldier - Bionic Hook, Spider-man - Get Over Here!, Spider-man - Spectacular Spin, Jeff the Land Shark - It's Jeff!, Jeff the Land Shark - Aqua Burst, The Punisher - Final Judgement, Luna Snow - Ice Arts,</text:p>
          </table:table-cell>
          <table:table-cell table:style-name="ce2" table:number-columns-repeated="4"/>
          <table:table-cell table:style-name="ce1" office:value-type="string" calcext:value-type="string">
            <text:p>does avatar life stream go through shields after bounce</text:p>
          </table:table-cell>
          <table:table-cell table:style-name="ce2" table:number-columns-repeated="18"/>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SPIRIT FOX WARD</text:p>
          </table:table-cell>
          <table:table-cell table:style-name="ce1" office:value-type="string" calcext:value-type="string">
            <text:p><text:a xlink:href="https://r.res.easebar.com/pic/20260320/4e7caa04-0fb0-4310-87b4-4754473e6016.png" xlink:type="simple">https://r.res.easebar.com/pic/20260320/4e7caa04-0fb0-4310-87b4-4754473e6016.png</text:a></text:p>
          </table:table-cell>
          <table:table-cell table:style-name="ce1" office:value-type="string" calcext:value-type="string">
            <text:p>White Fox grants Luna Snow a spirit fox for protection. Luna can activate it for a burst of speed and fire it forward, healing allies in its path while applying Charm to enemies</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2" table:number-columns-repeated="24"/>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NINE-TAILED AURA</text:p>
          </table:table-cell>
          <table:table-cell table:style-name="ce1" office:value-type="string" calcext:value-type="string">
            <text:p><text:a xlink:href="https://r.res.easebar.com/pic/20260416/dba9f061-232b-4cca-8797-cf61c520201e.png" xlink:type="simple">https://r.res.easebar.com/pic/20260416/dba9f061-232b-4cca-8797-cf61c520201e.png</text:a></text:p>
          </table:table-cell>
          <table:table-cell table:style-name="ce1" office:value-type="string" calcext:value-type="string">
            <text:p>Black Cat shares her luck with her allies. When White Fox embraces her newfound fortune, she unleashestracking Spirit Tails to grant Healing and Speed to allies, while damaging and Slowing foes. When Captain America enjoys his luck, his shield's block radius expands and allows him to aim deflectedProjectiles directly toward his target</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2" table:number-columns-repeated="24"/>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NINEFOLD SLAM</text:p>
          </table:table-cell>
          <table:table-cell table:style-name="ce1" office:value-type="string" calcext:value-type="string">
            <text:p><text:a xlink:href="https://r.res.easebar.com/pic/20260320/246d56d8-a7ff-40e7-ace5-01c0fd4b9a66.png" xlink:type="simple">https://r.res.easebar.com/pic/20260320/246d56d8-a7ff-40e7-ace5-01c0fd4b9a66.png</text:a></text:p>
          </table:table-cell>
          <table:table-cell table:style-name="ce1" office:value-type="string" calcext:value-type="string">
            <text:p>In Kumiho Form, slam the ground, causing an explosive shockwave. Hitting enemies or summons grants One-Time Healing to self and nearby allies</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1" office:value-type="string" calcext:value-type="string">
            <text:p>The Thing - Yancy Street Charge, Cloak&amp;Dagger - Dark Teleportation,</text:p>
          </table:table-cell>
          <table:table-cell table:style-name="ce2" table:number-columns-repeated="23"/>
          <table:table-cell table:number-columns-repeated="16355"/>
        </table:table-row>
        <table:table-row table:style-name="ro1">
          <table:table-cell table:style-name="ce1" office:value-type="string" calcext:value-type="string">
            <text:p>WHITE FOX</text:p>
          </table:table-cell>
          <table:table-cell table:style-name="ce1" office:value-type="string" calcext:value-type="string">
            <text:p>BLESSED BY THE NINE</text:p>
          </table:table-cell>
          <table:table-cell table:style-name="ce1" office:value-type="string" calcext:value-type="string">
            <text:p><text:a xlink:href="https://r.res.easebar.com/pic/20260320/36acf930-5edb-4ccb-b782-333bc20b2050.png" xlink:type="simple">https://r.res.easebar.com/pic/20260320/36acf930-5edb-4ccb-b782-333bc20b2050.png</text:a></text:p>
          </table:table-cell>
          <table:table-cell table:style-name="ce1" office:value-type="string" calcext:value-type="string">
            <text:p>In Kumiho Form, select an ally to grant Continuous Healing, Unstoppable, and Life-Steal for a short time</text:p>
          </table:table-cell>
          <table:table-cell table:style-name="ce1" office:value-type="string" calcext:value-type="string">
            <text:p><text:a xlink:href="https://www.marvelrivals.com/20260320/41360_1292187.html" xlink:type="simple">https://www.marvelrivals.com/20260320/41360_1292187.html</text:a></text:p>
          </table:table-cell>
          <table:table-cell table:style-name="ce1" office:value-type="string" calcext:value-type="string">
            <text:p>Cloak&amp;Dagger - Terror Cape,</text:p>
          </table:table-cell>
          <table:table-cell table:style-name="ce2" table:number-columns-repeated="23"/>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DOUBLE-BARREL BLASTER</text:p>
          </table:table-cell>
          <table:table-cell table:style-name="ce1" office:value-type="string" calcext:value-type="string">
            <text:p><text:a xlink:href="https://r.res.easebar.com/pic/20260210/8a132243-9cec-4ed8-aa27-f374bc58d1a7.png" xlink:type="simple">https://r.res.easebar.com/pic/20260210/8a132243-9cec-4ed8-aa27-f374bc58d1a7.png</text:a></text:p>
          </table:table-cell>
          <table:table-cell table:style-name="ce1" office:value-type="string" calcext:value-type="string">
            <text:p>Fire your shotgun forward</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 Star-Lord - Blaster Barrage,</text:p>
          </table:table-cell>
          <table:table-cell table:style-name="ce2" table:number-columns-repeated="3"/>
          <table:table-cell table:style-name="ce1" office:value-type="string" calcext:value-type="string">
            <text:p>ADAM WARLOCK</text:p>
          </table:table-cell>
          <table:table-cell table:style-name="ce2" table:number-columns-repeated="19"/>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MONSTER-PIERCER</text:p>
          </table:table-cell>
          <table:table-cell table:style-name="ce1" office:value-type="string" calcext:value-type="string">
            <text:p><text:a xlink:href="https://r.res.easebar.com/pic/20260210/ff430438-d356-492c-bd28-2c68160d3a7a.png" xlink:type="simple">https://r.res.easebar.com/pic/20260210/ff430438-d356-492c-bd28-2c68160d3a7a.png</text:a></text:p>
          </table:table-cell>
          <table:table-cell table:style-name="ce1" office:value-type="string" calcext:value-type="string">
            <text:p>Unleash your elephant gun forward. Bullets pierce enemies and deal high damage</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2" table:number-columns-repeated="5"/>
          <table:table-cell table:style-name="ce1" office:value-type="string" calcext:value-type="string">
            <text:p>ROCKET RACCOON</text:p>
          </table:table-cell>
          <table:table-cell table:style-name="ce2" table:number-columns-repeated="18"/>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INHERITED INSTINCT</text:p>
          </table:table-cell>
          <table:table-cell table:style-name="ce1" office:value-type="string" calcext:value-type="string">
            <text:p><text:a xlink:href="https://r.res.easebar.com/pic/20260210/4b228e3f-c80f-4bd7-903f-c38148164bd9.png" xlink:type="simple">https://r.res.easebar.com/pic/20260210/4b228e3f-c80f-4bd7-903f-c38148164bd9.png</text:a></text:p>
          </table:table-cell>
          <table:table-cell table:style-name="ce1" office:value-type="string" calcext:value-type="string">
            <text:p>Dealing damage increases hunting Instinct. Defeating enemies caught by Smoky Snare grants additional Instinct. Higher Instinct reduces the cooldown of Helix Advance</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2" table:number-columns-repeated="5"/>
          <table:table-cell table:style-name="ce1" office:value-type="string" calcext:value-type="string">
            <text:p>LOKI</text:p>
          </table:table-cell>
          <table:table-cell table:style-name="ce2" table:number-columns-repeated="18"/>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RUTHLESS PURSUIT</text:p>
          </table:table-cell>
          <table:table-cell table:style-name="ce1" office:value-type="string" calcext:value-type="string">
            <text:p><text:a xlink:href="https://r.res.easebar.com/pic/20260210/d3e00685-1ad7-4e9d-a9cc-4d176abfdf09.png" xlink:type="simple">https://r.res.easebar.com/pic/20260210/d3e00685-1ad7-4e9d-a9cc-4d176abfdf09.png</text:a></text:p>
          </table:table-cell>
          <table:table-cell table:style-name="ce1" office:value-type="string" calcext:value-type="string">
            <text:p>Dash forward, gaining Bonus Health and launching enemies hit. Follow up with a Double-Barrel Blaster shot that propels you backward and Slows enemies. Using either stage empowers your next Double-Barrel Blaster, transforming it into Monster-Piercer</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1" office:value-type="string" calcext:value-type="string">
            <text:p>Phoenix - Telepathic Illusion, Emma Frost - Diamond Form, Black Widow - Electro-Plasma Explosion, Black Widow - Edge Dancer, Namor - Horn of Proteus, The Thing - Yancy Street Charge, Winter Soldier - Trooper's Fist, Winter Soldier - Bionic Hook,</text:p>
          </table:table-cell>
          <table:table-cell table:style-name="ce2" table:number-columns-repeated="3"/>
          <table:table-cell table:style-name="ce1" office:value-type="string" calcext:value-type="string">
            <text:p>ROCKET RACCOON</text:p>
          </table:table-cell>
          <table:table-cell table:style-name="ce2" table:number-columns-repeated="19"/>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HELIX ADVANCE</text:p>
          </table:table-cell>
          <table:table-cell table:style-name="ce1" office:value-type="string" calcext:value-type="string">
            <text:p><text:a xlink:href="https://r.res.easebar.com/pic/20260210/d5490ea6-b478-4c97-9ef7-20621038e83e.png" xlink:type="simple">https://r.res.easebar.com/pic/20260210/d5490ea6-b478-4c97-9ef7-20621038e83e.png</text:a></text:p>
          </table:table-cell>
          <table:table-cell table:style-name="ce1" office:value-type="string" calcext:value-type="string">
            <text:p>Dash forward. Your next Double-Barrel Blaster becomes Monster-Piercer</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2" table:number-columns-repeated="5"/>
          <table:table-cell table:style-name="ce1" office:value-type="string" calcext:value-type="string">
            <text:p>PENI PARKER</text:p>
          </table:table-cell>
          <table:table-cell table:style-name="ce2" table:number-columns-repeated="18"/>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LIVING BULLET</text:p>
          </table:table-cell>
          <table:table-cell table:style-name="ce1" office:value-type="string" calcext:value-type="string">
            <text:p><text:a xlink:href="https://r.res.easebar.com/pic/20260210/4931ed8c-267e-4117-bc98-174750ceebdf.png" xlink:type="simple">https://r.res.easebar.com/pic/20260210/4931ed8c-267e-4117-bc98-174750ceebdf.png</text:a></text:p>
          </table:table-cell>
          <table:table-cell table:style-name="ce1" office:value-type="string" calcext:value-type="string">
            <text:p>Fire a Living Bullet round that splits upon impact, seeking nearby enemies and marking each with a Spectral Sigil. Hitting marked targets with Double-Barrel Blaster or Monster-Piercer grants Elsa a brief Speed boost. Living Bullets deal extra damage to shields and enemies with Bonus Health</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2" table:number-columns-repeated="5"/>
          <table:table-cell table:style-name="ce1" office:value-type="string" calcext:value-type="string">
            <text:p>THOR</text:p>
          </table:table-cell>
          <table:table-cell table:style-name="ce2" table:number-columns-repeated="18"/>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SMOKY SNARE</text:p>
          </table:table-cell>
          <table:table-cell table:style-name="ce1" office:value-type="string" calcext:value-type="string">
            <text:p><text:a xlink:href="https://r.res.easebar.com/pic/20260210/a23b9d06-1993-42ec-91af-c2e44696ba07.png" xlink:type="simple">https://r.res.easebar.com/pic/20260210/a23b9d06-1993-42ec-91af-c2e44696ba07.png</text:a></text:p>
          </table:table-cell>
          <table:table-cell table:style-name="ce1" office:value-type="string" calcext:value-type="string">
            <text:p>Launch a trap containing the monster Diablo. Once deployed, it becomes Invisible and Invulnerable. When an enemy triggers it, Diablo Immobilizes and Damages them. Use to dash to the trapped enemy. Enemies can destroy Diablo to break free</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1" office:value-type="string" calcext:value-type="string">
            <text:p>Phoenix - Endsong Inferno, </text:p>
          </table:table-cell>
          <table:table-cell table:style-name="ce2" table:number-columns-repeated="3"/>
          <table:table-cell table:style-name="ce1" office:value-type="string" calcext:value-type="string">
            <text:p>LOKI</text:p>
          </table:table-cell>
          <table:table-cell table:style-name="ce2" table:number-columns-repeated="19"/>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APEX PREDATOR</text:p>
          </table:table-cell>
          <table:table-cell table:style-name="ce1" office:value-type="string" calcext:value-type="string">
            <text:p><text:a xlink:href="https://r.res.easebar.com/pic/20260210/baae636a-b026-4d93-b08f-3185544fbeb3.png" xlink:type="simple">https://r.res.easebar.com/pic/20260210/baae636a-b026-4d93-b08f-3185544fbeb3.png</text:a></text:p>
          </table:table-cell>
          <table:table-cell table:style-name="ce1" office:value-type="string" calcext:value-type="string">
            <text:p>Summon the Glartrox to charge forward. The Glartrox can be recalled to charge back toward Elsa. When colliding with terrain or upon return, it bites fiercely, dealing heavy damage</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1" office:value-type="string" calcext:value-type="string">
            <text:p>Mantis - Spore Slumber, Luna Snow - Ice Arts, Blade - Scarlet Shroud, Phoenix - Endsong Inferno, Ultron - Rage of Ultron, Emma Frost - Diamond Form, Mister Fantastic - Reflexive Rubber, Wolverine - Regenerative Healing Factor, Cloak&amp;Dagger - Dark Teleportation, Iron Fist - Dragon's Defense, Psylocke - Dance of the Butterfly, Iron Man - Invincible Pulse Cannon, Namor - Horn of Proteus, Magik - Stepping Discs, Star-Lord - Stellar Shift, Hulk - HULK SMASH!, Hulk - Indestructible Guard, Hulk - World Breaker, Jeff the Land Shark - It's Jeff!, The Punisher - Culling Turret, The Punisher - Final Judgement, <text:s/>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ELSA BLOODSTONE</text:p>
          </table:table-cell>
          <table:table-cell table:style-name="ce1" office:value-type="string" calcext:value-type="string">
            <text:p>BLOODSTONE'S BOOMBOX BULLETS</text:p>
          </table:table-cell>
          <table:table-cell table:style-name="ce1" office:value-type="string" calcext:value-type="string">
            <text:p><text:a xlink:href="https://r.res.easebar.com/pic/20260210/ef8a763c-f6b0-4c09-9217-37d1796495c2.png" xlink:type="simple">https://r.res.easebar.com/pic/20260210/ef8a763c-f6b0-4c09-9217-37d1796495c2.png</text:a></text:p>
          </table:table-cell>
          <table:table-cell table:style-name="ce1" office:value-type="string" calcext:value-type="string">
            <text:p>Deadpool hands Jeff the Land Shark a plushie. Jeff can spit it ahead where it'll continuously Taunt nearby enemies and Block Vision, while allies in range are healed! Elsa Bloodstone's Living Bullet changes to special rounds that Taunt targets with Deadpool's chatter, while Slowing, and damaging nearby enemies over time. Elsa can recall the rounds to heal based on damage dealt</text:p>
          </table:table-cell>
          <table:table-cell table:style-name="ce1" office:value-type="string" calcext:value-type="string">
            <text:p><text:a xlink:href="https://www.marvelrivals.com/20260212/41360_1286981.html" xlink:type="simple">https://www.marvelrivals.com/20260212/41360_1286981.html</text:a></text:p>
          </table:table-cell>
          <table:table-cell table:style-name="ce1" office:value-type="string" calcext:value-type="string">
            <text:p>Blade - Daywalker Dash,</text:p>
          </table:table-cell>
          <table:table-cell table:style-name="ce2" table:number-columns-repeated="4"/>
          <table:table-cell table:style-name="ce1" office:value-type="string" calcext:value-type="string">
            <text:p>GROOT</text:p>
          </table:table-cell>
          <table:table-cell table:style-name="ce2" table:number-columns-repeated="18"/>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UAL DESERT EAGLES - VANGUARD</text:p>
          </table:table-cell>
          <table:table-cell table:style-name="ce1" office:value-type="string" calcext:value-type="string">
            <text:p><text:a xlink:href="https://r.res.easebar.com/pic/20260114/612130fb-e64b-45c5-a9fe-536fce19cb0a.png" xlink:type="simple">https://r.res.easebar.com/pic/20260114/612130fb-e64b-45c5-a9fe-536fce19cb0a.png</text:a></text:p>
          </table:table-cell>
          <table:table-cell table:style-name="ce1" office:value-type="string" calcext:value-type="string">
            <text:p>Nobody lays a finger on my teammates! Anyone tries, and I'm firing these big boy bullets straight at their fac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text:p>
          </table:table-cell>
          <table:table-cell table:style-name="ce2" table:number-columns-repeated="3"/>
          <table:table-cell table:style-name="ce1" office:value-type="string" calcext:value-type="string">
            <text:p>PENI PARKER</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THE BAN HAMMER</text:p>
          </table:table-cell>
          <table:table-cell table:style-name="ce1" office:value-type="string" calcext:value-type="string">
            <text:p><text:a xlink:href="https://r.res.easebar.com/pic/20260116/2dd26fc5-baa0-418f-8130-fb8e96ff90b4.png" xlink:type="simple">https://r.res.easebar.com/pic/20260116/2dd26fc5-baa0-418f-8130-fb8e96ff90b4.png</text:a></text:p>
          </table:table-cell>
          <table:table-cell table:style-name="ce1" office:value-type="string" calcext:value-type="string">
            <text:p>You! Yeah, you - the hyper one! Eyes off my friends. I sentence you to...whatever! Get ready to be taunted. I get bonus HP and healing, and if you whiff your abilities, you take damage, and I get even more HP!</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oul Resurgence, Luna Snow - Fate of Both Worlds, Cloak&amp;Dagger - Terror Cape, Cloak&amp;Dagger - Dark Teleportation, Iron Fist - Dragon's Defense, Star-Lord - Galactic Legend, </text:p>
          </table:table-cell>
          <table:table-cell table:style-name="ce2" table:number-columns-repeated="3"/>
          <table:table-cell table:style-name="ce1" office:value-type="string" calcext:value-type="string">
            <text:p>THOR</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MAGICAL UNICORN SHIELD!</text:p>
          </table:table-cell>
          <table:table-cell table:style-name="ce1" office:value-type="string" calcext:value-type="string">
            <text:p><text:a xlink:href="https://r.res.easebar.com/pic/20260114/fef38c04-fee0-40a5-ad7f-79577aa45743.png" xlink:type="simple">https://r.res.easebar.com/pic/20260114/fef38c04-fee0-40a5-ad7f-79577aa45743.png</text:a></text:p>
          </table:table-cell>
          <table:table-cell table:style-name="ce1" office:value-type="string" calcext:value-type="string">
            <text:p>Plushie power! It stops every single attack those chumps throw, giving my team a safety bubble. It's cute AND bulletproof</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Phoenix - Endsong Inferno, Ultron - Imperative: Patch, The Thing - Stone Haymaker, Wolverine - Savage Claw, Iron Fist - Jeet Kune Do, Hawkeye - Blast Arrow, Hawkeye - Hypersonic Arrow, Magik - Soulsword, Magik - Eldritch Whirl, Magik - Demon's Rage, The Punisher - Final Judgement, </text:p>
          </table:table-cell>
          <table:table-cell table:style-name="ce2" table:number-columns-repeated="3"/>
          <table:table-cell table:style-name="ce1" office:value-type="string" calcext:value-type="string">
            <text:p>MAGNETO</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BUNNY BOUNCE</text:p>
          </table:table-cell>
          <table:table-cell table:style-name="ce1" office:value-type="string" calcext:value-type="string">
            <text:p><text:a xlink:href="https://r.res.easebar.com/pic/20260114/183eb974-55a8-488f-bd08-ef83ad4688e3.png" xlink:type="simple">https://r.res.easebar.com/pic/20260114/183eb974-55a8-488f-bd08-ef83ad4688e3.png</text:a></text:p>
          </table:table-cell>
          <table:table-cell table:style-name="ce1" office:value-type="string" calcext:value-type="string">
            <text:p>Yup, I can double jump in midair! During The Big Test and its upgrade, I can also stomp heads and wall jump to reset its cooldown. Stomp enemies so hard they won't get near my team!</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Winter Soldier - Trooper's Fist, Winter Soldier - Bionic Hook, Spider-man - Get Over Here!, Storm - Omega Hurricane, Storm - Goddess Boost,</text:p>
          </table:table-cell>
          <table:table-cell table:style-name="ce2" table:number-columns-repeated="3"/>
          <table:table-cell table:style-name="ce1" office:value-type="string" calcext:value-type="string">
            <text:p>VENOM</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FACTOR</text:p>
          </table:table-cell>
          <table:table-cell table:style-name="ce1" office:value-type="string" calcext:value-type="string">
            <text:p><text:a xlink:href="https://r.res.easebar.com/pic/20260114/eb588f97-66b2-45b7-b543-88aeaa167a58.png" xlink:type="simple">https://r.res.easebar.com/pic/20260114/eb588f97-66b2-45b7-b543-88aeaa167a58.png</text:a></text:p>
          </table:table-cell>
          <table:table-cell table:style-name="ce1" office:value-type="string" calcext:value-type="string">
            <text:p>Out of combat? I'm healing up, staying battle-ready to protect my team. And if I'm about to croak? Surprise! I get a free pass, and my health zooms back up. Nice try, villain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Blade - Daywalker Dash, Moon Knight - Hand of Khonshu, Human Torch - Supernova, Spider-man - Spectacular Spin,</text:p>
          </table:table-cell>
          <table:table-cell table:style-name="ce2" table:number-columns-repeated="3"/>
          <table:table-cell table:style-name="ce1" office:value-type="string" calcext:value-type="string">
            <text:p>GROOT</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MAXIMUM FLAIR</text:p>
          </table:table-cell>
          <table:table-cell table:style-name="ce1" office:value-type="string" calcext:value-type="string">
            <text:p><text:a xlink:href="https://r.res.easebar.com/pic/20260114/fc477704-7f13-4fc9-a949-55a43fd0399a.png" xlink:type="simple">https://r.res.easebar.com/pic/20260114/fc477704-7f13-4fc9-a949-55a43fd0399a.png</text:a></text:p>
          </table:table-cell>
          <table:table-cell table:style-name="ce1"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5"/>
          <table:table-cell table:style-name="ce1" office:value-type="string" calcext:value-type="string">
            <text:p>DEADPOOL</text:p>
          </table:table-cell>
          <table:table-cell table:style-name="ce2" table:number-columns-repeated="18"/>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UPGRADE!</text:p>
          </table:table-cell>
          <table:table-cell table:style-name="ce1" office:value-type="string" calcext:value-type="string">
            <text:p><text:a xlink:href="https://r.res.easebar.com/pic/20260114/8581a805-ffde-468d-9b45-47ea9dc540da.png" xlink:type="simple">https://r.res.easebar.com/pic/20260114/8581a805-ffde-468d-9b45-47ea9dc540da.png</text:a></text:p>
          </table:table-cell>
          <table:table-cell table:style-name="ce1"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5"/>
          <table:table-cell table:style-name="ce1" office:value-type="string" calcext:value-type="string">
            <text:p>Rogue</text:p>
          </table:table-cell>
          <table:table-cell table:style-name="ce2"/>
          <table:table-cell table:style-name="ce1" office:value-type="string" calcext:value-type="string">
            <text:p>Iron Fist - Yat Jee Chung Kuen, Iron Fist - Dragon's Defense, Iron Fist - Living Chi,</text:p>
          </table:table-cell>
          <table:table-cell table:style-name="ce2" table:number-columns-repeated="16"/>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VANGUARD</text:p>
          </table:table-cell>
          <table:table-cell table:style-name="ce1" office:value-type="string" calcext:value-type="string">
            <text:p><text:a xlink:href="https://r.res.easebar.com/pic/20260114/947a7dad-eb1a-48ae-a028-0c018245d0bd.png" xlink:type="simple">https://r.res.easebar.com/pic/20260114/947a7dad-eb1a-48ae-a028-0c018245d0bd.png</text:a></text:p>
          </table:table-cell>
          <table:table-cell table:style-name="ce1" office:value-type="string" calcext:value-type="string">
            <text:p>Want to hurt my team? Good luck! I hit you with a taunt, mess up your vision, and burn your health nonstop! Best part: my swords and guns go full turbo for the duration. Blink and you'll miss it</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5"/>
          <table:table-cell table:style-name="ce1" office:value-type="string" calcext:value-type="string">
            <text:p>Gambit</text:p>
          </table:table-cell>
          <table:table-cell table:style-name="ce2" table:number-columns-repeated="18"/>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Comical Chaos</text:p>
          </table:table-cell>
          <table:table-cell table:style-name="ce1" office:value-type="string" calcext:value-type="string">
            <text:p><text:a xlink:href="https://r.res.easebar.com/pic/20260116/7ff581ee-1f52-4aae-97a8-37f03509c681.png" xlink:type="simple">https://r.res.easebar.com/pic/20260116/7ff581ee-1f52-4aae-97a8-37f03509c681.png</text:a></text:p>
          </table:table-cell>
          <table:table-cell table:style-name="ce1" office:value-type="string" calcext:value-type="string">
            <text:p>Deadpool hands Jeff the Land Shark a plushie with attitude. Jeff can spit it ahead where it'll continuously Taunt nearby enemies and Block Vision, while allies in range enjoy a plush-powered healing party!</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5"/>
          <table:table-cell table:style-name="ce1" office:value-type="string" calcext:value-type="string">
            <text:p>Daredevil</text:p>
          </table:table-cell>
          <table:table-cell table:style-name="ce2" table:number-columns-repeated="18"/>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KICK@$$ KATANA - VANGUARD</text:p>
          </table:table-cell>
          <table:table-cell table:style-name="ce1" office:value-type="string" calcext:value-type="string">
            <text:p><text:a xlink:href="https://r.res.easebar.com/pic/20260114/cd46d5e0-bd27-47b8-b5af-a50a3ae283e4.png" xlink:type="simple">https://r.res.easebar.com/pic/20260114/cd46d5e0-bd27-47b8-b5af-a50a3ae283e4.png</text:a></text:p>
          </table:table-cell>
          <table:table-cell table:style-name="ce1" office:value-type="string" calcext:value-type="string">
            <text:p>Protecting my team means my katanas go full savage. No mercy for the baddie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THE BIG TEST</text:p>
          </table:table-cell>
          <table:table-cell table:style-name="ce1" office:value-type="string" calcext:value-type="string">
            <text:p><text:a xlink:href="https://r.res.easebar.com/pic/20260116/01cf36e8-0774-4b0f-96eb-1860e9d8ad4a.png" xlink:type="simple">https://r.res.easebar.com/pic/20260116/01cf36e8-0774-4b0f-96eb-1860e9d8ad4a.png</text:a></text:p>
          </table:table-cell>
          <table:table-cell table:style-name="ce1" office:value-type="string" calcext:value-type="string">
            <text:p>Wake the #!&amp;% up, hero! We've got a game to win! Speed and healing buffs for starters, bonus Hazardous Hijinks for me, and extra HP for me and my nearby friends. Hit enough baddies with the right abilities exactly as I ask, and you unlock mega speed and healing, plus reset my Healing Factor cooldown!. Team protection mode: activated!</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pore Slumber, Luna Snow - Ice Arts, Emma Frost - Psionic Seduction, Winter Soldier - Tainted Voltage, Jeff the Land Shark - It's Jeff!,</text:p>
          </table:table-cell>
          <table:table-cell table:style-name="ce2" table:number-columns-repeated="3"/>
          <table:table-cell table:style-name="ce1" office:value-type="string" calcext:value-type="string">
            <text:p>CAPTAIN AMERICA</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AZARDOUS HIJINKS - VANGUARD</text:p>
          </table:table-cell>
          <table:table-cell table:style-name="ce1" office:value-type="string" calcext:value-type="string">
            <text:p><text:a xlink:href="https://r.res.easebar.com/pic/20260114/bc056ad5-a545-497b-a4b3-296be9f62c3b.png" xlink:type="simple">https://r.res.easebar.com/pic/20260114/bc056ad5-a545-497b-a4b3-296be9f62c3b.png</text:a></text:p>
          </table:table-cell>
          <table:table-cell table:style-name="ce1" office:value-type="string" calcext:value-type="string">
            <text:p>Try getting to my teammates, I dare you! My dash slash knocks fools down, and if I hit, I get to do it again. Up to three times, baby!</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The Thing - Yancy Street Charge, Human Torch - Supernova, Black Widow - Edge Dancer, Iron Fist - Yat Jee Chung Kuen, Namor - Horn of Proteus, Winter Soldier - Trooper's Fist, Winter Soldier - Bionic Hook, Spider-man - Get Over Here!, </text:p>
          </table:table-cell>
          <table:table-cell table:style-name="ce2" table:number-columns-repeated="3"/>
          <table:table-cell table:style-name="ce1" office:value-type="string" calcext:value-type="string">
            <text:p>DOCTOR STRANGE</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BUNNY BOUNCE</text:p>
          </table:table-cell>
          <table:table-cell table:style-name="ce1" office:value-type="string" calcext:value-type="string">
            <text:p><text:a xlink:href="https://r.res.easebar.com/pic/20260114/f83e789b-8ec4-4623-9162-a873b479ada6.png" xlink:type="simple">https://r.res.easebar.com/pic/20260114/f83e789b-8ec4-4623-9162-a873b479ada6.png</text:a></text:p>
          </table:table-cell>
          <table:table-cell table:style-name="ce1" office:value-type="string" calcext:value-type="string">
            <text:p>Yup, I can double jump in midair! During The Big Test and its upgrade, I can also stomp heads and wall jump to reset its cooldown. Stomp enemies so hard they won't get near my team!</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Winter Soldier - Trooper's Fist, Winter Soldier - Bionic Hook, Spider-man - Get Over Here!, Storm - Omega Hurricane, Storm - Goddess Boost,</text:p>
          </table:table-cell>
          <table:table-cell table:style-name="ce2" table:number-columns-repeated="3"/>
          <table:table-cell table:style-name="ce1" office:value-type="string" calcext:value-type="string">
            <text:p>BLACK CAT</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FACTOR</text:p>
          </table:table-cell>
          <table:table-cell table:style-name="ce1" office:value-type="string" calcext:value-type="string">
            <text:p><text:a xlink:href="https://r.res.easebar.com/pic/20260114/68817e55-2b49-4e4f-9e54-36bc0530574e.png" xlink:type="simple">https://r.res.easebar.com/pic/20260114/68817e55-2b49-4e4f-9e54-36bc0530574e.png</text:a></text:p>
          </table:table-cell>
          <table:table-cell table:style-name="ce1" office:value-type="string" calcext:value-type="string">
            <text:p>Out of combat? I'm healing up, staying battle-ready to protect my team. And if I'm about to croak? Surprise! I get a free pass, and my health zooms back up. Nice try, villain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Blade - Daywalker Dash, Moon Knight - Hand of Khonshu, Human Torch - Supernova, Spider-man - Spectacular Spin,</text:p>
          </table:table-cell>
          <table:table-cell table:style-name="ce2" table:number-columns-repeated="3"/>
          <table:table-cell table:style-name="ce1" office:value-type="string" calcext:value-type="string">
            <text:p>WHITE FOX</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MAXIMUM FLAIR</text:p>
          </table:table-cell>
          <table:table-cell table:style-name="ce1" office:value-type="string" calcext:value-type="string">
            <text:p><text:a xlink:href="https://r.res.easebar.com/pic/20260114/1e05f233-ac32-4fe9-b1b8-9c7cd4e165a3.png" xlink:type="simple">https://r.res.easebar.com/pic/20260114/1e05f233-ac32-4fe9-b1b8-9c7cd4e165a3.png</text:a></text:p>
          </table:table-cell>
          <table:table-cell table:style-name="ce1"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UPGRADE!</text:p>
          </table:table-cell>
          <table:table-cell table:style-name="ce1" office:value-type="string" calcext:value-type="string">
            <text:p><text:a xlink:href="https://r.res.easebar.com/pic/20260114/bf797f74-4018-4b36-85d6-89159ea831b4.png" xlink:type="simple">https://r.res.easebar.com/pic/20260114/bf797f74-4018-4b36-85d6-89159ea831b4.png</text:a></text:p>
          </table:table-cell>
          <table:table-cell table:style-name="ce1"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VANGUARD</text:p>
          </table:table-cell>
          <table:table-cell table:style-name="ce1" office:value-type="string" calcext:value-type="string">
            <text:p><text:a xlink:href="https://r.res.easebar.com/pic/20260114/b4f7983e-98fb-46bb-aabc-c8bb80041553.png" xlink:type="simple">https://r.res.easebar.com/pic/20260114/b4f7983e-98fb-46bb-aabc-c8bb80041553.png</text:a></text:p>
          </table:table-cell>
          <table:table-cell table:style-name="ce1" office:value-type="string" calcext:value-type="string">
            <text:p>Want to hurt my team? Good luck! I hit you with a taunt, mess up your vision, and burn your health nonstop! Best part: my swords and guns go full turbo for the duration. Blink and you'll miss it</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UAL DESERT EAGLES - VANGUARD UPGRADED</text:p>
          </table:table-cell>
          <table:table-cell table:style-name="ce1" office:value-type="string" calcext:value-type="string">
            <text:p><text:a xlink:href="https://r.res.easebar.com/pic/20260114/9950e177-ed31-4cc3-9dd0-5e81a1ebd0f4.png" xlink:type="simple">https://r.res.easebar.com/pic/20260114/9950e177-ed31-4cc3-9dd0-5e81a1ebd0f4.png</text:a></text:p>
          </table:table-cell>
          <table:table-cell table:style-name="ce1" office:value-type="string" calcext:value-type="string">
            <text:p>I rack up shots, then, BOOM! A mind-blowing bubble bomb for all the enemies. Teammate security: maximum</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text:p>
          </table:table-cell>
          <table:table-cell table:style-name="ce2" table:number-columns-repeated="3"/>
          <table:table-cell table:style-name="ce1" office:value-type="string" calcext:value-type="string">
            <text:p>ELSA BLOODSTONE</text:p>
          </table:table-cell>
          <table:table-cell table:style-name="ce2" table:number-columns-repeated="19"/>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KICK@$$ KATANA - VANGUARD UPGRADED</text:p>
          </table:table-cell>
          <table:table-cell table:style-name="ce1" office:value-type="string" calcext:value-type="string">
            <text:p><text:a xlink:href="https://r.res.easebar.com/pic/20260114/bff49308-0b5f-46fc-81ca-46fe94f05f81.png" xlink:type="simple">https://r.res.easebar.com/pic/20260114/bff49308-0b5f-46fc-81ca-46fe94f05f81.png</text:a></text:p>
          </table:table-cell>
          <table:table-cell table:style-name="ce1" office:value-type="string" calcext:value-type="string">
            <text:p>Relax, you've got Deadpool on your side! Swords out, baddies out. My stab hits crit, and a Bad Bunny hit makes the next swing a stabby special</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VANGUARD UPGRADED</text:p>
          </table:table-cell>
          <table:table-cell table:style-name="ce1" office:value-type="string" calcext:value-type="string">
            <text:p><text:a xlink:href="https://r.res.easebar.com/pic/20260114/dd186638-8506-401f-b1a7-c09436994ad7.png" xlink:type="simple">https://r.res.easebar.com/pic/20260114/dd186638-8506-401f-b1a7-c09436994ad7.png</text:a></text:p>
          </table:table-cell>
          <table:table-cell table:style-name="ce1" office:value-type="string" calcext:value-type="string">
            <text:p>Teammates, stay safe! Dummies, look here! It's showtime: I taunt, blind you, and hit warp speed with my swords and guns. Plus, my crew gets a damage reduction buff, so they're basically invincible. Dummies that stick around too long will even have their UI taped over!</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AZARDOUS HIJINKS - VANGUARD UPGRADED</text:p>
          </table:table-cell>
          <table:table-cell table:style-name="ce1" office:value-type="string" calcext:value-type="string">
            <text:p><text:a xlink:href="https://r.res.easebar.com/pic/20260114/5477ab5b-877f-48c7-9541-973e67722586.png" xlink:type="simple">https://r.res.easebar.com/pic/20260114/5477ab5b-877f-48c7-9541-973e67722586.png</text:a></text:p>
          </table:table-cell>
          <table:table-cell table:style-name="ce1" office:value-type="string" calcext:value-type="string">
            <text:p>Watch this pro bodyguard in action! I dash forward, nail the bad guy, and bounce in any direction I want. Oh, and I can do this two more times real quick!</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The Thing - Yancy Street Charge, Iron Fist - Yat Jee Chung Kuen, Namor - Horn of Proteus, Winter Soldier - Trooper's Fist, Winter Soldier - Bionic Hook,</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MAGICAL UNICORN SHIELD! - UPGRADED</text:p>
          </table:table-cell>
          <table:table-cell table:style-name="ce1" office:value-type="string" calcext:value-type="string">
            <text:p><text:a xlink:href="https://r.res.easebar.com/pic/20260114/58a98547-303e-4b5d-b0ca-d05be7c951c6.png" xlink:type="simple">https://r.res.easebar.com/pic/20260114/58a98547-303e-4b5d-b0ca-d05be7c951c6.png</text:a></text:p>
          </table:table-cell>
          <table:table-cell table:style-name="ce1" office:value-type="string" calcext:value-type="string">
            <text:p>My ultra-cool, super shiny, extra huggable, and totally blinged-out plushy. Toss it ahead, and it lands as an invincible sphere of awesomeness! Blocking attacks and keeping my team safe inside our furry fortres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Phoenix - Endsong Inferno, Ultron - Imperative: Patch, The Thing - Stone Haymaker, Wolverine - Savage Claw, Iron Fist - Jeet Kune Do, Hawkeye - Blast Arrow, Hawkeye - Hypersonic Arrow, Magik - Soulsword, Magik - Eldritch Whirl, Magik - Demon's Rage,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THE BIG TEST - UPGRADED</text:p>
          </table:table-cell>
          <table:table-cell table:style-name="ce1" office:value-type="string" calcext:value-type="string">
            <text:p><text:a xlink:href="https://r.res.easebar.com/pic/20260116/917c3099-6c03-40db-a5af-da7bd907b710.png" xlink:type="simple">https://r.res.easebar.com/pic/20260116/917c3099-6c03-40db-a5af-da7bd907b710.png</text:a></text:p>
          </table:table-cell>
          <table:table-cell table:style-name="ce1" office:value-type="string" calcext:value-type="string">
            <text:p>Hey, player! Warm-up's over, time for the main event! Speed, healing, dashes, for me, and bonus HP for all! Smash enough baddies with the skills I say, and you unlock super buffs (massive speed and healing), plus Healing Factor resets. For some time after, each hit means more HP for the crew and you. Don't mess this up!</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pore Slumber, Luna Snow - Ice Arts, Emma Frost - Psionic Seduction, Winter Soldier - Tainted Voltage, Jeff the Land Shark - It's Jeff!,</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THE BAN HAMMER - UPGRADED</text:p>
          </table:table-cell>
          <table:table-cell table:style-name="ce1" office:value-type="string" calcext:value-type="string">
            <text:p><text:a xlink:href="https://r.res.easebar.com/pic/20260116/944e9d57-7cfe-47fe-97bf-dbda97f0552c.png" xlink:type="simple">https://r.res.easebar.com/pic/20260116/944e9d57-7cfe-47fe-97bf-dbda97f0552c.png</text:a></text:p>
          </table:table-cell>
          <table:table-cell table:style-name="ce1" office:value-type="string" calcext:value-type="string">
            <text:p>Upgraded courtroom drama! Congrats, unlucky one! You're my pick; enjoy the taunt! I score bonus health and healing, and you take ongoing damage. If you miss an ability while court is in session, it's a double whammy. You get more pain, AND I get more extra HP! Thanks in advanc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oul Resurgence, Luna Snow - Fate of Both Worlds, Cloak&amp;Dagger - Terror Cape, Cloak&amp;Dagger - Dark Teleportation, Iron Fist - Dragon's Defense, Star-Lord - Galactic Legend, </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UAL DESERT EAGLES - DUELIST</text:p>
          </table:table-cell>
          <table:table-cell table:style-name="ce1" office:value-type="string" calcext:value-type="string">
            <text:p><text:a xlink:href="https://r.res.easebar.com/pic/20260114/bbbc1021-c26d-4d45-b504-41fecb1fd329.png" xlink:type="simple">https://r.res.easebar.com/pic/20260114/bbbc1021-c26d-4d45-b504-41fecb1fd329.png</text:a></text:p>
          </table:table-cell>
          <table:table-cell table:style-name="ce1" office:value-type="string" calcext:value-type="string">
            <text:p>Bang! Bang! Unleash two hand cannons left and right, because one gun is never enough. Pew pew, baby!</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SKILL ISSUE</text:p>
          </table:table-cell>
          <table:table-cell table:style-name="ce1" office:value-type="string" calcext:value-type="string">
            <text:p><text:a xlink:href="https://r.res.easebar.com/pic/20260116/32d6d205-925f-4e0b-ba3c-36c29e716545.png" xlink:type="simple">https://r.res.easebar.com/pic/20260116/32d6d205-925f-4e0b-ba3c-36c29e716545.png</text:a></text:p>
          </table:table-cell>
          <table:table-cell table:style-name="ce1" office:value-type="string" calcext:value-type="string">
            <text:p>Let's play judge! Pick a dumb-dumb and slap a taunt. They miss an ability? Boom! Gavel drops, and I slap them with pain and snark</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oul Resurgence, Luna Snow - Fate of Both Worlds, Cloak&amp;Dagger - Terror Cape, Cloak&amp;Dagger - Dark Teleportation, Iron Fist - Dragon's Defense, Star-Lord - Galactic Legend,</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DSHOT! - DUELIST</text:p>
          </table:table-cell>
          <table:table-cell table:style-name="ce1" office:value-type="string" calcext:value-type="string">
            <text:p><text:a xlink:href="https://r.res.easebar.com/pic/20260116/fe2d56e5-76f1-440b-b799-f3339fac8787.png" xlink:type="simple">https://r.res.easebar.com/pic/20260116/fe2d56e5-76f1-440b-b799-f3339fac8787.png</text:a></text:p>
          </table:table-cell>
          <table:table-cell table:style-name="ce1" office:value-type="string" calcext:value-type="string">
            <text:p>Ever seen someone throw their own face? Watch me KO a crowd, then catch my mug on the rebound!. Don't lose your head over it</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BUNNY HOP</text:p>
          </table:table-cell>
          <table:table-cell table:style-name="ce1" office:value-type="string" calcext:value-type="string">
            <text:p><text:a xlink:href="https://r.res.easebar.com/pic/20260114/e30a48d2-58b5-4ea4-9fbf-b0ea4237ce55.png" xlink:type="simple">https://r.res.easebar.com/pic/20260114/e30a48d2-58b5-4ea4-9fbf-b0ea4237ce55.png</text:a></text:p>
          </table:table-cell>
          <table:table-cell table:style-name="ce1" office:value-type="string" calcext:value-type="string">
            <text:p>Hippity-hoppity, Deadpool's on your property! Watch me squeeze in a second jump midair! Hop on heads or kick off walls with Bunny Hop to refresh the cooldown, and if I land on someone? Free health for me, and a headache for them. Whe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Black Widow - Edge Dancer,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FACTOR</text:p>
          </table:table-cell>
          <table:table-cell table:style-name="ce1" office:value-type="string" calcext:value-type="string">
            <text:p><text:a xlink:href="https://r.res.easebar.com/pic/20260114/34f96677-28fa-4445-ba68-7e5553a9452e.png" xlink:type="simple">https://r.res.easebar.com/pic/20260114/34f96677-28fa-4445-ba68-7e5553a9452e.png</text:a></text:p>
          </table:table-cell>
          <table:table-cell table:style-name="ce1" office:value-type="string" calcext:value-type="string">
            <text:p>Out of combat? I'm healing up, staying battle-ready to protect my team. And if I'm about to croak? Surprise! I get a free pass, and my health zooms back up. Nice try, villain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Blade - Daywalker Dash, Moon Knight - Hand of Khonshu, Human Torch - Supernova, Spider-man - Spectacular Spin,</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MAXIMUM FLAIR</text:p>
          </table:table-cell>
          <table:table-cell table:style-name="ce1" office:value-type="string" calcext:value-type="string">
            <text:p><text:a xlink:href="https://r.res.easebar.com/pic/20260114/f1818cfa-e96d-4f24-9aad-cbf41a68b80d.png" xlink:type="simple">https://r.res.easebar.com/pic/20260114/f1818cfa-e96d-4f24-9aad-cbf41a68b80d.png</text:a></text:p>
          </table:table-cell>
          <table:table-cell table:style-name="ce1"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UPGRADE!</text:p>
          </table:table-cell>
          <table:table-cell table:style-name="ce1" office:value-type="string" calcext:value-type="string">
            <text:p><text:a xlink:href="https://r.res.easebar.com/pic/20260114/b0d6febd-72f5-45ad-8ed4-801c869b8959.png" xlink:type="simple">https://r.res.easebar.com/pic/20260114/b0d6febd-72f5-45ad-8ed4-801c869b8959.png</text:a></text:p>
          </table:table-cell>
          <table:table-cell table:style-name="ce1"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DUELIST</text:p>
          </table:table-cell>
          <table:table-cell table:style-name="ce1" office:value-type="string" calcext:value-type="string">
            <text:p><text:a xlink:href="https://r.res.easebar.com/pic/20260114/c48ac808-c0fc-40ca-b988-4209f308059b.png" xlink:type="simple">https://r.res.easebar.com/pic/20260114/c48ac808-c0fc-40ca-b988-4209f308059b.png</text:a></text:p>
          </table:table-cell>
          <table:table-cell table:style-name="ce1" office:value-type="string" calcext:value-type="string">
            <text:p>True heroes taunt face-to-face! I roast nearby baddies, mess up their vision, and tank their hits like a boss. Try m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KICK@$$ KATANA - DUELIST</text:p>
          </table:table-cell>
          <table:table-cell table:style-name="ce1" office:value-type="string" calcext:value-type="string">
            <text:p><text:a xlink:href="https://r.res.easebar.com/pic/20260114/f441fc76-d37a-495d-bff2-9c8a74fae424.png" xlink:type="simple">https://r.res.easebar.com/pic/20260114/f441fc76-d37a-495d-bff2-9c8a74fae424.png</text:a></text:p>
          </table:table-cell>
          <table:table-cell table:style-name="ce1" office:value-type="string" calcext:value-type="string">
            <text:p>Slicey, dicey, twice as nicey! Swing both swords at whoever gets too close. Sushi, anyon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POP QUIZ!</text:p>
          </table:table-cell>
          <table:table-cell table:style-name="ce1" office:value-type="string" calcext:value-type="string">
            <text:p><text:a xlink:href="https://r.res.easebar.com/pic/20260116/ddeac56f-2a2b-458f-a09b-30c02e893bda.png" xlink:type="simple">https://r.res.easebar.com/pic/20260116/ddeac56f-2a2b-458f-a09b-30c02e893bda.png</text:a></text:p>
          </table:table-cell>
          <table:table-cell table:style-name="ce1" office:value-type="string" calcext:value-type="string">
            <text:p>Hey, you! Yeah, you! Ready for a challenge? Free speed and healing just for trying. Nail enough hits with the right abilities and unlock the deluxe speed-heal package. It's an A+ in chao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pore Slumber, Luna Snow - Ice Arts, Black Widow - Edge Dancer, Emma Frost - Psionic Seduction, Winter Soldier - Tainted Voltage, Storm - Omega Hurricane, Storm - Goddess Boost, Jeff the Land Shark - It's Jeff!,</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AZARDOUS HIJINKS - DUELIST</text:p>
          </table:table-cell>
          <table:table-cell table:style-name="ce1" office:value-type="string" calcext:value-type="string">
            <text:p><text:a xlink:href="https://r.res.easebar.com/pic/20260114/a97263d2-9d7d-4f0e-9846-952d3a8873f2.png" xlink:type="simple">https://r.res.easebar.com/pic/20260114/a97263d2-9d7d-4f0e-9846-952d3a8873f2.png</text:a></text:p>
          </table:table-cell>
          <table:table-cell table:style-name="ce1" office:value-type="string" calcext:value-type="string">
            <text:p>Blink, and you'll miss my deadly dash combo. Slash, dash, repeat! Hit someone? You get to go again! (Up to 2 more times. Don't get greedy.) Who says I can't multitask?</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The Thing - Yancy Street Charge, Human Torch - Supernova, Black Widow - Edge Dancer, Iron Fist - Yat Jee Chung Kuen, Namor - Horn of Proteus,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BUNNY HOP</text:p>
          </table:table-cell>
          <table:table-cell table:style-name="ce1" office:value-type="string" calcext:value-type="string">
            <text:p><text:a xlink:href="https://r.res.easebar.com/pic/20260114/61987493-d453-45cc-8f8b-6da0078b21ea.png" xlink:type="simple">https://r.res.easebar.com/pic/20260114/61987493-d453-45cc-8f8b-6da0078b21ea.png</text:a></text:p>
          </table:table-cell>
          <table:table-cell table:style-name="ce1" office:value-type="string" calcext:value-type="string">
            <text:p>Hippity-hoppity, Deadpool's on your property! Watch me squeeze in a second jump midair! Hop on heads or kick off walls with Bunny Hop to refresh the cooldown, and if I land on someone? Free health for me, and a headache for them. Whe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Black Widow - Edge Dancer, Winter Soldier - Trooper's Fist, Winter Soldier - Bionic Hook,</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FACTOR</text:p>
          </table:table-cell>
          <table:table-cell table:style-name="ce1" office:value-type="string" calcext:value-type="string">
            <text:p><text:a xlink:href="https://r.res.easebar.com/pic/20260114/d6633d77-4996-4afb-9640-29af2ad835f5.png" xlink:type="simple">https://r.res.easebar.com/pic/20260114/d6633d77-4996-4afb-9640-29af2ad835f5.png</text:a></text:p>
          </table:table-cell>
          <table:table-cell table:style-name="ce1" office:value-type="string" calcext:value-type="string">
            <text:p>Out of combat? I'm healing up, staying battle-ready to protect my team. And if I'm about to croak? Surprise! I get a free pass, and my health zooms back up. Nice try, villain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Blade - Daywalker Dash, Moon Knight - Hand of Khonshu, Human Torch - Supernova, Spider-man - Spectacular Spin,</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MAXIMUM FLAIR</text:p>
          </table:table-cell>
          <table:table-cell table:style-name="ce1" office:value-type="string" calcext:value-type="string">
            <text:p><text:a xlink:href="https://r.res.easebar.com/pic/20260114/13385900-a033-4e64-bf97-f8adac56bbea.png" xlink:type="simple">https://r.res.easebar.com/pic/20260114/13385900-a033-4e64-bf97-f8adac56bbea.png</text:a></text:p>
          </table:table-cell>
          <table:table-cell table:style-name="ce1"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UPGRADE!</text:p>
          </table:table-cell>
          <table:table-cell table:style-name="ce1" office:value-type="string" calcext:value-type="string">
            <text:p><text:a xlink:href="https://r.res.easebar.com/pic/20260114/0cf9ba9a-131e-4460-9205-2acfb9fdad48.png" xlink:type="simple">https://r.res.easebar.com/pic/20260114/0cf9ba9a-131e-4460-9205-2acfb9fdad48.png</text:a></text:p>
          </table:table-cell>
          <table:table-cell table:style-name="ce1"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DUELIST</text:p>
          </table:table-cell>
          <table:table-cell table:style-name="ce1" office:value-type="string" calcext:value-type="string">
            <text:p><text:a xlink:href="https://r.res.easebar.com/pic/20260114/68c29f6d-a09c-45e0-8d88-4ee6bd767f6c.png" xlink:type="simple">https://r.res.easebar.com/pic/20260114/68c29f6d-a09c-45e0-8d88-4ee6bd767f6c.png</text:a></text:p>
          </table:table-cell>
          <table:table-cell table:style-name="ce1" office:value-type="string" calcext:value-type="string">
            <text:p>True heroes taunt face-to-face! I roast nearby baddies, mess up their vision, and tank their hits like a boss. Try m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UAL DESERT EAGLES - DUELIST UPGRADED</text:p>
          </table:table-cell>
          <table:table-cell table:style-name="ce1" office:value-type="string" calcext:value-type="string">
            <text:p><text:a xlink:href="https://r.res.easebar.com/pic/20260114/1225939a-146b-4699-9d72-050fcaa16d4c.png" xlink:type="simple">https://r.res.easebar.com/pic/20260114/1225939a-146b-4699-9d72-050fcaa16d4c.png</text:a></text:p>
          </table:table-cell>
          <table:table-cell table:style-name="ce1" office:value-type="string" calcext:value-type="string">
            <text:p>Keep blasting till you trigger a BOOM. My thoughts literally explode onto the battlefield. Talk about mind-blowing firepower!</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KICK@$$ KATANA - DUELIST UPGRADED</text:p>
          </table:table-cell>
          <table:table-cell table:style-name="ce1" office:value-type="string" calcext:value-type="string">
            <text:p><text:a xlink:href="https://r.res.easebar.com/pic/20260114/b8b503aa-e398-45a1-8500-698622cc9de4.png" xlink:type="simple">https://r.res.easebar.com/pic/20260114/b8b503aa-e398-45a1-8500-698622cc9de4.png</text:a></text:p>
          </table:table-cell>
          <table:table-cell table:style-name="ce1" office:value-type="string" calcext:value-type="string">
            <text:p>Now with extra chop! Stabs can go straight for the noggin. Heads up! Do a Bunny Hop and POW! Stabby Stabby action guaranteed! Run while you can!</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DUELIST UPGRADED</text:p>
          </table:table-cell>
          <table:table-cell table:style-name="ce1" office:value-type="string" calcext:value-type="string">
            <text:p><text:a xlink:href="https://r.res.easebar.com/pic/20260114/b43a5885-06d3-4e7f-a65a-862e8b0a75b8.png" xlink:type="simple">https://r.res.easebar.com/pic/20260114/b43a5885-06d3-4e7f-a65a-862e8b0a75b8.png</text:a></text:p>
          </table:table-cell>
          <table:table-cell table:style-name="ce1" office:value-type="string" calcext:value-type="string">
            <text:p>Check out the best trash talk in the Chronoverse! Keep taunting and melting their HP! I even block their screen, so they can't see squat. Plus, I tank hits like a champ. Enemies that stick around too long get the bottom of their screen taped up. By the end, they won't even find their health bar and whatnot. Good luck fighting what you can't see, sucker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AZARDOUS HIJINKS - DUELIST UPGRADED</text:p>
          </table:table-cell>
          <table:table-cell table:style-name="ce1" office:value-type="string" calcext:value-type="string">
            <text:p><text:a xlink:href="https://r.res.easebar.com/pic/20260114/6b324b73-b598-456a-9559-b42bf1e77176.png" xlink:type="simple">https://r.res.easebar.com/pic/20260114/6b324b73-b598-456a-9559-b42bf1e77176.png</text:a></text:p>
          </table:table-cell>
          <table:table-cell table:style-name="ce1" office:value-type="string" calcext:value-type="string">
            <text:p>Now with bouncy castle action! Slash, bounce, repeat. It's like the world's deadliest pinball!. Cooldowns? Never heard of 'em. Keep going as long as you hit stuff, just don't let me fall flat on my as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The Thing - Yancy Street Charge, Human Torch - Supernova, Black Widow - Edge Dancer, Iron Fist - Yat Jee Chung Kuen, Namor - Horn of Proteus,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DSHOT! - DUELIST UPGRADED</text:p>
          </table:table-cell>
          <table:table-cell table:style-name="ce1" office:value-type="string" calcext:value-type="string">
            <text:p><text:a xlink:href="https://r.res.easebar.com/pic/20260116/edddeceb-fcc3-4937-b3f3-ef12531eaf98.png" xlink:type="simple">https://r.res.easebar.com/pic/20260116/edddeceb-fcc3-4937-b3f3-ef12531eaf98.png</text:a></text:p>
          </table:table-cell>
          <table:table-cell table:style-name="ce1" office:value-type="string" calcext:value-type="string">
            <text:p>Juggle my noggin for extra throws! If you catch it thrice, it goes kaboom. Everyone gets a piece of my mind</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POP QUIZ! - UPGRADED</text:p>
          </table:table-cell>
          <table:table-cell table:style-name="ce1" office:value-type="string" calcext:value-type="string">
            <text:p><text:a xlink:href="https://r.res.easebar.com/pic/20260116/83b33337-d2fb-4d39-929e-096c8aa53056.png" xlink:type="simple">https://r.res.easebar.com/pic/20260116/83b33337-d2fb-4d39-929e-096c8aa53056.png</text:a></text:p>
          </table:table-cell>
          <table:table-cell table:style-name="ce1" office:value-type="string" calcext:value-type="string">
            <text:p>Don't just stand there, you blockhead! The challenge's still rolling. But don't worry, I'm not one of those money-hungry scam artists. The buffs are on the house, no price hike. Take on this challenge, and you'll get three freebies: a little Speed boost, Continuous Healing, and Damage Up. Hit enough baddies with the right abilities exactly as I ask, and you unlock the ultimate bundle (Super Speed, Super Healing, Damage Boost AND reset all your cooldowns (except Healing Factor; no cheating!). Now THAT'S lov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pore Slumber, Luna Snow - Ice Arts, Black Widow - Edge Dancer, Emma Frost - Psionic Seduction, Winter Soldier - Tainted Voltage, Storm - Omega Hurricane, Storm - Goddess Boost, Jeff the Land Shark - It's Jeff!,</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SKILL ISSUE - UPGRADED</text:p>
          </table:table-cell>
          <table:table-cell table:style-name="ce1" office:value-type="string" calcext:value-type="string">
            <text:p><text:a xlink:href="https://r.res.easebar.com/pic/20260116/05a3bb0c-552b-48d5-9cd0-1f7e1e349923.png" xlink:type="simple">https://r.res.easebar.com/pic/20260116/05a3bb0c-552b-48d5-9cd0-1f7e1e349923.png</text:a></text:p>
          </table:table-cell>
          <table:table-cell table:style-name="ce1" office:value-type="string" calcext:value-type="string">
            <text:p>Dumbpoochu, I choose you! Taunt time! Their HP melts away, and if they whiff an ability, they get bonus pain AND Vulnerability. Double whammy! Objection? Overruled!</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oul Resurgence, Luna Snow - Fate of Both Worlds, Cloak&amp;Dagger - Terror Cape, Cloak&amp;Dagger - Dark Teleportation, Iron Fist - Dragon's Defense, Star-Lord - Galactic Legend,</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UAL DESERT EAGLES - STRATEGIST</text:p>
          </table:table-cell>
          <table:table-cell table:style-name="ce1" office:value-type="string" calcext:value-type="string">
            <text:p><text:a xlink:href="https://r.res.easebar.com/pic/20260114/742f6ca8-600f-484d-8675-bac5d7b3788a.png" xlink:type="simple">https://r.res.easebar.com/pic/20260114/742f6ca8-600f-484d-8675-bac5d7b3788a.png</text:a></text:p>
          </table:table-cell>
          <table:table-cell table:style-name="ce1" office:value-type="string" calcext:value-type="string">
            <text:p>Nobody lays a finger on my teammates! Anyone tries, and I'm firing these big boy bullets straight at their fac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PWNAGE POUND</text:p>
          </table:table-cell>
          <table:table-cell table:style-name="ce1" office:value-type="string" calcext:value-type="string">
            <text:p><text:a xlink:href="https://r.res.easebar.com/pic/20260116/8480f602-9af4-45fd-b52d-1a12f22cb3b8.png" xlink:type="simple">https://r.res.easebar.com/pic/20260116/8480f602-9af4-45fd-b52d-1a12f22cb3b8.png</text:a></text:p>
          </table:table-cell>
          <table:table-cell table:style-name="ce1" office:value-type="string" calcext:value-type="string">
            <text:p>You! Yeah, you - the hyper one! Eyes off my friends. I sentence you to...whatever! Get ready to be taunted. I get bonus HP and healing, and if you whiff your abilities, you take damage, and I get even more HP!</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oul Resurgence, Luna Snow - Fate of Both Worlds, Cloak&amp;Dagger - Terror Cape, Cloak&amp;Dagger - Dark Teleportation, Iron Fist - Dragon's Defense,</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BOUNCING BOBBLEHEAD - STRATEGIST</text:p>
          </table:table-cell>
          <table:table-cell table:style-name="ce1" office:value-type="string" calcext:value-type="string">
            <text:p><text:a xlink:href="https://r.res.easebar.com/pic/20260116/5d99dd32-9db1-4810-8b0d-6b760db4bdf7.png" xlink:type="simple">https://r.res.easebar.com/pic/20260116/5d99dd32-9db1-4810-8b0d-6b760db4bdf7.png</text:a></text:p>
          </table:table-cell>
          <table:table-cell table:style-name="ce1" office:value-type="string" calcext:value-type="string">
            <text:p>Plushie power! It stops every single attack those chumps throw, giving my team a safety bubble. It's cute AND bulletproof</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HOP</text:p>
          </table:table-cell>
          <table:table-cell table:style-name="ce1" office:value-type="string" calcext:value-type="string">
            <text:p><text:a xlink:href="https://r.res.easebar.com/pic/20260114/ed8221fc-11a3-48a6-bfe8-03d37528203a.png" xlink:type="simple">https://r.res.easebar.com/pic/20260114/ed8221fc-11a3-48a6-bfe8-03d37528203a.png</text:a></text:p>
          </table:table-cell>
          <table:table-cell table:style-name="ce1" office:value-type="string" calcext:value-type="string">
            <text:p>Yup, I can double jump in midair! During The Big Test and its upgrade, I can also stomp heads and wall jump to reset its cooldown. Stomp enemies so hard they won't get near my team!</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Winter Soldier - Trooper's Fist, Winter Soldier - Bionic Hook, Spider-man - Get Over Here!, Storm - Omega Hurricane, Storm - Goddess Boost,</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FACTOR</text:p>
          </table:table-cell>
          <table:table-cell table:style-name="ce1" office:value-type="string" calcext:value-type="string">
            <text:p><text:a xlink:href="https://r.res.easebar.com/pic/20260114/0ef403ed-dc90-4200-9d01-f46dc30be7e7.png" xlink:type="simple">https://r.res.easebar.com/pic/20260114/0ef403ed-dc90-4200-9d01-f46dc30be7e7.png</text:a></text:p>
          </table:table-cell>
          <table:table-cell table:style-name="ce1" office:value-type="string" calcext:value-type="string">
            <text:p>Out of combat? I'm healing up, staying battle-ready to protect my team. And if I'm about to croak? Surprise! I get a free pass, and my health zooms back up. Nice try, villain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Blade - Daywalker Dash, Moon Knight - Hand of Khonshu, Human Torch - Supernova,</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MAXIMUM FLAIR</text:p>
          </table:table-cell>
          <table:table-cell table:style-name="ce1" office:value-type="string" calcext:value-type="string">
            <text:p><text:a xlink:href="https://r.res.easebar.com/pic/20260114/aef6ba6f-d996-4c2d-ba9e-ef34a0cc9ddc.png" xlink:type="simple">https://r.res.easebar.com/pic/20260114/aef6ba6f-d996-4c2d-ba9e-ef34a0cc9ddc.png</text:a></text:p>
          </table:table-cell>
          <table:table-cell table:style-name="ce1"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UPGRADE!</text:p>
          </table:table-cell>
          <table:table-cell table:style-name="ce1" office:value-type="string" calcext:value-type="string">
            <text:p><text:a xlink:href="https://r.res.easebar.com/pic/20260114/18700c8d-3453-49d2-8da7-622b77e22dae.png" xlink:type="simple">https://r.res.easebar.com/pic/20260114/18700c8d-3453-49d2-8da7-622b77e22dae.png</text:a></text:p>
          </table:table-cell>
          <table:table-cell table:style-name="ce1"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STRATEGIST</text:p>
          </table:table-cell>
          <table:table-cell table:style-name="ce1" office:value-type="string" calcext:value-type="string">
            <text:p><text:a xlink:href="https://r.res.easebar.com/pic/20260114/fa941747-fc9e-4138-af71-9dc6b0fc6a54.png" xlink:type="simple">https://r.res.easebar.com/pic/20260114/fa941747-fc9e-4138-af71-9dc6b0fc6a54.png</text:a></text:p>
          </table:table-cell>
          <table:table-cell table:style-name="ce1" office:value-type="string" calcext:value-type="string">
            <text:p>Want to hurt my team? Good luck! I hit you with a taunt, mess up your vision, and burn your health nonstop! Best part: my swords and guns go full turbo for the duration. Blink and you'll miss it</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KICK@$$ KATANA - STRATEGIST</text:p>
          </table:table-cell>
          <table:table-cell table:style-name="ce1" office:value-type="string" calcext:value-type="string">
            <text:p><text:a xlink:href="https://r.res.easebar.com/pic/20260114/e091b58b-f4c4-4094-9076-5aa489f85ec6.png" xlink:type="simple">https://r.res.easebar.com/pic/20260114/e091b58b-f4c4-4094-9076-5aa489f85ec6.png</text:a></text:p>
          </table:table-cell>
          <table:table-cell table:style-name="ce1" office:value-type="string" calcext:value-type="string">
            <text:p>Protecting my team means my katanas go full savage. No mercy for the baddie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FINAL EXAM</text:p>
          </table:table-cell>
          <table:table-cell table:style-name="ce1" office:value-type="string" calcext:value-type="string">
            <text:p><text:a xlink:href="https://r.res.easebar.com/pic/20260116/cb9139a3-04c0-41b5-ad70-114a5e5baef5.png" xlink:type="simple">https://r.res.easebar.com/pic/20260116/cb9139a3-04c0-41b5-ad70-114a5e5baef5.png</text:a></text:p>
          </table:table-cell>
          <table:table-cell table:style-name="ce1" office:value-type="string" calcext:value-type="string">
            <text:p>Wake the #!&amp;% up, hero! We've got a game to win! Speed and healing buffs for starters, bonus Healing Hijinks for me, and extra HP for me and my nearby friends. Hit enough baddies with the right abilities exactly as I ask, and you unlock mega speed and healing, plus reset my Healing Factor cooldown!. Team protection mode: activated!</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pore Slumber, Luna Snow - Ice Arts, Black Widow - Edge Dancer, Emma Frost - Psionic Seduction, Winter Soldier - Tainted Voltage, Storm - Omega Hurricane, Storm - Goddess Boost,</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HIJINKS - STRATEGIST</text:p>
          </table:table-cell>
          <table:table-cell table:style-name="ce1" office:value-type="string" calcext:value-type="string">
            <text:p><text:a xlink:href="https://r.res.easebar.com/pic/20260114/cbd80a74-aafa-46b2-96c8-645bb247f439.png" xlink:type="simple">https://r.res.easebar.com/pic/20260114/cbd80a74-aafa-46b2-96c8-645bb247f439.png</text:a></text:p>
          </table:table-cell>
          <table:table-cell table:style-name="ce1" office:value-type="string" calcext:value-type="string">
            <text:p>Try getting to my teammates, I dare you! My dash slash knocks fools down, and if I hit, I get to do it again. Up to three times, baby!</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The Thing - Yancy Street Charge, Human Torch - Supernova, Iron Fist - Yat Jee Chung Kuen, Namor - Horn of Proteus,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HOP</text:p>
          </table:table-cell>
          <table:table-cell table:style-name="ce1" office:value-type="string" calcext:value-type="string">
            <text:p><text:a xlink:href="https://r.res.easebar.com/pic/20260114/d86afade-9135-4cbd-87d0-18d484cf7556.png" xlink:type="simple">https://r.res.easebar.com/pic/20260114/d86afade-9135-4cbd-87d0-18d484cf7556.png</text:a></text:p>
          </table:table-cell>
          <table:table-cell table:style-name="ce1" office:value-type="string" calcext:value-type="string">
            <text:p>Yup, I can double jump in midair! During Final Exam and its upgrade, I can also stomp heads and wall jump to reset its cooldown. Stomp enemies so hard they won't get near my team!</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Winter Soldier - Trooper's Fist, Winter Soldier - Bionic Hook,</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FACTOR</text:p>
          </table:table-cell>
          <table:table-cell table:style-name="ce1" office:value-type="string" calcext:value-type="string">
            <text:p><text:a xlink:href="https://r.res.easebar.com/pic/20260114/257f524b-d3e0-438f-b7cc-01b8a2f7efdc.png" xlink:type="simple">https://r.res.easebar.com/pic/20260114/257f524b-d3e0-438f-b7cc-01b8a2f7efdc.png</text:a></text:p>
          </table:table-cell>
          <table:table-cell table:style-name="ce1" office:value-type="string" calcext:value-type="string">
            <text:p>Out of combat? I'm healing up, staying battle-ready to protect my team. And if I'm about to croak? Surprise! I get a free pass, and my health zooms back up. Nice try, villain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Blade - Daywalker Dash, Moon Knight - Hand of Khonshu, Human Torch - Supernova, Spider-man - Spectacular Spin,</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MAXIMUM FLAIR</text:p>
          </table:table-cell>
          <table:table-cell table:style-name="ce1" office:value-type="string" calcext:value-type="string">
            <text:p><text:a xlink:href="https://r.res.easebar.com/pic/20260114/7f9679be-20c5-48d5-b232-7ba2172b04b9.png" xlink:type="simple">https://r.res.easebar.com/pic/20260114/7f9679be-20c5-48d5-b232-7ba2172b04b9.png</text:a></text:p>
          </table:table-cell>
          <table:table-cell table:style-name="ce1"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UPGRADE!</text:p>
          </table:table-cell>
          <table:table-cell table:style-name="ce1" office:value-type="string" calcext:value-type="string">
            <text:p><text:a xlink:href="https://r.res.easebar.com/pic/20260114/d628f429-4396-4fea-89bb-c9367cec8478.png" xlink:type="simple">https://r.res.easebar.com/pic/20260114/d628f429-4396-4fea-89bb-c9367cec8478.png</text:a></text:p>
          </table:table-cell>
          <table:table-cell table:style-name="ce1"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STRATEGIST</text:p>
          </table:table-cell>
          <table:table-cell table:style-name="ce1" office:value-type="string" calcext:value-type="string">
            <text:p><text:a xlink:href="https://r.res.easebar.com/pic/20260114/10363965-15e5-4296-8132-9732627c1c8f.png" xlink:type="simple">https://r.res.easebar.com/pic/20260114/10363965-15e5-4296-8132-9732627c1c8f.png</text:a></text:p>
          </table:table-cell>
          <table:table-cell table:style-name="ce1" office:value-type="string" calcext:value-type="string">
            <text:p>Want to hurt my team? Good luck! I hit you with a taunt, mess up your vision, and burn your health nonstop! Best part: my swords and guns go full turbo for the duration. Blink and you'll miss it</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Blade - Daywalker Dash,</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UAL DESERT EAGLES - STRATEGIST UPGRADED</text:p>
          </table:table-cell>
          <table:table-cell table:style-name="ce1" office:value-type="string" calcext:value-type="string">
            <text:p><text:a xlink:href="https://r.res.easebar.com/pic/20260114/78599d08-a3e3-40a7-a163-59e4135f91f9.png" xlink:type="simple">https://r.res.easebar.com/pic/20260114/78599d08-a3e3-40a7-a163-59e4135f91f9.png</text:a></text:p>
          </table:table-cell>
          <table:table-cell table:style-name="ce1" office:value-type="string" calcext:value-type="string">
            <text:p>I rack up shots, then, BOOM! A mind-blowing bubble bomb for all the enemies. Teammate security: maximum</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KICK@$$ KATANA - STRATEGIST UPGRADED</text:p>
          </table:table-cell>
          <table:table-cell table:style-name="ce1" office:value-type="string" calcext:value-type="string">
            <text:p><text:a xlink:href="https://r.res.easebar.com/pic/20260114/351cd1a6-3b7e-4bd8-93b2-8f672d1528c6.png" xlink:type="simple">https://r.res.easebar.com/pic/20260114/351cd1a6-3b7e-4bd8-93b2-8f672d1528c6.png</text:a></text:p>
          </table:table-cell>
          <table:table-cell table:style-name="ce1" office:value-type="string" calcext:value-type="string">
            <text:p>Relax, you've got Deadpool on your side! Swords out, baddies out. My stab hits crit, and a Healing Hop hit makes the next swing a stabby special</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DEADPOOL IN YOUR AREA - STRATEGIST UPGRADED</text:p>
          </table:table-cell>
          <table:table-cell table:style-name="ce1" office:value-type="string" calcext:value-type="string">
            <text:p><text:a xlink:href="https://r.res.easebar.com/pic/20260114/cf86463c-760f-4bbf-9dda-f45465f9872a.png" xlink:type="simple">https://r.res.easebar.com/pic/20260114/cf86463c-760f-4bbf-9dda-f45465f9872a.png</text:a></text:p>
          </table:table-cell>
          <table:table-cell table:style-name="ce1" office:value-type="string" calcext:value-type="string">
            <text:p>Teammates, stay safe! Dummies, look here! It's showtime: I taunt, blind you, and hit warp speed with my swords and guns. Plus, my crew gets a damage reduction buff, so they're basically invincible. Dummies that stick around too long will even have their UI taped over!</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HEALING HIJINKS - STRATEGIST UPGRADED</text:p>
          </table:table-cell>
          <table:table-cell table:style-name="ce1" office:value-type="string" calcext:value-type="string">
            <text:p><text:a xlink:href="https://r.res.easebar.com/pic/20260114/dec06e87-6750-4796-91bf-a77d08cb8ce9.png" xlink:type="simple">https://r.res.easebar.com/pic/20260114/dec06e87-6750-4796-91bf-a77d08cb8ce9.png</text:a></text:p>
          </table:table-cell>
          <table:table-cell table:style-name="ce1" office:value-type="string" calcext:value-type="string">
            <text:p>Watch this pro bodyguard in action! I dash forward, nail the bad guy, and bounce in any direction I want. Oh, and I can do this two more times real quick!</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Emma Frost - Carbon Crush, The Thing - Yancy Street Charge, Human Torch - Supernova, Black Widow - Edge Dancer, Iron Fist - Yat Jee Chung Kuen, Iron Fist - Dragon's Defense, Iron Fist - Living Chi, Namor - Horn of Proteus,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BOUNCING BOBBLEHEAD - STRATEGIST UPGRADED</text:p>
          </table:table-cell>
          <table:table-cell table:style-name="ce1" office:value-type="string" calcext:value-type="string">
            <text:p><text:a xlink:href="https://r.res.easebar.com/pic/20260116/a0174fbe-7018-46bf-b960-9b88bbbbf227.png" xlink:type="simple">https://r.res.easebar.com/pic/20260116/a0174fbe-7018-46bf-b960-9b88bbbbf227.png</text:a></text:p>
          </table:table-cell>
          <table:table-cell table:style-name="ce1" office:value-type="string" calcext:value-type="string">
            <text:p>My ultra-cool, super shiny, extra huggable, and totally blinged-out plushy. Toss it ahead, and it lands as an invincible sphere of awesomeness! Blocking attacks and keeping my team safe inside our furry fortress</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2" table:number-columns-repeated="24"/>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FINAL EXAM - UPGRADED</text:p>
          </table:table-cell>
          <table:table-cell table:style-name="ce1" office:value-type="string" calcext:value-type="string">
            <text:p><text:a xlink:href="https://r.res.easebar.com/pic/20260116/070f508b-a481-4fb2-8304-46bd0f690137.png" xlink:type="simple">https://r.res.easebar.com/pic/20260116/070f508b-a481-4fb2-8304-46bd0f690137.png</text:a></text:p>
          </table:table-cell>
          <table:table-cell table:style-name="ce1" office:value-type="string" calcext:value-type="string">
            <text:p>Hey, player! Warm-up's over, time for the main event! Speed, healing, dashes, for me, and bonus HP for all! Smash enough baddies with the skills I say, and you unlock super buffs(massive speed and healing), plus Healing Factor resets. For some time after, each hit means more HP for the crew and you. Don't mess this up!</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pore Slumber, Luna Snow - Ice Arts, Black Widow - Edge Dancer, Emma Frost - Psionic Seduction, Winter Soldier - Tainted Voltage, Storm - Omega Hurricane, Storm - Goddess Boost, Jeff the Land Shark - It's Jeff!, </text:p>
          </table:table-cell>
          <table:table-cell table:style-name="ce2" table:number-columns-repeated="23"/>
          <table:table-cell table:number-columns-repeated="16355"/>
        </table:table-row>
        <table:table-row table:style-name="ro1">
          <table:table-cell table:style-name="ce1" office:value-type="string" calcext:value-type="string">
            <text:p>DEADPOOL</text:p>
          </table:table-cell>
          <table:table-cell table:style-name="ce1" office:value-type="string" calcext:value-type="string">
            <text:p>PWNAGE POUND - UPGRADED</text:p>
          </table:table-cell>
          <table:table-cell table:style-name="ce1" office:value-type="string" calcext:value-type="string">
            <text:p><text:a xlink:href="https://r.res.easebar.com/pic/20260116/f6c942a1-e1fd-4360-beda-fc4f62ceb0e0.png" xlink:type="simple">https://r.res.easebar.com/pic/20260116/f6c942a1-e1fd-4360-beda-fc4f62ceb0e0.png</text:a></text:p>
          </table:table-cell>
          <table:table-cell table:style-name="ce1" office:value-type="string" calcext:value-type="string">
            <text:p>Upgraded courtroom drama! Congrats, unlucky one! You're my pick; enjoy the taunt! I score bonus health and healing, and you take ongoing damage. If you miss an ability while court is in session, it's a double whammy. You get more pain, AND I get more extra HP! Thanks in advance!</text:p>
          </table:table-cell>
          <table:table-cell table:style-name="ce1" office:value-type="string" calcext:value-type="string">
            <text:p><text:a xlink:href="https://www.marvelrivals.com/20260115/41360_1281973.html" xlink:type="simple">https://www.marvelrivals.com/20260115/41360_1281973.html</text:a></text:p>
          </table:table-cell>
          <table:table-cell table:style-name="ce1" office:value-type="string" calcext:value-type="string">
            <text:p>Mantis - Soul Resurgence, Luna Snow - Fate of Both Worlds, Cloak&amp;Dagger - Terror Cape, Cloak&amp;Dagger - Dark Teleportation, Iron Fist - Dragon's Defense, Star-Lord - Galactic Legend,</text:p>
          </table:table-cell>
          <table:table-cell table:style-name="ce2" table:number-columns-repeated="23"/>
          <table:table-cell table:number-columns-repeated="16355"/>
        </table:table-row>
        <table:table-row table:style-name="ro1">
          <table:table-cell table:style-name="ce1" office:value-type="string" calcext:value-type="string">
            <text:p>Rogue</text:p>
          </table:table-cell>
          <table:table-cell table:style-name="ce1" office:value-type="string" calcext:value-type="string">
            <text:p>Power Surge Punch</text:p>
          </table:table-cell>
          <table:table-cell table:style-name="ce1" office:value-type="string" calcext:value-type="string">
            <text:p><text:a xlink:href="https://r.res.easebar.com/pic/20251212/60a3fc70-a087-4e74-a818-74f20c3764b6.png" xlink:type="simple">https://r.res.easebar.com/pic/20251212/60a3fc70-a087-4e74-a818-74f20c3764b6.png</text:a></text:p>
          </table:table-cell>
          <table:table-cell table:style-name="ce1" office:value-type="string" calcext:value-type="string">
            <text:p>Punch forward with both fists</text:p>
          </table:table-cell>
          <table:table-cell table:style-name="ce1" office:value-type="string" calcext:value-type="string">
            <text:p><text:a xlink:href="https://www.marvelrivals.com/20251212/41360_1276333.html" xlink:type="simple">https://www.marvelrivals.com/20251212/41360_1276333.html</text:a></text:p>
          </table:table-cell>
          <table:table-cell table:style-name="ce1" office:value-type="string" calcext:value-type="string">
            <text:p>Squirrel Girl - Unbeatable Squirrel Tsunami, Black Widow - Red Room Rifle, Black Widow - Electro-Plasma Explosion, Iron Fist - Dragon's Defense, Hawkeye - Piercing Arrow,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Rogue</text:p>
          </table:table-cell>
          <table:table-cell table:style-name="ce1" office:value-type="string" calcext:value-type="string">
            <text:p>Defensive Stance</text:p>
          </table:table-cell>
          <table:table-cell table:style-name="ce1" office:value-type="string" calcext:value-type="string">
            <text:p><text:a xlink:href="https://r.res.easebar.com/pic/20251212/6df4eb8d-f7ba-4808-8680-073c0f1286af.png" xlink:type="simple">https://r.res.easebar.com/pic/20251212/6df4eb8d-f7ba-4808-8680-073c0f1286af.png</text:a></text:p>
          </table:table-cell>
          <table:table-cell table:style-name="ce1" office:value-type="string" calcext:value-type="string">
            <text:p>Absorb nearby projectiles and reduce incoming damage;absorbed damage powers up your next Southern Brawl</text:p>
          </table:table-cell>
          <table:table-cell table:style-name="ce1" office:value-type="string" calcext:value-type="string">
            <text:p><text:a xlink:href="https://www.marvelrivals.com/20251212/41360_1276333.html" xlink:type="simple">https://www.marvelrivals.com/20251212/41360_1276333.html</text:a></text:p>
          </table:table-cell>
          <table:table-cell table:style-name="ce1" office:value-type="string" calcext:value-type="string">
            <text:p>Winter Soldier - Trooper's Fist, Winter Soldier - Bionic Hook,</text:p>
          </table:table-cell>
          <table:table-cell table:style-name="ce2" table:number-columns-repeated="23"/>
          <table:table-cell table:number-columns-repeated="16355"/>
        </table:table-row>
        <table:table-row table:style-name="ro1">
          <table:table-cell table:style-name="ce1" office:value-type="string" calcext:value-type="string">
            <text:p>Rogue</text:p>
          </table:table-cell>
          <table:table-cell table:style-name="ce1" office:value-type="string" calcext:value-type="string">
            <text:p>Southern Brawl</text:p>
          </table:table-cell>
          <table:table-cell table:style-name="ce1" office:value-type="string" calcext:value-type="string">
            <text:p><text:a xlink:href="https://r.res.easebar.com/pic/20251212/965eb4f6-cddc-4a8d-8c72-8be39286bc1a.png" xlink:type="simple">https://r.res.easebar.com/pic/20251212/965eb4f6-cddc-4a8d-8c72-8be39286bc1a.png</text:a></text:p>
          </table:table-cell>
          <table:table-cell table:style-name="ce1" office:value-type="string" calcext:value-type="string">
            <text:p>While in Defensive Stance, dash forward and slam enemies in front, dealing area damage</text:p>
          </table:table-cell>
          <table:table-cell table:style-name="ce1" office:value-type="string" calcext:value-type="string">
            <text:p><text:a xlink:href="https://www.marvelrivals.com/20251212/41360_1276333.html" xlink:type="simple">https://www.marvelrivals.com/20251212/41360_1276333.html</text:a></text:p>
          </table:table-cell>
          <table:table-cell table:style-name="ce1" office:value-type="string" calcext:value-type="string">
            <text:p>The Thing - Yancy Street Charge, Black Cat - Mento-Fish, Squirrel Girl - Squirrel Blockade, Black Widow - Edge Dancer, Namor - Horn of Proteus, Magik - Stepping Discs, Hela - Soul Drainer,</text:p>
          </table:table-cell>
          <table:table-cell table:style-name="ce2" table:number-columns-repeated="23"/>
          <table:table-cell table:number-columns-repeated="16355"/>
        </table:table-row>
        <table:table-row table:style-name="ro1">
          <table:table-cell table:style-name="ce1" office:value-type="string" calcext:value-type="string">
            <text:p>Rogue</text:p>
          </table:table-cell>
          <table:table-cell table:style-name="ce1" office:value-type="string" calcext:value-type="string">
            <text:p>Chrono Kick Combo</text:p>
          </table:table-cell>
          <table:table-cell table:style-name="ce1" office:value-type="string" calcext:value-type="string">
            <text:p><text:a xlink:href="https://r.res.easebar.com/pic/20251212/f4b1d6b3-447e-47fd-bc18-9585ca699b80.png" xlink:type="simple">https://r.res.easebar.com/pic/20251212/f4b1d6b3-447e-47fd-bc18-9585ca699b80.png</text:a></text:p>
          </table:table-cell>
          <table:table-cell table:style-name="ce1" office:value-type="string" calcext:value-type="string">
            <text:p>Dash forward and launch the enemy, entering flight; activate again to Knock Down nearby enemies. Your next two Power Surge Punch attacks become ranged, piercing enemies and granting Bonus Health</text:p>
          </table:table-cell>
          <table:table-cell table:style-name="ce1" office:value-type="string" calcext:value-type="string">
            <text:p><text:a xlink:href="https://www.marvelrivals.com/20251212/41360_1276333.html" xlink:type="simple">https://www.marvelrivals.com/20251212/41360_1276333.html</text:a></text:p>
          </table:table-cell>
          <table:table-cell table:style-name="ce1" office:value-type="string" calcext:value-type="string">
            <text:p>Emma Frost - Diamond Form, The Thing - Yancy Street Charge, Black Cat - Mento-Fish, The Thing - Unyielding Will, Squirrel Girl - Squirrel Blockade, Black Widow - Edge Dancer, Namor - Horn of Proteus, Winter Soldier - Trooper's Fist, Winter Soldier - Tainted Voltage, Winter Soldier - Bionic Hook, Magik - Stepping Discs, Spider-man - Get Over Here!, Hela - Soul Drainer, Hulk - Incredible Leap, Jeff the Land Shark - Aqua Burst,</text:p>
          </table:table-cell>
          <table:table-cell table:style-name="ce2" table:number-columns-repeated="23"/>
          <table:table-cell table:number-columns-repeated="16355"/>
        </table:table-row>
        <table:table-row table:style-name="ro1">
          <table:table-cell table:style-name="ce1" office:value-type="string" calcext:value-type="string">
            <text:p>Rogue</text:p>
          </table:table-cell>
          <table:table-cell table:style-name="ce1" office:value-type="string" calcext:value-type="string">
            <text:p>Fatal Attraction</text:p>
          </table:table-cell>
          <table:table-cell table:style-name="ce1" office:value-type="string" calcext:value-type="string">
            <text:p><text:a xlink:href="https://r.res.easebar.com/pic/20251212/922413ba-afba-4475-b0f1-97e46caec2a3.png" xlink:type="simple">https://r.res.easebar.com/pic/20251212/922413ba-afba-4475-b0f1-97e46caec2a3.png</text:a></text:p>
          </table:table-cell>
          <table:table-cell table:style-name="ce1" office:value-type="string" calcext:value-type="string">
            <text:p>Dash forward. Press again to unleash a burst of Chronovium Power, dealing continuous damage to nearby foes; after a delay, the energy retracts, pulling all enemies towards Rogue</text:p>
          </table:table-cell>
          <table:table-cell table:style-name="ce1" office:value-type="string" calcext:value-type="string">
            <text:p><text:a xlink:href="https://www.marvelrivals.com/20251212/41360_1276333.html" xlink:type="simple">https://www.marvelrivals.com/20251212/41360_1276333.html</text:a></text:p>
          </table:table-cell>
          <table:table-cell table:style-name="ce1" office:value-type="string" calcext:value-type="string">
            <text:p>Emma Frost - Diamond Form, The Thing - Yancy Street Charge, Black Cat - Mento-Fish, The Thing - Unyielding Will, Squirrel Girl - Squirrel Blockade, Black Widow - Edge Dancer, Hawkeye - Crescent Slash, Namor - Horn of Proteus, Magik - Stepping Discs, Hela - Soul Drainer,</text:p>
          </table:table-cell>
          <table:table-cell table:style-name="ce2" table:number-columns-repeated="23"/>
          <table:table-cell table:number-columns-repeated="16355"/>
        </table:table-row>
        <table:table-row table:style-name="ro1">
          <table:table-cell table:style-name="ce1" office:value-type="string" calcext:value-type="string">
            <text:p>Rogue</text:p>
          </table:table-cell>
          <table:table-cell table:style-name="ce1" office:value-type="string" calcext:value-type="string">
            <text:p>Ability Absorption</text:p>
          </table:table-cell>
          <table:table-cell table:style-name="ce1" office:value-type="string" calcext:value-type="string">
            <text:p><text:a xlink:href="https://r.res.easebar.com/pic/20251212/20a291b6-507e-4d9b-bd23-b215f1feb887.png" xlink:type="simple">https://r.res.easebar.com/pic/20251212/20a291b6-507e-4d9b-bd23-b215f1feb887.png</text:a></text:p>
          </table:table-cell>
          <table:table-cell table:style-name="ce1" office:value-type="string" calcext:value-type="string">
            <text:p>Dash forward to knock down your target and absorb their energy; after absorbing, replace Ability Absorption with one of their abilities or refresh Fatal Attraction. Also absorb Health and stats based on their role</text:p>
          </table:table-cell>
          <table:table-cell table:style-name="ce1" office:value-type="string" calcext:value-type="string">
            <text:p><text:a xlink:href="https://www.marvelrivals.com/20251212/41360_1276333.html" xlink:type="simple">https://www.marvelrivals.com/20251212/41360_1276333.html</text:a></text:p>
          </table:table-cell>
          <table:table-cell table:style-name="ce1" office:value-type="string" calcext:value-type="string">
            <text:p>Phoenix - Telepathic Illusion, The Thing - Yancy Street Charge, Black Cat - Mento-Fish, Namor - Horn of Proteus, Magik - Stepping Discs, Star-Lord - Stellar Shift, Hela - Soul Drainer, Hulk - HULK SMASH!, Hulk - Indestructible Guard, Hulk - World Breaker, Jeff the Land Shark - Hide and Seek, The Punisher - Culling Turret, The Punisher - Final Judgement,</text:p>
          </table:table-cell>
          <table:table-cell table:style-name="ce2" table:number-columns-repeated="23"/>
          <table:table-cell table:number-columns-repeated="16355"/>
        </table:table-row>
        <table:table-row table:style-name="ro1">
          <table:table-cell table:style-name="ce1" office:value-type="string" calcext:value-type="string">
            <text:p>Rogue</text:p>
          </table:table-cell>
          <table:table-cell table:style-name="ce1" office:value-type="string" calcext:value-type="string">
            <text:p>Heartbreaker</text:p>
          </table:table-cell>
          <table:table-cell table:style-name="ce1" office:value-type="string" calcext:value-type="string">
            <text:p><text:a xlink:href="https://r.res.easebar.com/pic/20251212/c5ba783e-9ca3-436c-bcaa-a1dc284b6355.png" xlink:type="simple">https://r.res.easebar.com/pic/20251212/c5ba783e-9ca3-436c-bcaa-a1dc284b6355.png</text:a></text:p>
          </table:table-cell>
          <table:table-cell table:style-name="ce1" office:value-type="string" calcext:value-type="string">
            <text:p>Continuously absorb Ultimate Ability Energy from nearby enemies and steal stats based on their role</text:p>
          </table:table-cell>
          <table:table-cell table:style-name="ce1" office:value-type="string" calcext:value-type="string">
            <text:p><text:a xlink:href="https://www.marvelrivals.com/20251212/41360_1276333.html" xlink:type="simple">https://www.marvelrivals.com/20251212/41360_1276333.html</text:a></text:p>
          </table:table-cell>
          <table:table-cell table:style-name="ce1" office:value-type="string" calcext:value-type="string">
            <text:p>Mantis - Soul Resurgence, Luna Snow - Fate of Both Worlds, Mantis - Spore Slumber, Luna Snow - Ice Arts, Angela - Assassin's Charge, Ultron - Rage of Ultron, Psylocke - Dance of the Butterfly, Moon Knight - Hand of Khonshu, Moon Knight - Ancient Ankh, Jeff the Land Shark - It's Jeff!, </text:p>
          </table:table-cell>
          <table:table-cell table:style-name="ce2" table:number-columns-repeated="23"/>
          <table:table-cell table:number-columns-repeated="16355"/>
        </table:table-row>
        <table:table-row table:style-name="ro1">
          <table:table-cell table:style-name="ce1" office:value-type="string" calcext:value-type="string">
            <text:p>Rogue</text:p>
          </table:table-cell>
          <table:table-cell table:style-name="ce1" office:value-type="string" calcext:value-type="string">
            <text:p>HEARTS AS ONE</text:p>
          </table:table-cell>
          <table:table-cell table:style-name="ce1" office:value-type="string" calcext:value-type="string">
            <text:p><text:a xlink:href="https://r.res.easebar.com/pic/20251212/c5b731bf-5102-4caf-96d1-ba09c16e4e87.png" xlink:type="simple">https://r.res.easebar.com/pic/20251212/c5b731bf-5102-4caf-96d1-ba09c16e4e87.png</text:a></text:p>
          </table:table-cell>
          <table:table-cell table:style-name="ce1" office:value-type="string" calcext:value-type="string">
            <text:p>Gambit shares kinetic energy with Magneto and Rogue. When Magneto activates this ability, Iron Volley is replaced with Ace Greatsword, which detonates upon striking enemies. The explosion leaves residual kinetic energy within the target, inflicting secondary damage after a brief delay. When Rogue activates the ability, each of her attacks causes a kinetic explosion that damages nearby enemies and heals nearby allies</text:p>
          </table:table-cell>
          <table:table-cell table:style-name="ce1" office:value-type="string" calcext:value-type="string">
            <text:p><text:a xlink:href="https://www.marvelrivals.com/20251212/41360_1276333.html" xlink:type="simple">https://www.marvelrivals.com/20251212/41360_1276333.html</text:a></text:p>
          </table:table-cell>
          <table:table-cell table:style-name="ce1" office:value-type="string" calcext:value-type="string">
            <text:p>Blade - Daywalker Dash,</text:p>
          </table:table-cell>
          <table:table-cell table:style-name="ce2" table:number-columns-repeated="23"/>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Kinetic Cards</text:p>
          </table:table-cell>
          <table:table-cell table:style-name="ce1" office:value-type="string" calcext:value-type="string">
            <text:p><text:a xlink:href="https://r.res.easebar.com/pic/20251114/803eab7e-6824-40ba-8439-6852d4d13098.png" xlink:type="simple">https://r.res.easebar.com/pic/20251114/803eab7e-6824-40ba-8439-6852d4d13098.png</text:a></text:p>
          </table:table-cell>
          <table:table-cell table:style-name="ce1" office:value-type="string" calcext:value-type="string">
            <text:p>Launch three kinetic-charged cards in an arc ahead. Each card detonates on impact, creating a single-target explosion that damages enemies and heals allies</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Ragin' Royal Flush</text:p>
          </table:table-cell>
          <table:table-cell table:style-name="ce1" office:value-type="string" calcext:value-type="string">
            <text:p><text:a xlink:href="https://r.res.easebar.com/pic/20251114/1dca6707-3f6b-48ef-a180-1f2a6f2f0c6c.png" xlink:type="simple">https://r.res.easebar.com/pic/20251114/1dca6707-3f6b-48ef-a180-1f2a6f2f0c6c.png</text:a></text:p>
          </table:table-cell>
          <table:table-cell table:style-name="ce1" office:value-type="string" calcext:value-type="string">
            <text:p>Lock onto an ally within sight and unleash multiple Aces that heal and Purify. Both enter the Kinetic Transfer state, granting increased Movement Speed and Jump Boost, while enhancing attacks with additional single-target explosive damage and providing the ally with Ultimate Ability Charge Acceleration</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1" office:value-type="string" calcext:value-type="string">
            <text:p>Emma Frost - Psionic Seduction, Psylocke - Dance of the Butterfly, Iron Man - Invincible Pulse Cannon,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Cajun Charge</text:p>
          </table:table-cell>
          <table:table-cell table:style-name="ce1" office:value-type="string" calcext:value-type="string">
            <text:p><text:a xlink:href="https://r.res.easebar.com/pic/20251114/ac36a353-d40b-4511-a13a-27f14a429c04.png" xlink:type="simple">https://r.res.easebar.com/pic/20251114/ac36a353-d40b-4511-a13a-27f14a429c04.png</text:a></text:p>
          </table:table-cell>
          <table:table-cell table:style-name="ce1" office:value-type="string" calcext:value-type="string">
            <text:p>Side-step forward with bo staff in hand, dashing a short distance</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1" office:value-type="string" calcext:value-type="string">
            <text:p>The Thing - Yancy Street Charge, Black Cat - Mento-Fish, Mister Fantastic - Distended Grip, Black Widow - Edge Dancer, Black Widow - Edge Dancer, Iron Fist - Yat Jee Chung Kuen, Moon Knight - Ancient Ankh, Namor - Horn of Proteus, Winter Soldier - Trooper's Fist, Winter Soldier - Tainted Voltage, Winter Soldier - Bionic Hook, Spider-man - Get Over Here!, Hela - Soul Drainer,</text:p>
          </table:table-cell>
          <table:table-cell table:style-name="ce2" table:number-columns-repeated="23"/>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Healing Hearts</text:p>
          </table:table-cell>
          <table:table-cell table:style-name="ce1" office:value-type="string" calcext:value-type="string">
            <text:p><text:a xlink:href="https://r.res.easebar.com/pic/20251114/6ac2c5f0-a2b1-4c61-9a9d-ad754bf80f8b.png" xlink:type="simple">https://r.res.easebar.com/pic/20251114/6ac2c5f0-a2b1-4c61-9a9d-ad754bf80f8b.png</text:a></text:p>
          </table:table-cell>
          <table:table-cell table:style-name="ce1" office:value-type="string" calcext:value-type="string">
            <text:p>Conjure a Heart card by consuming one stack of Sleight of Hand to Heal and switch to the Healing Hearts deck</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1" office:value-type="string" calcext:value-type="string">
            <text:p>Blade - Daywalker Dash,</text:p>
          </table:table-cell>
          <table:table-cell table:style-name="ce2" table:number-columns-repeated="23"/>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Breaking Spades</text:p>
          </table:table-cell>
          <table:table-cell table:style-name="ce1" office:value-type="string" calcext:value-type="string">
            <text:p><text:a xlink:href="https://r.res.easebar.com/pic/20251114/1ef52531-92a7-4f67-8087-c439b12fd268.png" xlink:type="simple">https://r.res.easebar.com/pic/20251114/1ef52531-92a7-4f67-8087-c439b12fd268.png</text:a></text:p>
          </table:table-cell>
          <table:table-cell table:style-name="ce1" office:value-type="string" calcext:value-type="string">
            <text:p>Conjure a Spade card by consuming one stack of Sleight of Hand to gain Damage Boost and switch to the Breaking Spades deck</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2" table:number-columns-repeated="24"/>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Bayou Bash</text:p>
          </table:table-cell>
          <table:table-cell table:style-name="ce1" office:value-type="string" calcext:value-type="string">
            <text:p><text:a xlink:href="https://r.res.easebar.com/pic/20251114/c8149d2a-578d-425b-baef-97750a81d644.png" xlink:type="simple">https://r.res.easebar.com/pic/20251114/c8149d2a-578d-425b-baef-97750a81d644.png</text:a></text:p>
          </table:table-cell>
          <table:table-cell table:style-name="ce1" office:value-type="string" calcext:value-type="string">
            <text:p>Channel kinetic energy into the bo staff, then slam it into the ground after a sweeping strike, creating a shockwave that damages nearby enemies and heals allies</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2" table:number-columns-repeated="24"/>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ACE OF ACES</text:p>
          </table:table-cell>
          <table:table-cell table:style-name="ce1" office:value-type="string" calcext:value-type="string">
            <text:p><text:a xlink:href="https://r.res.easebar.com/pic/20251114/0e30670c-1902-40f4-94ab-95be6d0bd05b.png" xlink:type="simple">https://r.res.easebar.com/pic/20251114/0e30670c-1902-40f4-94ab-95be6d0bd05b.png</text:a></text:p>
          </table:table-cell>
          <table:table-cell table:style-name="ce1" office:value-type="string" calcext:value-type="string">
            <text:p>Gambit charges Magneto's greatsword with kinetic energy. When Magneto activates this ability, Iron Volley is replaced with Ace Greatsword, which detonates upon striking enemies. The explosion leaves residual kinetic energy within the target, inflicting secondary damage after a brief delay</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2" table:number-columns-repeated="24"/>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Bridge Boost</text:p>
          </table:table-cell>
          <table:table-cell table:style-name="ce1" office:value-type="string" calcext:value-type="string">
            <text:p><text:a xlink:href="https://r.res.easebar.com/pic/20251114/c698518d-fcb9-49f7-88e4-6a0fdef24189.png" xlink:type="simple">https://r.res.easebar.com/pic/20251114/c698518d-fcb9-49f7-88e4-6a0fdef24189.png</text:a></text:p>
          </table:table-cell>
          <table:table-cell table:style-name="ce1" office:value-type="string" calcext:value-type="string">
            <text:p>While Healing Hearts deck is active, trigger Flush Empowerment to card spring and fire a full deck forward. Cards bounce between allies on impact, granting Health and a Healing Boost</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2" table:number-columns-repeated="24"/>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Purifying Pick-Up</text:p>
          </table:table-cell>
          <table:table-cell table:style-name="ce1" office:value-type="string" calcext:value-type="string">
            <text:p><text:a xlink:href="https://r.res.easebar.com/pic/20251114/4721ac14-6de6-4a2c-ad41-41f66bcf60ef.png" xlink:type="simple">https://r.res.easebar.com/pic/20251114/4721ac14-6de6-4a2c-ad41-41f66bcf60ef.png</text:a></text:p>
          </table:table-cell>
          <table:table-cell table:style-name="ce1" office:value-type="string" calcext:value-type="string">
            <text:p>While Healing Hearts deck is active, trigger Raise Empowerment to launch a cluster of cards in an arc ahead. Explosions heal nearby allies and Purify them</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2" table:number-columns-repeated="24"/>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Explosive Trick</text:p>
          </table:table-cell>
          <table:table-cell table:style-name="ce1" office:value-type="string" calcext:value-type="string">
            <text:p><text:a xlink:href="https://r.res.easebar.com/pic/20251114/fd0e01ed-c52f-47c1-bfcf-cf6f21d7489f.png" xlink:type="simple">https://r.res.easebar.com/pic/20251114/fd0e01ed-c52f-47c1-bfcf-cf6f21d7489f.png</text:a></text:p>
          </table:table-cell>
          <table:table-cell table:style-name="ce1" office:value-type="string" calcext:value-type="string">
            <text:p>While Breaking Spades deck is active, trigger Flush Empowerment to fire a full set of cards forward. Cards explode on impact, dealing damage while inflicting Reduced Healing</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1" office:value-type="string" calcext:value-type="string">
            <text:p>Magik - Stepping Discs, Iron Fist - Dragon's Defense,</text:p>
          </table:table-cell>
          <table:table-cell table:style-name="ce2" table:number-columns-repeated="23"/>
          <table:table-cell table:number-columns-repeated="16355"/>
        </table:table-row>
        <table:table-row table:style-name="ro1">
          <table:table-cell table:style-name="ce1" office:value-type="string" calcext:value-type="string">
            <text:p>Gambit</text:p>
          </table:table-cell>
          <table:table-cell table:style-name="ce1" office:value-type="string" calcext:value-type="string">
            <text:p>Bidding Barrage</text:p>
          </table:table-cell>
          <table:table-cell table:style-name="ce1" office:value-type="string" calcext:value-type="string">
            <text:p><text:a xlink:href="https://r.res.easebar.com/pic/20251114/5b36fc07-c4e6-496a-9944-efb824adfe0f.png" xlink:type="simple">https://r.res.easebar.com/pic/20251114/5b36fc07-c4e6-496a-9944-efb824adfe0f.png</text:a></text:p>
          </table:table-cell>
          <table:table-cell table:style-name="ce1" office:value-type="string" calcext:value-type="string">
            <text:p>While Breaking Spades deck is active, trigger Raise Empowerment to scattering cards in an arc in all directions. Explosions damage enemies and Launch them up</text:p>
          </table:table-cell>
          <table:table-cell table:style-name="ce1" office:value-type="string" calcext:value-type="string">
            <text:p><text:a xlink:href="https://www.marvelrivals.com/20251114/41360_1270998.html" xlink:type="simple">https://www.marvelrivals.com/20251114/41360_1270998.html</text:a></text:p>
          </table:table-cell>
          <table:table-cell table:style-name="ce1" office:value-type="string" calcext:value-type="string">
            <text:p>Magik - Stepping Discs, Iron Fist - Dragon's Defense,</text:p>
          </table:table-cell>
          <table:table-cell table:style-name="ce2" table:number-columns-repeated="23"/>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JUSTICE JAB</text:p>
          </table:table-cell>
          <table:table-cell table:style-name="ce1" office:value-type="string" calcext:value-type="string">
            <text:p><text:a xlink:href="https://r.res.easebar.com/pic/20251010/9a0c9bf6-2e70-4a7a-8aac-92e1a9691ecb.png" xlink:type="simple">https://r.res.easebar.com/pic/20251010/9a0c9bf6-2e70-4a7a-8aac-92e1a9691ecb.png</text:a></text:p>
          </table:table-cell>
          <table:table-cell table:style-name="ce1" office:value-type="string" calcext:value-type="string">
            <text:p>Swing Billy Clubs forward. Gain Fury on hit</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1" office:value-type="string" calcext:value-type="string">
            <text:p>Squirrel Girl - Unbeatable Squirrel Tsunami, Hawkeye - Piercing Arrow, Hawkeye - Blast Arrow, 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RIGHTEOUS CROSS</text:p>
          </table:table-cell>
          <table:table-cell table:style-name="ce1" office:value-type="string" calcext:value-type="string">
            <text:p><text:a xlink:href="https://r.res.easebar.com/pic/20251010/ee03f218-5394-415f-b11a-3a4858128d81.png" xlink:type="simple">https://r.res.easebar.com/pic/20251010/ee03f218-5394-415f-b11a-3a4858128d81.png</text:a></text:p>
          </table:table-cell>
          <table:table-cell table:style-name="ce1" office:value-type="string" calcext:value-type="string">
            <text:p>Cross your Billy Clubs and surge forward. Gain Fury on hit</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1" office:value-type="string" calcext:value-type="string">
            <text:p>The Thing - Yancy Street Charge, Black Cat - Mento-Fish, Namor - Horn of Proteus,</text:p>
          </table:table-cell>
          <table:table-cell table:style-name="ce2" table:number-columns-repeated="23"/>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OBJECTION!</text:p>
          </table:table-cell>
          <table:table-cell table:style-name="ce1" office:value-type="string" calcext:value-type="string">
            <text:p><text:a xlink:href="https://r.res.easebar.com/pic/20251010/0d23a7fb-886a-4f9c-91ef-22eddd0352a9.png" xlink:type="simple">https://r.res.easebar.com/pic/20251010/0d23a7fb-886a-4f9c-91ef-22eddd0352a9.png</text:a></text:p>
          </table:table-cell>
          <table:table-cell table:style-name="ce1" office:value-type="string" calcext:value-type="string">
            <text:p>Whirl billy clubs in a tight guard to block frontal damage and reflect projectiles, becoming immune to all incoming harm during this stance and gain Fury</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1" office:value-type="string" calcext:value-type="string">
            <text:p>Namor - Horn of Proteus, Scarlet Witch - Chaos Control?, Scarlet Witch - Reality Erasure, Jeff the Land Shark - It's Jeff!,</text:p>
          </table:table-cell>
          <table:table-cell table:style-name="ce2" table:number-columns-repeated="23"/>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DEVIL'S LATCH</text:p>
          </table:table-cell>
          <table:table-cell table:style-name="ce1" office:value-type="string" calcext:value-type="string">
            <text:p><text:a xlink:href="https://r.res.easebar.com/pic/20251010/39ffe656-8f28-43c4-be3d-cc79ed2df6a5.png" xlink:type="simple">https://r.res.easebar.com/pic/20251010/39ffe656-8f28-43c4-be3d-cc79ed2df6a5.png</text:a></text:p>
          </table:table-cell>
          <table:table-cell table:style-name="ce1" office:value-type="string" calcext:value-type="string">
            <text:p>Fire a grappling line that reels Daredevil and his target toward each other. On completion, gain Fury and temporarily enables Cross Interrogation</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1" office:value-type="string" calcext:value-type="string">
            <text:p>The Thing - Yancy Street Charge, Black Cat - Mento-Fish, The Thing - Unyielding Will, Mister Fantastic - Distended Grip, Namor - Horn of Proteus, Magik - Stepping Discs, Iron Fist - Dragon's Defense, Star-Lord - Stellar Shift, Hulk - HULK SMASH!, Hulk - Indestructible Guard, Hulk - World Breaker,</text:p>
          </table:table-cell>
          <table:table-cell table:style-name="ce2" table:number-columns-repeated="23"/>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INFERNAL FURY</text:p>
          </table:table-cell>
          <table:table-cell table:style-name="ce1" office:value-type="string" calcext:value-type="string">
            <text:p><text:a xlink:href="https://r.res.easebar.com/pic/20251010/e0e39493-ba93-4947-a38f-7d86f314b48b.png" xlink:type="simple">https://r.res.easebar.com/pic/20251010/e0e39493-ba93-4947-a38f-7d86f314b48b.png</text:a></text:p>
          </table:table-cell>
          <table:table-cell table:style-name="ce1" office:value-type="string" calcext:value-type="string">
            <text:p>Expend Fury to unleash Devil's Chain or Devil's Throw. Devil's Chain converts damage into Bonus Health, while Devil's Throw Slows enemies on hit and temporarily enables Cross Interrogation</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2" table:number-columns-repeated="24"/>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Sonic Pursuit</text:p>
          </table:table-cell>
          <table:table-cell table:style-name="ce1" office:value-type="string" calcext:value-type="string">
            <text:p><text:a xlink:href="https://r.res.easebar.com/pic/20251010/041a40d0-92c7-4a69-9ddd-92af7dbaf73f.png" xlink:type="simple">https://r.res.easebar.com/pic/20251010/041a40d0-92c7-4a69-9ddd-92af7dbaf73f.png</text:a></text:p>
          </table:table-cell>
          <table:table-cell table:style-name="ce1" office:value-type="string" calcext:value-type="string">
            <text:p>Locks onto a target, gaining increased Speed; and Damage Reduction when attacked. While in range, dash to the target, Blinding them and restore Fury</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1" office:value-type="string" calcext:value-type="string">
            <text:p>Blade - Daywalker Dash, Phoenix - Telepathic Illusion, Emma Frost - Carbon Crush, The Thing - Yancy Street Charge, Black Cat - Mento-Fish, Squirrel Girl - Squirrel Blockade, Black Widow - Edge Dancer, Black Widow - Electro-Plasma Explosion, Iron Fist - Yat Jee Chung Kuen, Hawkeye - Blast Arrow,Hawkeye - Crescent Slash, Cloak&amp;Dagger - Terror Cape, Cloak&amp;Dagger - Dark Teleportation, Namor - Horn of Proteus, Hela - Soul Drainer, The Punisher - Culling Turret, </text:p>
          </table:table-cell>
          <table:table-cell table:style-name="ce2" table:number-columns-repeated="23"/>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RADAR SENSE</text:p>
          </table:table-cell>
          <table:table-cell table:style-name="ce1" office:value-type="string" calcext:value-type="string">
            <text:p><text:a xlink:href="https://r.res.easebar.com/pic/20251010/1dd21aa7-df86-4264-9861-76e20570a272.png" xlink:type="simple">https://r.res.easebar.com/pic/20251010/1dd21aa7-df86-4264-9861-76e20570a272.png</text:a></text:p>
          </table:table-cell>
          <table:table-cell table:style-name="ce1" office:value-type="string" calcext:value-type="string">
            <text:p>Detect enemy movements within a set radius</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1" office:value-type="string" calcext:value-type="string">
            <text:p>Cloak&amp;Dagger - Terror Cape, Cloak&amp;Dagger - Dark Teleportation, The Punisher - Scourge Grenade?,</text:p>
          </table:table-cell>
          <table:table-cell table:style-name="ce2" table:number-columns-repeated="23"/>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BLIND ASCENT</text:p>
          </table:table-cell>
          <table:table-cell table:style-name="ce1" office:value-type="string" calcext:value-type="string">
            <text:p><text:a xlink:href="https://r.res.easebar.com/pic/20251010/ce9cbf4e-0c10-4fbe-bd57-af7eada7b84e.png" xlink:type="simple">https://r.res.easebar.com/pic/20251010/ce9cbf4e-0c10-4fbe-bd57-af7eada7b84e.png</text:a></text:p>
          </table:table-cell>
          <table:table-cell table:style-name="ce1" office:value-type="string" calcext:value-type="string">
            <text:p>Run along walls and spring off them to reposition</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1" office:value-type="string" calcext:value-type="string">
            <text:p>Mantis - Spore Slumber, Luna Snow - Ice Arts, Phoenix - Telekinesis Burst, Emma Frost - Carbon Crush, Emma Frost - Crystal Kick, The Thing - Yancy Street Charge, Invisible Woman - Force Physics, Mister Fantastic - Distended Grip, Mister Fantastic - Flexible Elongation, Squirrel Girl - Squirrel Blockade, Iron Fist - Yat Jee Chung Kuen, Winter Soldier - Trooper's Fist, Winter Soldier - Bionic Hook, Spider-man - Get Over Here!, Hela - Soul Drainer, Storm - Omega Hurricane, Angela - Assassins Charge, Blade - Daywalker Dash, Winter Soldier - Tainted Voltage,</text:p>
          </table:table-cell>
          <table:table-cell table:style-name="ce2" table:number-columns-repeated="23"/>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LET THE DEVIL OUT</text:p>
          </table:table-cell>
          <table:table-cell table:style-name="ce1" office:value-type="string" calcext:value-type="string">
            <text:p><text:a xlink:href="https://r.res.easebar.com/pic/20251010/0aa73672-4753-4c5d-9f39-e501bd6dbbae.png" xlink:type="simple">https://r.res.easebar.com/pic/20251010/0aa73672-4753-4c5d-9f39-e501bd6dbbae.png</text:a></text:p>
          </table:table-cell>
          <table:table-cell table:style-name="ce1" office:value-type="string" calcext:value-type="string">
            <text:p>Embrace the Beast within. Enemies in Daredevil's line of sight take damage and suffer a ramping Blind effect. Continually gain Fury while active</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1" office:value-type="string" calcext:value-type="string">
            <text:p><text:span text:style-name="T1">Mantis - Soul Resurgence, Luna Snow - Fate of Both Worlds, Mantis - Spore Slumber, Luna Snow - Ice Arts, Angela - Assassin's Charge, Ultron - Rage of Ultron, Mister Fantastic - Reflexive Rubber, Psylocke - Dance of the Butterfly, Iron Man - Invincible Pulse Cannon, Moon Knight - Hand of Khonshu, Moon Knight - Ancient Ankh, Namor - Horn of Proteus, Star-Lord - Galactic Legend, Storm - Omega Hurricane, Storm - Goddess Boost, Hulk - HULK SMASH!, Hulk - Indestructible Guard, Hulk - World Breaker, Jeff the Land Shark - It's Jeff!, Jeff the Land Shark - Hide and Seek, The Punisher - Culling Turret, Adam Warlock - Karmic Revival, Adam Warlock - Regenerative Cocoon,</text:span> </text:p>
          </table:table-cell>
          <table:table-cell table:style-name="ce1" office:value-type="string" calcext:value-type="string">
            <text:p>If Daredevil choses to jump the entire team with this ult he's basically asking the entire team to focus him and he usually doesn't walk away from that. As long as you are not alone, all you have to do is look away to gain some sight back and then refocus him to wear him down and make him want to leave.</text:p>
          </table:table-cell>
          <table:table-cell table:style-name="ce2" table:number-columns-repeated="22"/>
          <table:table-cell table:number-columns-repeated="16355"/>
        </table:table-row>
        <table:table-row table:style-name="ro1">
          <table:table-cell table:style-name="ce1" office:value-type="string" calcext:value-type="string">
            <text:p>Daredevil</text:p>
          </table:table-cell>
          <table:table-cell table:style-name="ce1" office:value-type="string" calcext:value-type="string">
            <text:p>BLIND VERDICT</text:p>
          </table:table-cell>
          <table:table-cell table:style-name="ce1" office:value-type="string" calcext:value-type="string">
            <text:p><text:a xlink:href="https://r.res.easebar.com/pic/20251010/b101bc7c-3d49-48dc-a02a-7e13cba90108.png" xlink:type="simple">https://r.res.easebar.com/pic/20251010/b101bc7c-3d49-48dc-a02a-7e13cba90108.png</text:a></text:p>
          </table:table-cell>
          <table:table-cell table:style-name="ce1" office:value-type="string" calcext:value-type="string">
            <text:p>Daredevil shares the location of his Sonic Pursuit target with The Punisher. At the same time, The Punisher can launch a devil-infused shock grenade to damage and blind enemies</text:p>
          </table:table-cell>
          <table:table-cell table:style-name="ce1" office:value-type="string" calcext:value-type="string">
            <text:p><text:a xlink:href="https://www.marvelrivals.com/20251009/41360_1263889.html" xlink:type="simple">https://www.marvelrivals.com/20251009/41360_1263889.html</text:a></text:p>
          </table:table-cell>
          <table:table-cell table:style-name="ce2" table:number-columns-repeated="24"/>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Spear of Ichors</text:p>
          </table:table-cell>
          <table:table-cell table:style-name="ce1" office:value-type="string" calcext:value-type="string">
            <text:p><text:a xlink:href="https://r.res.easebar.com/pic/20250911/5a3ec9ee-6a3b-44ac-b64c-ebb34f28c425.png" xlink:type="simple">https://r.res.easebar.com/pic/20250911/5a3ec9ee-6a3b-44ac-b64c-ebb34f28c425.png</text:a></text:p>
          </table:table-cell>
          <table:table-cell table:style-name="ce1" office:value-type="string" calcext:value-type="string">
            <text:p>Lunge forward with your spear, dealing damage that increases with Attack Charge. At full charge, Spear of Ichor can launch up enemies</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2" table:number-columns-repeated="24"/>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Axes Of Ichors</text:p>
          </table:table-cell>
          <table:table-cell table:style-name="ce1" office:value-type="string" calcext:value-type="string">
            <text:p><text:a xlink:href="https://r.res.easebar.com/pic/20250911/6e3c4ad4-32a2-4140-83f3-03e236885da2.png" xlink:type="simple">https://r.res.easebar.com/pic/20250911/6e3c4ad4-32a2-4140-83f3-03e236885da2.png</text:a></text:p>
          </table:table-cell>
          <table:table-cell table:style-name="ce1" office:value-type="string" calcext:value-type="string">
            <text:p>Alternate powerful strikes forward with twin axes, dealing increased damage as Attack Charge grows. The fourth strike propels you forward in a swift dash</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2" table:number-columns-repeated="24"/>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SHIELDED STANCE</text:p>
          </table:table-cell>
          <table:table-cell table:style-name="ce1" office:value-type="string" calcext:value-type="string">
            <text:p><text:a xlink:href="https://r.res.easebar.com/pic/20250911/89c12b85-cd4c-4d3e-a6b8-b628c6de8eba.png" xlink:type="simple">https://r.res.easebar.com/pic/20250911/89c12b85-cd4c-4d3e-a6b8-b628c6de8eba.png</text:a></text:p>
          </table:table-cell>
          <table:table-cell table:style-name="ce1" office:value-type="string" calcext:value-type="string">
            <text:p>Transform Ichors into a shield, gaining Attack Charge when absorbing damage</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1" office:value-type="string" calcext:value-type="string">
            <text:p>Phoenix - Endsong Inferno, Ultron - Imperative: Patch, Mister Fantastic - Elastic Strength, Hawkeye - Hypersonic Arrow,</text:p>
          </table:table-cell>
          <table:table-cell table:style-name="ce2" table:number-columns-repeated="23"/>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Seraphic Soar</text:p>
          </table:table-cell>
          <table:table-cell table:style-name="ce1" office:value-type="string" calcext:value-type="string">
            <text:p><text:a xlink:href="https://r.res.easebar.com/pic/20250911/06ebb164-e0fe-494a-bfe9-58c81de0d369.png" xlink:type="simple">https://r.res.easebar.com/pic/20250911/06ebb164-e0fe-494a-bfe9-58c81de0d369.png</text:a></text:p>
          </table:table-cell>
          <table:table-cell table:style-name="ce1" office:value-type="string" calcext:value-type="string">
            <text:p>Glide freely through the air. Continuous flight builds Attack Charge</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1" office:value-type="string" calcext:value-type="string">
            <text:p>The Thing - Yancy Street Charge, Black Cat - Mento-Fish, The Thing - Stone Haymaker, Invisible Woman - Psionic Vortex, Mister Fantastic - Distended Grip, Squirrel Girl - Squirrel Blockade, Iron Fist - Yat Jee Chung Kuen, Hawkeye - Crescent Slash, Hawkeye - Hypersonic Arrow, Namor - Horn of Proteus, Winter Soldier - Tainted Voltage, Winter Soldier - Bionic Hook, Hela - Nightsword Thorn, Storm - Omega Hurricane, Storm - Goddess Boost, Hulk - Incredible Leap, Jeff the Land Shark - Aqua Burst,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Divine Judgement</text:p>
          </table:table-cell>
          <table:table-cell table:style-name="ce1" office:value-type="string" calcext:value-type="string">
            <text:p><text:a xlink:href="https://r.res.easebar.com/pic/20250911/4738a04f-deef-40f5-9e53-51c71b8dcaa7.png" xlink:type="simple">https://r.res.easebar.com/pic/20250911/4738a04f-deef-40f5-9e53-51c71b8dcaa7.png</text:a></text:p>
          </table:table-cell>
          <table:table-cell table:style-name="ce1" office:value-type="string" calcext:value-type="string">
            <text:p>Dive downward, switch to twin axes and infuse the ground with Ichors to create a Divine Judgement Zone upon impact. Within the zone, gain enhanced Speed and attacks grant Bonus Health to self and nearby allies</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1" office:value-type="string" calcext:value-type="string">
            <text:p>Phoenix - Telepathic Illusion,</text:p>
          </table:table-cell>
          <table:table-cell table:style-name="ce2" table:number-columns-repeated="23"/>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Wingblade Ascent</text:p>
          </table:table-cell>
          <table:table-cell table:style-name="ce1" office:value-type="string" calcext:value-type="string">
            <text:p><text:a xlink:href="https://r.res.easebar.com/pic/20250911/32ac3b89-8941-4ee9-9b81-fd14fdfff36b.png" xlink:type="simple">https://r.res.easebar.com/pic/20250911/32ac3b89-8941-4ee9-9b81-fd14fdfff36b.png</text:a></text:p>
          </table:table-cell>
          <table:table-cell table:style-name="ce1" office:value-type="string" calcext:value-type="string">
            <text:p>Take to the skies, switching back to Spear of Ichors</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1" office:value-type="string" calcext:value-type="string">
            <text:p>Phoenix - Telekinesis Burst,</text:p>
          </table:table-cell>
          <table:table-cell table:style-name="ce2" table:number-columns-repeated="23"/>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Assassin's Charge</text:p>
          </table:table-cell>
          <table:table-cell table:style-name="ce1" office:value-type="string" calcext:value-type="string">
            <text:p><text:a xlink:href="https://r.res.easebar.com/pic/20250911/dc923ca4-e2a4-4448-92e0-cae6d029e5f1.png" xlink:type="simple">https://r.res.easebar.com/pic/20250911/dc923ca4-e2a4-4448-92e0-cae6d029e5f1.png</text:a></text:p>
          </table:table-cell>
          <table:table-cell table:style-name="ce1" office:value-type="string" calcext:value-type="string">
            <text:p>Enter an accelerated dash state, enemies struck head-on are carried through the air for a short distance</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1" office:value-type="string" calcext:value-type="string">
            <text:p>Phoenix - Telepathic Illusion, Phoenix - Telekinesis Burst, Emma Frost - Carbon Crush, Emma Frost - Diamond Form, The Thing - Yancy Street Charge, Black Cat - Mento-Fish, The Thing - Unyielding Will, Squirrel Girl - Tail Bounce, Squirrel Girl - Squirrel Blockade,Hawkeye - Crescent Slash, Hawkeye - Hypersonic Arrow, Moon Knight - Ancient Ankh, Winter Soldier - Trooper's Fist, Winter Soldier - Tainted Voltage, Winter Soldier - Bionic Hook, Magik - Stepping Discs, Iron Fist - Dragon's Defense, Star-Lord - Stellar Shift, Spider-man - Get Over Here!, Hela - Soul Drainer, Hulk - HULK SMASH!, Hulk - Indestructible Guard, Hulk - World Breaker, Jeff the Land Shark - Hide and Seek, The Punisher - Culling Turret, The Punisher - Final Judgement, Luna Snow - Ice Arts,</text:p>
          </table:table-cell>
          <table:table-cell table:style-name="ce1" office:value-type="string" calcext:value-type="string">
            <text:p>A simple Earthbound will have Angela moving slower than her regular Seraphic Soar speed, and she does not have enough health to be moving that slow. She can't even get on foot with her Divine Judgement.</text:p>
          </table:table-cell>
          <table:table-cell table:style-name="ce2" table:number-columns-repeated="22"/>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Heven's Retribution</text:p>
          </table:table-cell>
          <table:table-cell table:style-name="ce1" office:value-type="string" calcext:value-type="string">
            <text:p><text:a xlink:href="https://r.res.easebar.com/pic/20250911/0240ecc1-d434-46cc-82ba-abdae0c275ef.png" xlink:type="simple">https://r.res.easebar.com/pic/20250911/0240ecc1-d434-46cc-82ba-abdae0c275ef.png</text:a></text:p>
          </table:table-cell>
          <table:table-cell table:style-name="ce1" office:value-type="string" calcext:value-type="string">
            <text:p>Wrap your spear in ribbons and hurl it with force. Upon impact, the ribbons bind nearby enemies. Angela can leap to the spear's location, damaging surrounding enemies and creating a Divine Judgement Zone</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1" office:value-type="string" calcext:value-type="string">
            <text:p>Blade - Scarlet Shroud, Phoenix - Endsong Inferno, Phoenix - Telepathic Illusion, Ultron - Rage of Ultron, Mister Fantastic - Reflexive Rubber, Cloak&amp;Dagger - Eternal Bond, Cloak&amp;Dagger - Dagger Storm, Psylocke - Dance of the Butterfly, Iron Man - Invincible Pulse Cannon, Moon Knight - Hand of Khonshu, Magik - Stepping Discs, Iron Fist - Dragon's Defense, Star-Lord - Stellar Shift, Spider-man - Spectacular Spin, Hulk - HULK SMASH!, Hulk - Indestructible Guard, Hulk - World Breaker, Jeff the Land Shark - It's Jeff!, Jeff the Land Shark - Hide and Seek, The Punisher - Culling Turret, The Punisher - Final Judgement, Luna Snow - Fate of Both Worlds,</text:p>
          </table:table-cell>
          <table:table-cell table:style-name="ce2" table:number-columns-repeated="23"/>
          <table:table-cell table:number-columns-repeated="16355"/>
        </table:table-row>
        <table:table-row table:style-name="ro1">
          <table:table-cell table:style-name="ce1" office:value-type="string" calcext:value-type="string">
            <text:p>ANGELA</text:p>
          </table:table-cell>
          <table:table-cell table:style-name="ce1" office:value-type="string" calcext:value-type="string">
            <text:p>Celestial Command</text:p>
          </table:table-cell>
          <table:table-cell table:style-name="ce1" office:value-type="string" calcext:value-type="string">
            <text:p><text:a xlink:href="https://r.res.easebar.com/pic/20250911/9761dd6e-a640-43f4-84d0-db6613e412ad.png" xlink:type="simple">https://r.res.easebar.com/pic/20250911/9761dd6e-a640-43f4-84d0-db6613e412ad.png</text:a></text:p>
          </table:table-cell>
          <table:table-cell table:style-name="ce1" office:value-type="string" calcext:value-type="string">
            <text:p>Angela shares fragments of her Ichors with Thor, empowering him to hurl a Thunder Spear that restores Thorforce for each enemy struck. Afterward, Thor can leap to the spear's explosion point, dealing a second wave of damage to all enemies within range</text:p>
          </table:table-cell>
          <table:table-cell table:style-name="ce1" office:value-type="string" calcext:value-type="string">
            <text:p><text:a xlink:href="https://www.marvelrivals.com/20250911/41360_1258873.html" xlink:type="simple">https://www.marvelrivals.com/20250911/41360_1258873.html</text:a></text:p>
          </table:table-cell>
          <table:table-cell table:style-name="ce2" table:number-columns-repeated="24"/>
          <table:table-cell table:number-columns-repeated="16355"/>
        </table:table-row>
        <table:table-row table:style-name="ro1">
          <table:table-cell table:style-name="ce1" office:value-type="string" calcext:value-type="string">
            <text:p>BLADE</text:p>
          </table:table-cell>
          <table:table-cell table:style-name="ce1" office:value-type="string" calcext:value-type="string">
            <text:p>Ancestral Sword</text:p>
          </table:table-cell>
          <table:table-cell table:style-name="ce1" office:value-type="string" calcext:value-type="string">
            <text:p><text:a xlink:href="https://r.res.easebar.com/pic/20250808/7fbc426f-d5a0-4566-9d1f-00f79ad25bc3.png" xlink:type="simple">https://r.res.easebar.com/pic/20250808/7fbc426f-d5a0-4566-9d1f-00f79ad25bc3.png</text:a></text:p>
          </table:table-cell>
          <table:table-cell table:style-name="ce1" office:value-type="string" calcext:value-type="string">
            <text:p>Slash forward with Blade's Ancestral Sword</text:p>
          </table:table-cell>
          <table:table-cell table:style-name="ce1" office:value-type="string" calcext:value-type="string">
            <text:p><text:a xlink:href="https://www.marvelrivals.com/20250808/41360_1252733.html" xlink:type="simple">https://www.marvelrivals.com/20250808/41360_1252733.html</text:a></text:p>
          </table:table-cell>
          <table:table-cell table:style-name="ce1" office:value-type="string" calcext:value-type="string">
            <text:p>Mantis - Spore Slumber, Luna Snow - Ice Arts, Hawkeye - Piercing Arrow, Hawkeye - Blast Arrow, Hawkeye - Ronin Slash,</text:p>
          </table:table-cell>
          <table:table-cell table:style-name="ce2" table:number-columns-repeated="23"/>
          <table:table-cell table:number-columns-repeated="16355"/>
        </table:table-row>
        <table:table-row table:style-name="ro1">
          <table:table-cell table:style-name="ce1" office:value-type="string" calcext:value-type="string">
            <text:p>BLADE</text:p>
          </table:table-cell>
          <table:table-cell table:style-name="ce1" office:value-type="string" calcext:value-type="string">
            <text:p>Hunter's Shotgun</text:p>
          </table:table-cell>
          <table:table-cell table:style-name="ce1" office:value-type="string" calcext:value-type="string">
            <text:p><text:a xlink:href="https://r.res.easebar.com/pic/20250808/2b532b79-61a8-4300-98a8-5cbaa4f5a29b.png" xlink:type="simple">https://r.res.easebar.com/pic/20250808/2b532b79-61a8-4300-98a8-5cbaa4f5a29b.png</text:a></text:p>
          </table:table-cell>
          <table:table-cell table:style-name="ce1" office:value-type="string" calcext:value-type="string">
            <text:p>Fire at enemies using your Shotgun</text:p>
          </table:table-cell>
          <table:table-cell table:style-name="ce1" office:value-type="string" calcext:value-type="string">
            <text:p><text:a xlink:href="https://www.marvelrivals.com/20250808/41360_1252733.html" xlink:type="simple">https://www.marvelrivals.com/20250808/41360_125273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BLADE</text:p>
          </table:table-cell>
          <table:table-cell table:style-name="ce1" office:value-type="string" calcext:value-type="string">
            <text:p>Scarlet Shroud</text:p>
          </table:table-cell>
          <table:table-cell table:style-name="ce1" office:value-type="string" calcext:value-type="string">
            <text:p><text:a xlink:href="https://r.res.easebar.com/pic/20250808/38dda78b-768c-421d-a971-772db41ee3dd.png" xlink:type="simple">https://r.res.easebar.com/pic/20250808/38dda78b-768c-421d-a971-772db41ee3dd.png</text:a></text:p>
          </table:table-cell>
          <table:table-cell table:style-name="ce1" office:value-type="string" calcext:value-type="string">
            <text:p>Parry with Ancestral Sword to become Unstoppable for a brief period, reducing damage taken from the front and decreasing the cooldown of Daywalker Dash</text:p>
          </table:table-cell>
          <table:table-cell table:style-name="ce1" office:value-type="string" calcext:value-type="string">
            <text:p><text:a xlink:href="https://www.marvelrivals.com/20250808/41360_1252733.html" xlink:type="simple">https://www.marvelrivals.com/20250808/41360_1252733.html</text:a></text:p>
          </table:table-cell>
          <table:table-cell table:style-name="ce1" office:value-type="string" calcext:value-type="string">
            <text:p>Psylocke - Dance of the Butterfly, Hawkeye - Hunter's Sight, Namor - Horn of Proteus?, Scarlet Witch - Reality Erasure, Scarlet Witch - Dark Seal,</text:p>
          </table:table-cell>
          <table:table-cell table:style-name="ce2" table:number-columns-repeated="23"/>
          <table:table-cell table:number-columns-repeated="16355"/>
        </table:table-row>
        <table:table-row table:style-name="ro1">
          <table:table-cell table:style-name="ce1" office:value-type="string" calcext:value-type="string">
            <text:p>BLADE</text:p>
          </table:table-cell>
          <table:table-cell table:style-name="ce1" office:value-type="string" calcext:value-type="string">
            <text:p>Bloodline Awakening</text:p>
          </table:table-cell>
          <table:table-cell table:style-name="ce1" office:value-type="string" calcext:value-type="string">
            <text:p><text:a xlink:href="https://r.res.easebar.com/pic/20250808/407381d7-9280-4cfc-9f6e-2dac3d07e0ce.png" xlink:type="simple">https://r.res.easebar.com/pic/20250808/407381d7-9280-4cfc-9f6e-2dac3d07e0ce.png</text:a></text:p>
          </table:table-cell>
          <table:table-cell table:style-name="ce1" office:value-type="string" calcext:value-type="string">
            <text:p>Awaken the Dhampir bloodline, enhancing slash speed during continuous attacks and triggering Whirlwind Slash.If all Whirlwind Slash strikes hit, your Attack Speed will further increase. While under this state, you suffer Reduced Healing, but attacks gain Lifesteal</text:p>
          </table:table-cell>
          <table:table-cell table:style-name="ce1" office:value-type="string" calcext:value-type="string">
            <text:p><text:a xlink:href="https://www.marvelrivals.com/20250808/41360_1252733.html" xlink:type="simple">https://www.marvelrivals.com/20250808/41360_1252733.html</text:a></text:p>
          </table:table-cell>
          <table:table-cell table:style-name="ce1" office:value-type="string" calcext:value-type="string">
            <text:p>Blade - Daywalker Dash, Black Widow - Electro-Plasma Explosion, Black Widow - Edge Dancer,</text:p>
          </table:table-cell>
          <table:table-cell table:style-name="ce1" office:value-type="string" calcext:value-type="string">
            <text:p>The best way to deal with this ability hands down is with Hulk or Magento Bubbles, Blade will have to break the bubbles before he can start to receive the lifesteal, and by that point he's hopefully lost health from your attacks all while not being able to get significant heal from his allies</text:p>
          </table:table-cell>
          <table:table-cell table:style-name="ce1" office:value-type="string" calcext:value-type="string">
            <text:p>Hulk, Magneto, </text:p>
          </table:table-cell>
          <table:table-cell table:style-name="ce2" table:number-columns-repeated="21"/>
          <table:table-cell table:number-columns-repeated="16355"/>
        </table:table-row>
        <table:table-row table:style-name="ro1">
          <table:table-cell table:style-name="ce1" office:value-type="string" calcext:value-type="string">
            <text:p>BLADE</text:p>
          </table:table-cell>
          <table:table-cell table:style-name="ce1" office:value-type="string" calcext:value-type="string">
            <text:p>Daywalker Dash</text:p>
          </table:table-cell>
          <table:table-cell table:style-name="ce1" office:value-type="string" calcext:value-type="string">
            <text:p><text:a xlink:href="https://r.res.easebar.com/pic/20250808/317a7483-cdd2-4114-9fed-861f7973e7cf.png" xlink:type="simple">https://r.res.easebar.com/pic/20250808/317a7483-cdd2-4114-9fed-861f7973e7cf.png</text:a></text:p>
          </table:table-cell>
          <table:table-cell table:style-name="ce1" office:value-type="string" calcext:value-type="string">
            <text:p>Dash forward. If wielding your gun, shoot at enemies upon impact, applying a Healing Reduction effect. If wielding your sword, deliver a cleaving strike that inflicts Slow</text:p>
          </table:table-cell>
          <table:table-cell table:style-name="ce1" office:value-type="string" calcext:value-type="string">
            <text:p><text:a xlink:href="https://www.marvelrivals.com/20250808/41360_1252733.html" xlink:type="simple">https://www.marvelrivals.com/20250808/41360_1252733.html</text:a></text:p>
          </table:table-cell>
          <table:table-cell table:style-name="ce1" office:value-type="string" calcext:value-type="string">
            <text:p>Phoenix - Telepathic Illusion, Phoenix - Telekinesis Burst, Emma Frost - Carbon Crush, Mister Fantastic - Distended Grip, Squirrel Girl - Squirrel Blockade, Iron Fist - Dragon's Defense, Moon Knight - Ancient Ankh, Magik - Stepping Discs,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BLADE</text:p>
          </table:table-cell>
          <table:table-cell table:style-name="ce1" office:value-type="string" calcext:value-type="string">
            <text:p>Thousand-Fold Slash</text:p>
          </table:table-cell>
          <table:table-cell table:style-name="ce1" office:value-type="string" calcext:value-type="string">
            <text:p><text:a xlink:href="https://r.res.easebar.com/pic/20250808/76a3bf21-fa7d-46b9-af37-db2c078fda6f.png" xlink:type="simple">https://r.res.easebar.com/pic/20250808/76a3bf21-fa7d-46b9-af37-db2c078fda6f.png</text:a></text:p>
          </table:table-cell>
          <table:table-cell table:style-name="ce1" office:value-type="string" calcext:value-type="string">
            <text:p>Charge power and swiftly draw the Sword of Dracula, executing a powerful Iaido strike as you dash forward, leaving behind a slashing zone where the sword automatically strikes enemies. Enemies hit suffer Reduced Healing</text:p>
          </table:table-cell>
          <table:table-cell table:style-name="ce1" office:value-type="string" calcext:value-type="string">
            <text:p><text:a xlink:href="https://www.marvelrivals.com/20250808/41360_1252733.html" xlink:type="simple">https://www.marvelrivals.com/20250808/41360_1252733.html</text:a></text:p>
          </table:table-cell>
          <table:table-cell table:style-name="ce1" office:value-type="string" calcext:value-type="string">
            <text:p>Mantis - Spore Slumber, Luna Snow - Ice Arts, Phoenix - Telepathic Illusion, Phoenix - Telekinesis Burst, Ultron - Rage of Ultron, Emma Frost - Carbon Crush, Mister Fantastic - Reflexive Rubber, Iron Fist - Dragon's Defense, Psylocke - Dance of the Butterfly, Moon Knight - Hand of Khonshu, Namor - Blessing of the Deep, Winter Soldier - Trooper's Fist, Winter Soldier - Bionic Hook, Magik - Stepping Discs, Star-Lord - Stellar Shift, Spider-man - Get Over Here!, Luna Snow - Fate of Both Worlds,</text:p>
          </table:table-cell>
          <table:table-cell table:style-name="ce2" table:number-columns-repeated="23"/>
          <table:table-cell table:number-columns-repeated="16355"/>
        </table:table-row>
        <table:table-row table:style-name="ro1">
          <table:table-cell table:style-name="ce1" office:value-type="string" calcext:value-type="string">
            <text:p>BLADE</text:p>
          </table:table-cell>
          <table:table-cell table:style-name="ce1" office:value-type="string" calcext:value-type="string">
            <text:p>ECLIPSE EDGE</text:p>
          </table:table-cell>
          <table:table-cell table:style-name="ce1" office:value-type="string" calcext:value-type="string">
            <text:p><text:a xlink:href="https://r.res.easebar.com/pic/20251115/103c790d-0d19-45e9-aad0-3a5ca92c2313.png" xlink:type="simple">https://r.res.easebar.com/pic/20251115/103c790d-0d19-45e9-aad0-3a5ca92c2313.png</text:a></text:p>
          </table:table-cell>
          <table:table-cell table:style-name="ce1" office:value-type="string" calcext:value-type="string">
            <text:p>Blessed by Khonshu, Blade gains a new ability. When activated, Blade swings his Ancestral Sword in a powerful slash, dashing forward a short distance. At the end of the dash, he swiftly slashes four times, each strike sending a Darkmoon Blade forward. When a Darkmoon Blade hits an enemy, it bounces to nearby targets</text:p>
          </table:table-cell>
          <table:table-cell table:style-name="ce1" office:value-type="string" calcext:value-type="string">
            <text:p><text:a xlink:href="https://www.marvelrivals.com/20250808/41360_1252733.html" xlink:type="simple">https://www.marvelrivals.com/20250808/41360_1252733.html</text:a></text:p>
          </table:table-cell>
          <table:table-cell table:style-name="ce2" table:number-columns-repeated="24"/>
          <table:table-cell table:number-columns-repeated="16355"/>
        </table:table-row>
        <table:table-row table:style-name="ro1">
          <table:table-cell table:style-name="ce1" office:value-type="string" calcext:value-type="string">
            <text:p>PHOENIX</text:p>
          </table:table-cell>
          <table:table-cell table:style-name="ce1" office:value-type="string" calcext:value-type="string">
            <text:p>Cosmic Flames</text:p>
          </table:table-cell>
          <table:table-cell table:style-name="ce1" office:value-type="string" calcext:value-type="string">
            <text:p><text:a xlink:href="https://r.res.easebar.com/pic/20250710/e458821f-fbdc-4505-8407-0eafe85f5a22.png" xlink:type="simple">https://r.res.easebar.com/pic/20250710/e458821f-fbdc-4505-8407-0eafe85f5a22.png</text:a></text:p>
          </table:table-cell>
          <table:table-cell table:style-name="ce1" office:value-type="string" calcext:value-type="string">
            <text:p>Launch a fiery projectile forward, applying 1 Spark to enemies hit. Critical hits apply 2 Sparks. At 3 Sparks, Phoenix triggers a fiery explosion that applies 1 Spark to enemies around and Healing Over Time to self. Sparks from explosions will not stack within a brief period</text:p>
          </table:table-cell>
          <table:table-cell table:style-name="ce1" office:value-type="string" calcext:value-type="string">
            <text:p><text:a xlink:href="https://www.marvelrivals.com/20250710/41360_1246363.html" xlink:type="simple">https://www.marvelrivals.com/20250710/41360_124636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 Star-Lord - Blaster Barrage,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PHOENIX</text:p>
          </table:table-cell>
          <table:table-cell table:style-name="ce1" office:value-type="string" calcext:value-type="string">
            <text:p>Telekinesis Burst</text:p>
          </table:table-cell>
          <table:table-cell table:style-name="ce1" office:value-type="string" calcext:value-type="string">
            <text:p><text:a xlink:href="https://r.res.easebar.com/pic/20250710/986f26e7-7141-4dc9-90ac-acff1b8c380a.png" xlink:type="simple">https://r.res.easebar.com/pic/20250710/986f26e7-7141-4dc9-90ac-acff1b8c380a.png</text:a></text:p>
          </table:table-cell>
          <table:table-cell table:style-name="ce1" office:value-type="string" calcext:value-type="string">
            <text:p>Mark a targeted area with psionic energy, followed by a series of fiery explosions. The first blast Stuns enemies, while the subsequent two explosions inflict Slow. Applies 1 Spark to enemies hit</text:p>
          </table:table-cell>
          <table:table-cell table:style-name="ce1" office:value-type="string" calcext:value-type="string">
            <text:p><text:a xlink:href="https://www.marvelrivals.com/20250710/41360_1246363.html" xlink:type="simple">https://www.marvelrivals.com/20250710/41360_1246363.html</text:a></text:p>
          </table:table-cell>
          <table:table-cell table:style-name="ce1" office:value-type="string" calcext:value-type="string">
            <text:p>Blade - Daywalker Dash,</text:p>
          </table:table-cell>
          <table:table-cell table:style-name="ce2" table:number-columns-repeated="23"/>
          <table:table-cell table:number-columns-repeated="16355"/>
        </table:table-row>
        <table:table-row table:style-name="ro1">
          <table:table-cell table:style-name="ce1" office:value-type="string" calcext:value-type="string">
            <text:p>PHOENIX</text:p>
          </table:table-cell>
          <table:table-cell table:style-name="ce1" office:value-type="string" calcext:value-type="string">
            <text:p>Dark Ascent</text:p>
          </table:table-cell>
          <table:table-cell table:style-name="ce1" office:value-type="string" calcext:value-type="string">
            <text:p><text:a xlink:href="https://r.res.easebar.com/pic/20250710/7ef4eae3-1354-41eb-ac11-0fefbcd96808.png" xlink:type="simple">https://r.res.easebar.com/pic/20250710/7ef4eae3-1354-41eb-ac11-0fefbcd96808.png</text:a></text:p>
          </table:table-cell>
          <table:table-cell table:style-name="ce1" office:value-type="string" calcext:value-type="string">
            <text:p>Merge with the Phoenix, entering a state of free flight. Gain a Movement Boost</text:p>
          </table:table-cell>
          <table:table-cell table:style-name="ce1" office:value-type="string" calcext:value-type="string">
            <text:p><text:a xlink:href="https://www.marvelrivals.com/20250710/41360_1246363.html" xlink:type="simple">https://www.marvelrivals.com/20250710/41360_1246363.html</text:a></text:p>
          </table:table-cell>
          <table:table-cell table:style-name="ce1" office:value-type="string" calcext:value-type="string">
            <text:p>Phoenix - Telekinesis Burst, The Thing - Yancy Street Charge, Black Cat - Mento-Fish, The Thing - Stone Haymaker, Invisible Woman - Psionic Vortex, Squirrel Girl - Squirrel Blockade, Black Widow - Edge Dancer, Hawkeye - Hypersonic Arrow, Winter Soldier - Trooper's Fist, Winter Soldier - Tainted Voltage, Winter Soldier - Bionic Hook, Spider-man - Get Over Here!, Hela - Nightsword Thorn, Hela - Soul Drainer, Hulk - Incredible Leap,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PHOENIX</text:p>
          </table:table-cell>
          <table:table-cell table:style-name="ce1" office:value-type="string" calcext:value-type="string">
            <text:p>Telepathic Illusion</text:p>
          </table:table-cell>
          <table:table-cell table:style-name="ce1" office:value-type="string" calcext:value-type="string">
            <text:p><text:a xlink:href="https://r.res.easebar.com/pic/20250710/18388d22-1918-4cfe-98e3-7a59f701b1a6.png" xlink:type="simple">https://r.res.easebar.com/pic/20250710/18388d22-1918-4cfe-98e3-7a59f701b1a6.png</text:a></text:p>
          </table:table-cell>
          <table:table-cell table:style-name="ce1" office:value-type="string" calcext:value-type="string">
            <text:p>Leave behind an illusion and instantly teleport in the desired direction, followed by detonating the illusion. Enemies hit are applied with 1 Spark</text:p>
          </table:table-cell>
          <table:table-cell table:style-name="ce1" office:value-type="string" calcext:value-type="string">
            <text:p><text:a xlink:href="https://www.marvelrivals.com/20250710/41360_1246363.html" xlink:type="simple">https://www.marvelrivals.com/20250710/41360_1246363.html</text:a></text:p>
          </table:table-cell>
          <table:table-cell table:style-name="ce1" office:value-type="string" calcext:value-type="string">
            <text:p>The Thing - Yancy Street Charge, Black Cat - Mento-Fish, The Thing - Battle Blitz, The Thing - Stone Haymaker, Squirrel Girl - Squirrel Blockade, Iron Fist - Yat Jee Chung Kuen, Iron Fist - Dragon's Defense,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PHOENIX</text:p>
          </table:table-cell>
          <table:table-cell table:style-name="ce1" office:value-type="string" calcext:value-type="string">
            <text:p>Endsong Inferno</text:p>
          </table:table-cell>
          <table:table-cell table:style-name="ce1" office:value-type="string" calcext:value-type="string">
            <text:p><text:a xlink:href="https://r.res.easebar.com/pic/20250710/4a733ade-7bcc-4152-b3e7-3dc01bfcdb06.png" xlink:type="simple">https://r.res.easebar.com/pic/20250710/4a733ade-7bcc-4152-b3e7-3dc01bfcdb06.png</text:a></text:p>
          </table:table-cell>
          <table:table-cell table:style-name="ce1" office:value-type="string" calcext:value-type="string">
            <text:p>Soar into the sky with the Phoenix and crash down onto a selected area, dealing devastating damage to enemies while creating a shockwave that destroys enemy summons, shields, and any Bonus Health. Enemies hit are applied with 1 Spark</text:p>
          </table:table-cell>
          <table:table-cell table:style-name="ce1" office:value-type="string" calcext:value-type="string">
            <text:p><text:a xlink:href="https://www.marvelrivals.com/20250710/41360_1246363.html" xlink:type="simple">https://www.marvelrivals.com/20250710/41360_1246363.html</text:a></text:p>
          </table:table-cell>
          <table:table-cell table:style-name="ce1" office:value-type="string" calcext:value-type="string">
            <text:p>Blade - Scarlet Shroud, Mister Fantastic - Reflexive Rubber, Wolverine - Regenerative Healing Factor, Cloak&amp;Dagger - Dark Teleportation, Iron Fist - Dragon's Defense, Namor - Blessing of the Deep, Peni Parker - Arachno-Mine, Star-Lord - Stellar Shift, Magik - Stepping Discs, Jeff the Land Shark - It's Jeff!, </text:p>
          </table:table-cell>
          <table:table-cell table:style-name="ce2" table:number-columns-repeated="23"/>
          <table:table-cell table:number-columns-repeated="16355"/>
        </table:table-row>
        <table:table-row table:style-name="ro1">
          <table:table-cell table:style-name="ce1" office:value-type="string" calcext:value-type="string">
            <text:p>PHOENIX</text:p>
          </table:table-cell>
          <table:table-cell table:style-name="ce1" office:value-type="string" calcext:value-type="string">
            <text:p>Mind's Grace</text:p>
          </table:table-cell>
          <table:table-cell table:style-name="ce1" office:value-type="string" calcext:value-type="string">
            <text:p><text:a xlink:href="https://r.res.easebar.com/pic/20250710/89d03be4-06bc-4a67-abb6-f7e95a222760.png" xlink:type="simple">https://r.res.easebar.com/pic/20250710/89d03be4-06bc-4a67-abb6-f7e95a222760.png</text:a></text:p>
          </table:table-cell>
          <table:table-cell table:style-name="ce1" office:value-type="string" calcext:value-type="string">
            <text:p>Jean Grey imbues Wolverine with the awe-inspiring Phoenix Force</text:p>
          </table:table-cell>
          <table:table-cell table:style-name="ce1" office:value-type="string" calcext:value-type="string">
            <text:p><text:a xlink:href="https://www.marvelrivals.com/20250710/41360_1246363.html" xlink:type="simple">https://www.marvelrivals.com/20250710/41360_1246363.html</text:a></text:p>
          </table:table-cell>
          <table:table-cell table:style-name="ce2" table:number-columns-repeated="24"/>
          <table:table-cell table:number-columns-repeated="16355"/>
        </table:table-row>
        <table:table-row table:style-name="ro1">
          <table:table-cell table:style-name="ce1" office:value-type="string" calcext:value-type="string">
            <text:p>Ultron</text:p>
          </table:table-cell>
          <table:table-cell table:style-name="ce1" office:value-type="string" calcext:value-type="string">
            <text:p>ENCEPHALO-RAY</text:p>
          </table:table-cell>
          <table:table-cell table:style-name="ce1" office:value-type="string" calcext:value-type="string">
            <text:p><text:a xlink:href="https://r.res.easebar.com/pic/20250529/71627fa8-a6b2-4c24-b4f3-8cf7f0a195d3.png" xlink:type="simple">https://r.res.easebar.com/pic/20250529/71627fa8-a6b2-4c24-b4f3-8cf7f0a195d3.png</text:a></text:p>
          </table:table-cell>
          <table:table-cell table:style-name="ce1" office:value-type="string" calcext:value-type="string">
            <text:p>Unleash a burning energy beam</text:p>
          </table:table-cell>
          <table:table-cell table:style-name="ce1" office:value-type="string" calcext:value-type="string">
            <text:p><text:a xlink:href="https://www.marvelrivals.com/20250529/41360_1237549.html" xlink:type="simple">https://www.marvelrivals.com/20250529/41360_1237549.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Ultron</text:p>
          </table:table-cell>
          <table:table-cell table:style-name="ce1" office:value-type="string" calcext:value-type="string">
            <text:p>IMPERATIVE: FIREWALL</text:p>
          </table:table-cell>
          <table:table-cell table:style-name="ce1" office:value-type="string" calcext:value-type="string">
            <text:p><text:a xlink:href="https://r.res.easebar.com/pic/20250529/da4eebd7-8dfc-406f-adaf-d02ea613d493.png" xlink:type="simple">https://r.res.easebar.com/pic/20250529/da4eebd7-8dfc-406f-adaf-d02ea613d493.png</text:a></text:p>
          </table:table-cell>
          <table:table-cell table:style-name="ce1" office:value-type="string" calcext:value-type="string">
            <text:p>Deploy drones to an ally marked by Imperative: Patch, granting them increased Speed and Damage. Additionally, all allies within range of you and the chosen teammate receive Bonus Health.</text:p>
          </table:table-cell>
          <table:table-cell table:style-name="ce1" office:value-type="string" calcext:value-type="string">
            <text:p><text:a xlink:href="https://www.marvelrivals.com/20250529/41360_1237549.html" xlink:type="simple">https://www.marvelrivals.com/20250529/41360_1237549.html</text:a></text:p>
          </table:table-cell>
          <table:table-cell table:style-name="ce1" office:value-type="string" calcext:value-type="string">
            <text:p>Angela - Assassin's Charge,</text:p>
          </table:table-cell>
          <table:table-cell table:style-name="ce2" table:number-columns-repeated="23"/>
          <table:table-cell table:number-columns-repeated="16355"/>
        </table:table-row>
        <table:table-row table:style-name="ro1">
          <table:table-cell table:style-name="ce1" office:value-type="string" calcext:value-type="string">
            <text:p>Ultron</text:p>
          </table:table-cell>
          <table:table-cell table:style-name="ce1" office:value-type="string" calcext:value-type="string">
            <text:p>IMPERATIVE: PATCH</text:p>
          </table:table-cell>
          <table:table-cell table:style-name="ce1" office:value-type="string" calcext:value-type="string">
            <text:p><text:a xlink:href="https://r.res.easebar.com/pic/20250529/dd94b605-3f0c-4bfc-9fc5-c16ac7b53da2.png" xlink:type="simple">https://r.res.easebar.com/pic/20250529/dd94b605-3f0c-4bfc-9fc5-c16ac7b53da2.png</text:a></text:p>
          </table:table-cell>
          <table:table-cell table:style-name="ce1" office:value-type="string" calcext:value-type="string">
            <text:p>Command up to 2 giant drones to follow 2 allies, constantly healing allies within its radius, with more healing for the designated allies.</text:p>
          </table:table-cell>
          <table:table-cell table:style-name="ce1" office:value-type="string" calcext:value-type="string">
            <text:p><text:a xlink:href="https://www.marvelrivals.com/20250529/41360_1237549.html" xlink:type="simple">https://www.marvelrivals.com/20250529/41360_1237549.html</text:a></text:p>
          </table:table-cell>
          <table:table-cell table:style-name="ce2" table:number-columns-repeated="24"/>
          <table:table-cell table:number-columns-repeated="16355"/>
        </table:table-row>
        <table:table-row table:style-name="ro1">
          <table:table-cell table:style-name="ce1" office:value-type="string" calcext:value-type="string">
            <text:p>Ultron</text:p>
          </table:table-cell>
          <table:table-cell table:style-name="ce1" office:value-type="string" calcext:value-type="string">
            <text:p>DYNAMIC FLIGHT</text:p>
          </table:table-cell>
          <table:table-cell table:style-name="ce1" office:value-type="string" calcext:value-type="string">
            <text:p><text:a xlink:href="https://r.res.easebar.com/pic/20250529/720ff240-78c6-49fa-92ba-fa695e6b0635.png" xlink:type="simple">https://r.res.easebar.com/pic/20250529/720ff240-78c6-49fa-92ba-fa695e6b0635.png</text:a></text:p>
          </table:table-cell>
          <table:table-cell table:style-name="ce1" office:value-type="string" calcext:value-type="string">
            <text:p>Fly quickly in the direction of movement and then enter an Accelerated state</text:p>
          </table:table-cell>
          <table:table-cell table:style-name="ce1" office:value-type="string" calcext:value-type="string">
            <text:p><text:a xlink:href="https://www.marvelrivals.com/20250529/41360_1237549.html" xlink:type="simple">https://www.marvelrivals.com/20250529/41360_1237549.html</text:a></text:p>
          </table:table-cell>
          <table:table-cell table:style-name="ce1" office:value-type="string" calcext:value-type="string">
            <text:p>The Thing - Stone Haymaker, The Thing - Yancy Street Charge, The Thing - Embattled Leap, Black Cat - Mento-Fish, The Thing - Battle Blitz, Invisible Woman - Psionic Vortex, Invisible Woman - Force Physics, Mister Fantastic - Distended Grip, Squirrel Girl - Squirrel Blockade, Black Widow - Edge Dancer, Black Widow - Red Room Rifle, Iron Fist - Yat Jee Chung Kuen, Hawkeye - Crescent Slash, Hawkeye - Hypersonic Arrow, Star-Lord - Galactic Legend, Scarlet Witch - Chaos Control, Winter Soldier - Trooper's Fist, Winter Soldier - Tainted Voltage, Winter Soldier - Bionic Hook, Spider-man - Get Over Here!, Hela - Nightsword Thorn, Hela - Soul Drainer,Storm - Omega Hurricane, Storm - Goddess Boost, Hulk - Incredible Leap, Jeff the Land Shark - Aqua Burst, The Punisher - Adjudication, Luna Snow - Light &amp; Dark Ice,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Ultron</text:p>
          </table:table-cell>
          <table:table-cell table:style-name="ce1" office:value-type="string" calcext:value-type="string">
            <text:p>RAGE OF ULTRON</text:p>
          </table:table-cell>
          <table:table-cell table:style-name="ce1" office:value-type="string" calcext:value-type="string">
            <text:p><text:a xlink:href="https://r.res.easebar.com/pic/20250529/4768132e-a560-432e-aa8b-b7fc01d321d9.png" xlink:type="simple">https://r.res.easebar.com/pic/20250529/4768132e-a560-432e-aa8b-b7fc01d321d9.png</text:a></text:p>
          </table:table-cell>
          <table:table-cell table:style-name="ce1" office:value-type="string" calcext:value-type="string">
            <text:p>Summon Ultron Drones to fire Encephalo-Rays, damaging enemies or healing allies</text:p>
          </table:table-cell>
          <table:table-cell table:style-name="ce1" office:value-type="string" calcext:value-type="string">
            <text:p><text:a xlink:href="https://www.marvelrivals.com/20250529/41360_1237549.html" xlink:type="simple">https://www.marvelrivals.com/20250529/41360_1237549.html</text:a></text:p>
          </table:table-cell>
          <table:table-cell table:style-name="ce1" office:value-type="string" calcext:value-type="string">
            <text:p>Mantis - Soul Resurgence, Luna Snow - Fate of Both Worlds, Cloak&amp;Dagger - Eternal Bond, Psylocke - Dance of the Butterfly, Star-Lord - Galactic Legend, </text:p>
          </table:table-cell>
          <table:table-cell table:style-name="ce1" office:value-type="string" calcext:value-type="string">
            <text:p>This ult is rendered useless if you put up a shield around where he was aming negating all damage. It also doesn't hurt you as much as it heals allies, so it's better to make him focus you rather than him healing critical allies in one volley</text:p>
          </table:table-cell>
          <table:table-cell table:style-name="ce2" table:number-columns-repeated="22"/>
          <table:table-cell table:number-columns-repeated="16355"/>
        </table:table-row>
        <table:table-row table:style-name="ro1">
          <table:table-cell table:style-name="ce1" office:value-type="string" calcext:value-type="string">
            <text:p>Ultron</text:p>
          </table:table-cell>
          <table:table-cell table:style-name="ce1" office:value-type="string" calcext:value-type="string">
            <text:p>NANO RAY</text:p>
          </table:table-cell>
          <table:table-cell table:style-name="ce1" office:value-type="string" calcext:value-type="string">
            <text:p><text:a xlink:href="https://r.res.easebar.com/pic/20250531/0f93894e-5849-474d-b022-c098ba2647f0.png" xlink:type="simple">https://r.res.easebar.com/pic/20250531/0f93894e-5849-474d-b022-c098ba2647f0.png</text:a></text:p>
          </table:table-cell>
          <table:table-cell table:style-name="ce1" office:value-type="string" calcext:value-type="string">
            <text:p>When Iron Man, Ultron and Squirrel Girl team up, Ultron's Encephalo-Ray upgrades to Nano-Ray, firing a beam that pierces through all characters, dealing continuous damage to foes while healing allies; Squirrel Girl gains the Squirrel Missile ability. She directs a squirrel to ride Iron Man's nanotech glove as a homing missile. Upon hit, the squirrel flees just before a fiery explosion!</text:p>
          </table:table-cell>
          <table:table-cell table:style-name="ce1" office:value-type="string" calcext:value-type="string">
            <text:p><text:a xlink:href="https://www.marvelrivals.com/20250529/41360_1237549.html" xlink:type="simple">https://www.marvelrivals.com/20250529/41360_1237549.html</text:a></text:p>
          </table:table-cell>
          <table:table-cell table:style-name="ce2" table:number-columns-repeated="24"/>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TELEPATHIC PULSE</text:p>
          </table:table-cell>
          <table:table-cell table:style-name="ce1" office:value-type="string" calcext:value-type="string">
            <text:p><text:a xlink:href="https://r.res.easebar.com/pic/20250409/af9f583d-3891-4929-afe5-f41651b71edb.png" xlink:type="simple">https://r.res.easebar.com/pic/20250409/af9f583d-3891-4929-afe5-f41651b71edb.png</text:a></text:p>
          </table:table-cell>
          <table:table-cell table:style-name="ce1" office:value-type="string" calcext:value-type="string">
            <text:p>Fire a psionic beam to deal damage; the longer the beam hits, the higher the damage</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text:p>
          </table:table-cell>
          <table:table-cell table:style-name="ce2" table:number-columns-repeated="23"/>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MIND'S AEGIS</text:p>
          </table:table-cell>
          <table:table-cell table:style-name="ce1" office:value-type="string" calcext:value-type="string">
            <text:p><text:a xlink:href="https://r.res.easebar.com/pic/20250409/32c4bdf3-c6de-4131-b202-db95bbd1fc07.png" xlink:type="simple">https://r.res.easebar.com/pic/20250409/32c4bdf3-c6de-4131-b202-db95bbd1fc07.png</text:a></text:p>
          </table:table-cell>
          <table:table-cell table:style-name="ce1" office:value-type="string" calcext:value-type="string">
            <text:p>Create a levitating barrier at the designated location</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1" office:value-type="string" calcext:value-type="string">
            <text:p>Phoenix - Endsong Inferno, Ultron - Imperative: Patch, The Thing - Stone Haymaker, Mister Fantastic - Elastic Strength, Mister Fantastic - Reflexive Rubber, Wolverine - Savage Claw, Iron Fist - Jeet Kune Do, Hawkeye - Blast Arrow, Hawkeye - Crescent Slash, Hawkeye - Hypersonic Arrow, Magik - Soulsword, Magik - Eldritch Whirl, Magik - Demon's Rage,</text:p>
          </table:table-cell>
          <table:table-cell table:style-name="ce2" table:number-columns-repeated="23"/>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PSYCHIC SPEAR</text:p>
          </table:table-cell>
          <table:table-cell table:style-name="ce1" office:value-type="string" calcext:value-type="string">
            <text:p><text:a xlink:href="https://r.res.easebar.com/pic/20250409/091083f4-aa98-4bf7-8b9e-318798ee4939.png" xlink:type="simple">https://r.res.easebar.com/pic/20250409/091083f4-aa98-4bf7-8b9e-318798ee4939.png</text:a></text:p>
          </table:table-cell>
          <table:table-cell table:style-name="ce1" office:value-type="string" calcext:value-type="string">
            <text:p>Seize control of an enemy's sentienceâdamage dealt to the sentience cascades to the physical form and can be pierced by Telepathic Pulse. When the sentience shatters, it unleashes extra damage on its owner</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2" table:number-columns-repeated="24"/>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DIAMOND FORM</text:p>
          </table:table-cell>
          <table:table-cell table:style-name="ce1" office:value-type="string" calcext:value-type="string">
            <text:p><text:a xlink:href="https://r.res.easebar.com/pic/20250409/139006e1-78e5-443f-9b1e-271c3f6bc276.png" xlink:type="simple">https://r.res.easebar.com/pic/20250409/139006e1-78e5-443f-9b1e-271c3f6bc276.png</text:a></text:p>
          </table:table-cell>
          <table:table-cell table:style-name="ce1" office:value-type="string" calcext:value-type="string">
            <text:p>Activate Diamond Form to transform your attack style while gaining Damage Reduction and becoming Unstoppable</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2" table:number-columns-repeated="24"/>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FACETED FURY</text:p>
          </table:table-cell>
          <table:table-cell table:style-name="ce1" office:value-type="string" calcext:value-type="string">
            <text:p><text:a xlink:href="https://r.res.easebar.com/pic/20250409/a5598975-b4ab-49a5-b99c-a9a4d044f37c.png" xlink:type="simple">https://r.res.easebar.com/pic/20250409/a5598975-b4ab-49a5-b99c-a9a4d044f37c.png</text:a></text:p>
          </table:table-cell>
          <table:table-cell table:style-name="ce1" office:value-type="string" calcext:value-type="string">
            <text:p>In Diamond Form, deliver a crushing double-fisted strike to enemies</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2" table:number-columns-repeated="24"/>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CRYSTAL KICK</text:p>
          </table:table-cell>
          <table:table-cell table:style-name="ce1" office:value-type="string" calcext:value-type="string">
            <text:p><text:a xlink:href="https://r.res.easebar.com/pic/20250409/dd86d9de-5844-4759-9692-5e0fac76579a.png" xlink:type="simple">https://r.res.easebar.com/pic/20250409/dd86d9de-5844-4759-9692-5e0fac76579a.png</text:a></text:p>
          </table:table-cell>
          <table:table-cell table:style-name="ce1" office:value-type="string" calcext:value-type="string">
            <text:p>In Diamond Form, unleash a flying kick forward and knock back enemies; extra damage is dealt if they're propelled into a wall</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1" office:value-type="string" calcext:value-type="string">
            <text:p>The Thing - Unyielding Will, Iron Fist - Dragon's Defense, Magik - Stepping Discs,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CARBON CRUSH</text:p>
          </table:table-cell>
          <table:table-cell table:style-name="ce1" office:value-type="string" calcext:value-type="string">
            <text:p><text:a xlink:href="https://r.res.easebar.com/pic/20250409/a30a134d-c77a-48c3-a212-ea7704c72453.png" xlink:type="simple">https://r.res.easebar.com/pic/20250409/a30a134d-c77a-48c3-a212-ea7704c72453.png</text:a></text:p>
          </table:table-cell>
          <table:table-cell table:style-name="ce1" office:value-type="string" calcext:value-type="string">
            <text:p>In Diamond Form, lunge forward to grab an enemy, then execute a back slam to inflict damage</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1" office:value-type="string" calcext:value-type="string">
            <text:p>The Thing - Yancy Street Charge, Hulk - HULK SMASH!, Hulk - Indestructible Guard, Hulk - World Breaker,</text:p>
          </table:table-cell>
          <table:table-cell table:style-name="ce1" office:value-type="string" calcext:value-type="string">
            <text:p>Play footies and maintain your space until you see her lunge forward with this move if you can wait it out Diamond Form do that. If you do get grabbed, make sure it's on your terms and make Emma over extend into your team so that she is more vunrable in the grab animation than you would be within it as you can get healed </text:p>
          </table:table-cell>
          <table:table-cell table:style-name="ce2" table:number-columns-repeated="22"/>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PSIONIC SEDUCTION</text:p>
          </table:table-cell>
          <table:table-cell table:style-name="ce1" office:value-type="string" calcext:value-type="string">
            <text:p><text:a xlink:href="https://r.res.easebar.com/pic/20250409/f186ffef-db20-4cce-ac54-f3963738fa64.png" xlink:type="simple">https://r.res.easebar.com/pic/20250409/f186ffef-db20-4cce-ac54-f3963738fa64.png</text:a></text:p>
          </table:table-cell>
          <table:table-cell table:style-name="ce1" office:value-type="string" calcext:value-type="string">
            <text:p>Project a forward psychic assault that stuns foes and prevents them from unleashing their Ultimate Abilities; if the effect lingers, it gradually commandeers their mind, forcing them to move toward Emma Frost</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1" office:value-type="string" calcext:value-type="string">
            <text:p>Mantis - Soul Resurgence, Luna Snow - Fate of Both Worlds, Phoenix - Telepathic Illusion, Phoenix - Telekinesis Burst, Ultron - Rage of Ultron, Emma Frost - Mind's Aegis, Captain America - Living Legend, Magneto - Metallic Curtain, Doctor Strange - Shield of the Seraphim, Groot - Thornlash Wall, Groot - Ironwood Wall, Deadpool - Magical Unicorn Shield!, Invisible Woman - Guardian Shield, The Thing - Yancy Street Charge, Cloak&amp;Dagger - Eternal Bond, Cloak&amp;Dagger - Dark Teleportation, Cloak&amp;Dagger - Dagger Storm, Iron Fist - Dragon's Defense, Psylocke - Dance of the Butterfly, Moon Knight - Hand of Khonshu, Namor - Blessing of the Deep, Magik - Stepping Discs, Star-Lord - Stellar Shift, Hulk - HULK SMASH!, Hulk - Indestructible Guard, Hulk - World Breaker, Jeff the Land Shark - It's Jeff!, Jeff the Land Shark - Hide and Seek, The Punisher - Culling Turret,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Emma Frost</text:p>
          </table:table-cell>
          <table:table-cell table:style-name="ce1" office:value-type="string" calcext:value-type="string">
            <text:p>ICED OUT DIAMOND</text:p>
          </table:table-cell>
          <table:table-cell table:style-name="ce1" office:value-type="string" calcext:value-type="string">
            <text:p><text:a xlink:href="https://r.res.easebar.com/pic/20250409/f7eaa483-8960-4b6f-b427-c9568e54e110.png" xlink:type="simple">https://r.res.easebar.com/pic/20250409/f7eaa483-8960-4b6f-b427-c9568e54e110.png</text:a></text:p>
          </table:table-cell>
          <table:table-cell table:style-name="ce1" office:value-type="string" calcext:value-type="string">
            <text:p>Luna Snow grants Winter's Chill to Iron Fist and Emma Frost. When Iron Fist activates Harmony Recovery, he can heal nearby allies with Lunar Chi. Emma Frost can project ice energy forward, dealing damage and slowing enemies. She can also enhance her diamond form, condensing frost into an Absolute Zero Diamond barrier that blocks enemy attacks and movement</text:p>
          </table:table-cell>
          <table:table-cell table:style-name="ce1" office:value-type="string" calcext:value-type="string">
            <text:p><text:a xlink:href="https://www.marvelrivals.com/20250408/41360_1225547.html" xlink:type="simple">https://www.marvelrivals.com/20250408/41360_1225547.html</text:a></text:p>
          </table:table-cell>
          <table:table-cell table:style-name="ce1" office:value-type="string" calcext:value-type="string">
            <text:p>Phoenix - Endsong Inferno, </text:p>
          </table:table-cell>
          <table:table-cell table:style-name="ce2" table:number-columns-repeated="23"/>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Rocky Jab</text:p>
          </table:table-cell>
          <table:table-cell table:style-name="ce1" office:value-type="string" calcext:value-type="string">
            <text:p><text:a xlink:href="https://r.res.easebar.com/pic/20250220/274bfd5f-02b6-4513-a80e-3f7685dc8556.png" xlink:type="simple">https://r.res.easebar.com/pic/20250220/274bfd5f-02b6-4513-a80e-3f7685dc8556.png</text:a></text:p>
          </table:table-cell>
          <table:table-cell table:style-name="ce1" office:value-type="string" calcext:value-type="string">
            <text:p>Rapidly punch forward</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1" office:value-type="string" calcext:value-type="string">
            <text:p>Squirrel Girl - Unbeatable Squirrel Tsunami, Black Widow - Red Room Rifle, Iron Fist - Dragon's Defense, Hawkeye - Piercing Arrow, Hela - Nightsword Thorn, Hela - Soul Drainer,</text:p>
          </table:table-cell>
          <table:table-cell table:style-name="ce2" table:number-columns-repeated="23"/>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Stone Haymaker</text:p>
          </table:table-cell>
          <table:table-cell table:style-name="ce1" office:value-type="string" calcext:value-type="string">
            <text:p><text:a xlink:href="https://r.res.easebar.com/pic/20250220/745e0798-e37f-431b-82d5-bc3d29f97d9b.png" xlink:type="simple">https://r.res.easebar.com/pic/20250220/745e0798-e37f-431b-82d5-bc3d29f97d9b.png</text:a></text:p>
          </table:table-cell>
          <table:table-cell table:style-name="ce1" office:value-type="string" calcext:value-type="string">
            <text:p>Deliver a devastating Heavy Blow. Can Knock Down flying enemies.</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1" office:value-type="string" calcext:value-type="string">
            <text:p>Blade - Scarlet Shroud,</text:p>
          </table:table-cell>
          <table:table-cell table:style-name="ce2" table:number-columns-repeated="23"/>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Yancy Street Charge</text:p>
          </table:table-cell>
          <table:table-cell table:style-name="ce1" office:value-type="string" calcext:value-type="string">
            <text:p><text:a xlink:href="https://r.res.easebar.com/pic/20250220/824cffd2-00d5-43a7-8e88-3c72d432ca92.png" xlink:type="simple">https://r.res.easebar.com/pic/20250220/824cffd2-00d5-43a7-8e88-3c72d432ca92.png</text:a></text:p>
          </table:table-cell>
          <table:table-cell table:style-name="ce1" office:value-type="string" calcext:value-type="string">
            <text:p>Continuously charge forward, launching up enemies and leaving behind a zone at the final position that prevents the use of mobility abilities</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1" office:value-type="string" calcext:value-type="string">
            <text:p>Blade - Scarlet Shroud, The Thing - Unyielding Will, The Thing - Yancy Street Charge, Scarlet Witch - Reality Erasure, Hulk - Indestructible Guard,</text:p>
          </table:table-cell>
          <table:table-cell table:style-name="ce1" office:value-type="string" calcext:value-type="string">
            <text:p>This move is great at canceling your movement abilities, but if you see it coming and he ends this move with the slam part knocking you in the air, your last chance to escape is at the top of your knockback arch, if you respond too late, hopefully you were already moving away from the center of the creator to get your abilities back.</text:p>
          </table:table-cell>
          <table:table-cell table:style-name="ce2" table:number-columns-repeated="22"/>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Embattled Leap</text:p>
          </table:table-cell>
          <table:table-cell table:style-name="ce1" office:value-type="string" calcext:value-type="string">
            <text:p><text:a xlink:href="https://r.res.easebar.com/pic/20250220/59664e33-bdbf-4243-b93a-7583f1712cad.png" xlink:type="simple">https://r.res.easebar.com/pic/20250220/59664e33-bdbf-4243-b93a-7583f1712cad.png</text:a></text:p>
          </table:table-cell>
          <table:table-cell table:style-name="ce1" office:value-type="string" calcext:value-type="string">
            <text:p>Jump toward an ally and apply damage reduction to yourself and allies within the landing area</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1" office:value-type="string" calcext:value-type="string">
            <text:p>The Thing - Yancy Street Charge, Cloak&amp;Dagger - Terror Cape, Namor - Horn of Proteus, Hela - Soul Drainer,</text:p>
          </table:table-cell>
          <table:table-cell table:style-name="ce1" office:value-type="string" calcext:value-type="string">
            <text:p>This is how smart Thing players plan their escape routes, if he gets the chance to use this ability to exit the fight, both him and the allies he jumps to will have an easier time getting healed to get back into the fight, you have to body block him or stun him to stop this from happening.</text:p>
          </table:table-cell>
          <table:table-cell table:style-name="ce2" table:number-columns-repeated="22"/>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Battle Blitz</text:p>
          </table:table-cell>
          <table:table-cell table:style-name="ce1" office:value-type="string" calcext:value-type="string">
            <text:p><text:a xlink:href="https://r.res.easebar.com/pic/20251104/22edee34-cf90-486d-9f16-4959ca72aec6.png" xlink:type="simple">https://r.res.easebar.com/pic/20251104/22edee34-cf90-486d-9f16-4959ca72aec6.png</text:a></text:p>
          </table:table-cell>
          <table:table-cell table:style-name="ce1" office:value-type="string" calcext:value-type="string">
            <text:p>Jump toward an enemy and apply Vulnerability to enemies within the landing area</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1" office:value-type="string" calcext:value-type="string">
            <text:p>Phoenix - Telepathic Illusion, Phoenix - Telekinesis Burst, The Thing - Yancy Street Charge, Cloak&amp;Dagger - Terror Cape, Cloak&amp;Dagger - Dark Teleportation, Namor - Horn of Proteus, Hela - Soul Drainer,</text:p>
          </table:table-cell>
          <table:table-cell table:style-name="ce1" office:value-type="string" calcext:value-type="string">
            <text:p>The Thing is incredibly fast with this Move, you will have a hard time trying to disant yourself from him, You usually do not want to be caught alone with him, so always move with the team.</text:p>
          </table:table-cell>
          <table:table-cell table:style-name="ce2" table:number-columns-repeated="22"/>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Clobberin' Time</text:p>
          </table:table-cell>
          <table:table-cell table:style-name="ce1" office:value-type="string" calcext:value-type="string">
            <text:p><text:a xlink:href="https://r.res.easebar.com/pic/20250220/27486433-769b-4aec-ba7b-d7da3cabd52f.png" xlink:type="simple">https://r.res.easebar.com/pic/20250220/27486433-769b-4aec-ba7b-d7da3cabd52f.png</text:a></text:p>
          </table:table-cell>
          <table:table-cell table:style-name="ce1" office:value-type="string" calcext:value-type="string">
            <text:p>Use immense power to launch up all enemies in front of the Thing into the air</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1" office:value-type="string" calcext:value-type="string">
            <text:p>Mantis - Soul Resurgence, Luna Snow - Fate of Both Worlds, Mantis - Spore Slumber, Luna Snow - Ice Arts, Blade - Scarlet Shroud, Phoenix - Telepathic Illusion, Phoenix - Telekinesis Burst, Mister Fantastic - Reflexive Rubber, Cloak&amp;Dagger - Dark Teleportation, Cloak&amp;Dagger - Dagger Storm, Iron Fist - Dragon's Defense, Iron Man - Invincible Pulse Cannon, Namor - Blessing of the Deep, Star-Lord - Stellar Shift, Magik - Stepping Discs, Hela - Soul Drainer, Hulk - HULK SMASH!, Hulk - Indestructible Guard, Hulk - World Breaker, Jeff the Land Shark - It's Jeff!, Jeff the Land Shark - Hide and Seek, The Punisher - Culling Turret, The Punisher - Final Judgement, Luna Snow - Ice Arts,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Unyielding Will</text:p>
          </table:table-cell>
          <table:table-cell table:style-name="ce1" office:value-type="string" calcext:value-type="string">
            <text:p><text:a xlink:href="https://r.res.easebar.com/pic/20250220/3898e125-f9bf-4d44-8b4d-9aeec6873187.png" xlink:type="simple">https://r.res.easebar.com/pic/20250220/3898e125-f9bf-4d44-8b4d-9aeec6873187.png</text:a></text:p>
          </table:table-cell>
          <table:table-cell table:style-name="ce1" office:value-type="string" calcext:value-type="string">
            <text:p>Immune to launch-up, knock-back, and other displacement effects</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1" office:value-type="string" calcext:value-type="string">
            <text:p>Phoenix - Telekinesis Burst, Mantis - Spore Slumber, Luna Snow - Ice Arts, Emma Frost - Carbon Crush, Squirrel Girl - Squirrel Blockade, Spider-Man - Get Over Here!, Squirrel Girl - Squirrel Blockade, Black Widow - Electro-Plasma Explosion, Black Widow - Edge Dancer, Wolverine - Feral Leap, Scarlet Witch - Dark Seal, Winter Soldier - Bionic Hook, Spider-man - Get Over Here!, Hela - Soul Drainer,</text:p>
          </table:table-cell>
          <table:table-cell table:style-name="ce1" office:value-type="string" calcext:value-type="string">
            <text:p>This move is a double edge sword, Yes he can't be pushed around, but now everything holds him still. Keeping the Thing stuck in one place is detremental to his health. It usually takes a team effort to capitalize on it though.</text:p>
          </table:table-cell>
          <table:table-cell table:style-name="ce2" table:number-columns-repeated="22"/>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Cosmic Fastball</text:p>
          </table:table-cell>
          <table:table-cell table:style-name="ce1" office:value-type="string" calcext:value-type="string">
            <text:p><text:a xlink:href="https://nie.res.netease.com/r/pic/20241205/c290e460-174c-412b-b05e-a28a3c60219b.png" xlink:type="simple">https://nie.res.netease.com/r/pic/20241205/c290e460-174c-412b-b05e-a28a3c60219b.png</text:a></text:p>
          </table:table-cell>
          <table:table-cell table:style-name="ce1" office:value-type="string" calcext:value-type="string">
            <text:p>Wolverine and The Thing can interact with each other. Once both parties confirm, The Thing can lift Wolverine and press the key to hurl him forward</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2" table:number-columns-repeated="24"/>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GAMMA CHARGE</text:p>
          </table:table-cell>
          <table:table-cell table:style-name="ce1" office:value-type="string" calcext:value-type="string">
            <text:p><text:a xlink:href="https://r.res.easebar.com/pic/20260213/b18fc9a2-fa11-4a9d-8c0c-266b5fb5d79b.png" xlink:type="simple">https://r.res.easebar.com/pic/20260213/b18fc9a2-fa11-4a9d-8c0c-266b5fb5d79b.png</text:a></text:p>
          </table:table-cell>
          <table:table-cell table:style-name="ce1" office:value-type="string" calcext:value-type="string">
            <text:p>Hulk charges Black Panther and The Thing with gamma radiation. When Black Panther's health is low, he gains a gamma shield, becoming Unstoppable and blocking attacks. The Thing gains Gamma Gauntlets, boosting Damage and range of his Rocky Jab and Stone Haymaker. Dealing damage with these attacks grants Bonus Health, and maximum Bonus Health cap is increased</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2" table:number-columns-repeated="24"/>
          <table:table-cell table:number-columns-repeated="16355"/>
        </table:table-row>
        <table:table-row table:style-name="ro1">
          <table:table-cell table:style-name="ce1" office:value-type="string" calcext:value-type="string">
            <text:p>THE THING</text:p>
          </table:table-cell>
          <table:table-cell table:style-name="ce1" office:value-type="string" calcext:value-type="string">
            <text:p>Flying Thing</text:p>
          </table:table-cell>
          <table:table-cell table:style-name="ce1" office:value-type="string" calcext:value-type="string">
            <text:p><text:a xlink:href="https://r.res.easebar.com/pic/20250730/7048ff41-7f0a-4cff-8469-49b1e18160cf.png" xlink:type="simple">https://r.res.easebar.com/pic/20250730/7048ff41-7f0a-4cff-8469-49b1e18160cf.png</text:a></text:p>
          </table:table-cell>
          <table:table-cell table:style-name="ce1" office:value-type="string" calcext:value-type="string">
            <text:p>Human Torch can lift The Thing into the air and slam him down, dealing damage, launching enemies, and creating a zone that disables mobility abilities</text:p>
          </table:table-cell>
          <table:table-cell table:style-name="ce1" office:value-type="string" calcext:value-type="string">
            <text:p><text:a xlink:href="https://www.marvelrivals.com/20250220/41360_1213067.html" xlink:type="simple">https://www.marvelrivals.com/20250220/41360_1213067.html</text:a></text:p>
          </table:table-cell>
          <table:table-cell table:style-name="ce1" office:value-type="string" calcext:value-type="string">
            <text:p>Winter Soldier - Trooper's Fist, Winter Soldier - Tainted Voltage,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Fire Cluster</text:p>
          </table:table-cell>
          <table:table-cell table:style-name="ce1" office:value-type="string" calcext:value-type="string">
            <text:p><text:a xlink:href="https://r.res.easebar.com/pic/20250220/2afdfcab-b55a-4a18-a47e-9c2a6bb175b8.png" xlink:type="simple">https://r.res.easebar.com/pic/20250220/2afdfcab-b55a-4a18-a47e-9c2a6bb175b8.png</text:a></text:p>
          </table:table-cell>
          <table:table-cell table:style-name="ce1" office:value-type="string" calcext:value-type="string">
            <text:p>Launch forward a splittable fireball</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 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Blazing Blast</text:p>
          </table:table-cell>
          <table:table-cell table:style-name="ce1" office:value-type="string" calcext:value-type="string">
            <text:p><text:a xlink:href="https://r.res.easebar.com/pic/20250220/af838642-8301-4f48-b5ea-5c3413c7cb7f.png" xlink:type="simple">https://r.res.easebar.com/pic/20250220/af838642-8301-4f48-b5ea-5c3413c7cb7f.png</text:a></text:p>
          </table:table-cell>
          <table:table-cell table:style-name="ce1" office:value-type="string" calcext:value-type="string">
            <text:p>Launch a fireball to create a Flame Field at the targeted area</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2" table:number-columns-repeated="2"/>
          <table:table-cell table:style-name="ce1" office:value-type="string" calcext:value-type="string">
            <text:p>Luna Snow - Light &amp; Dark Ice, </text:p>
          </table:table-cell>
          <table:table-cell table:style-name="ce2" table:number-columns-repeated="21"/>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Flaming Meteor</text:p>
          </table:table-cell>
          <table:table-cell table:style-name="ce1" office:value-type="string" calcext:value-type="string">
            <text:p><text:a xlink:href="https://r.res.easebar.com/pic/20250220/e3c91a9a-e174-4309-b2c6-975f0671805a.png" xlink:type="simple">https://r.res.easebar.com/pic/20250220/e3c91a9a-e174-4309-b2c6-975f0671805a.png</text:a></text:p>
          </table:table-cell>
          <table:table-cell table:style-name="ce1" office:value-type="string" calcext:value-type="string">
            <text:p>Dive towards the ground, dealing damage to enemies and detonating any Flame Fields hit</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1" office:value-type="string" calcext:value-type="string">
            <text:p>The Thing - Unyielding Will, Namor - Horn of Proteus, Magik - Stepping Discs, Iron Fist - Dragon's Defense,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Plasma Body</text:p>
          </table:table-cell>
          <table:table-cell table:style-name="ce1" office:value-type="string" calcext:value-type="string">
            <text:p><text:a xlink:href="https://r.res.easebar.com/pic/20250220/bed6bb7e-ac4e-4b83-b75f-32b4c02b3249.png" xlink:type="simple">https://r.res.easebar.com/pic/20250220/bed6bb7e-ac4e-4b83-b75f-32b4c02b3249.png</text:a></text:p>
          </table:table-cell>
          <table:table-cell table:style-name="ce1" office:value-type="string" calcext:value-type="string">
            <text:p>Enter a state of accelerated ascent</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1" office:value-type="string" calcext:value-type="string">
            <text:p>The Thing - Yancy Street Charge, Black Cat - Mento-Fish, The Thing - Unyielding Will,The Thing - Stone Haymaker, The Thing - Battle Blitz, Invisible Woman - Psionic Vortex, Invisible Woman - Force Physics, Mister Fantastic - Distended Grip, Mister Fantastic - Distended Grip, Squirrel Girl - Squirrel Blockade, Black Widow - Red Room Rifle, Iron Fist - Yat Jee Chung Kuen, Hawkeye - Crescent Slash, Hawkeye - Hypersonic Arrow, Star-Lord - Galactic Legend, Scarlet Witch - Chaos Control, Winter Soldier - Trooper's Fist, Winter Soldier - Tainted Voltage, Winter Soldier - Bionic Hook, Spider-man - Get Over Here!, Hela - Nightsword Thorn, Hela - Soul Drainer, Storm - Omega Hurricane, Storm - Goddess Boost, Hulk - Incredible Leap, Jeff the Land Shark - Aqua Burst, The Punisher - Adjudication, Luna Snow - Light &amp; Dark Ice,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Pyro-Prison</text:p>
          </table:table-cell>
          <table:table-cell table:style-name="ce1" office:value-type="string" calcext:value-type="string">
            <text:p><text:a xlink:href="https://r.res.easebar.com/pic/20250220/d20f2e24-4f10-4fd8-a3a9-73b2920b27ee.png" xlink:type="simple">https://r.res.easebar.com/pic/20250220/d20f2e24-4f10-4fd8-a3a9-73b2920b27ee.png</text:a></text:p>
          </table:table-cell>
          <table:table-cell table:style-name="ce1" office:value-type="string" calcext:value-type="string">
            <text:p>Form a fire wall between Fire Fields to burn enemies</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2" table:number-columns-repeated="24"/>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Supernova</text:p>
          </table:table-cell>
          <table:table-cell table:style-name="ce1" office:value-type="string" calcext:value-type="string">
            <text:p><text:a xlink:href="https://r.res.easebar.com/pic/20250220/49ec9ee0-bff0-41c5-944f-ff679966e4d4.png" xlink:type="simple">https://r.res.easebar.com/pic/20250220/49ec9ee0-bff0-41c5-944f-ff679966e4d4.png</text:a></text:p>
          </table:table-cell>
          <table:table-cell table:style-name="ce1" office:value-type="string" calcext:value-type="string">
            <text:p>Explode with cosmic fire to deal damage to enemies within range. Upon skill activation, all Flame Fields will transform into Flame Tornadoes, dealing extra damage</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1" office:value-type="string" calcext:value-type="string">
            <text:p>Mantis - Soul Resurgence, Luna Snow - Fate of Both Worlds, Cloak&amp;Dagger - Eternal Bond, Psylocke - Dance of the Butterfly, Star-Lord - Galactic Legend, </text:p>
          </table:table-cell>
          <table:table-cell table:style-name="ce2" table:number-columns-repeated="23"/>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Storm Siblings</text:p>
          </table:table-cell>
          <table:table-cell table:style-name="ce1" office:value-type="string" calcext:value-type="string">
            <text:p><text:a xlink:href="https://r.res.easebar.com/pic/20250220/d6c32fd9-64ab-4b65-9092-0f7c95ebe95a.png" xlink:type="simple">https://r.res.easebar.com/pic/20250220/d6c32fd9-64ab-4b65-9092-0f7c95ebe95a.png</text:a></text:p>
          </table:table-cell>
          <table:table-cell table:style-name="ce1" office:value-type="string" calcext:value-type="string">
            <text:p>The Invisible Woman taps into her powers, channeling Psionic Might to fortify the entire Fantastic Four team, granting damage resistance. Once activated, they can continually generate Bonus Health, making up for lost Health</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2" table:number-columns-repeated="24"/>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Pyrokinetic Energy</text:p>
          </table:table-cell>
          <table:table-cell table:style-name="ce1" office:value-type="string" calcext:value-type="string">
            <text:p><text:a xlink:href="https://r.res.easebar.com/pic/20250712/b61ccad0-a950-4723-ae31-1f4e52f0d330.png" xlink:type="simple">https://r.res.easebar.com/pic/20250712/b61ccad0-a950-4723-ae31-1f4e52f0d330.png</text:a></text:p>
          </table:table-cell>
          <table:table-cell table:style-name="ce1" office:value-type="string" calcext:value-type="string">
            <text:p>Human Torch stores Pyrokinetic Energy in Spider-Man's suit, enabling him to unleash an Inferno Blast that sprays a fiery web while performing a backflip to create distance. The flames damage enemies and apply a Burn-Tracer. Detonating these Burn-Tracers inflicts Damage Over Time</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2" table:number-columns-repeated="24"/>
          <table:table-cell table:number-columns-repeated="16355"/>
        </table:table-row>
        <table:table-row table:style-name="ro1">
          <table:table-cell table:style-name="ce1" office:value-type="string" calcext:value-type="string">
            <text:p>HUMAN TORCH</text:p>
          </table:table-cell>
          <table:table-cell table:style-name="ce1" office:value-type="string" calcext:value-type="string">
            <text:p>Two In One</text:p>
          </table:table-cell>
          <table:table-cell table:style-name="ce1" office:value-type="string" calcext:value-type="string">
            <text:p><text:a xlink:href="https://r.res.easebar.com/pic/20250730/99129fb5-1ec9-4589-99b4-9df1d892ab9b.png" xlink:type="simple">https://r.res.easebar.com/pic/20250730/99129fb5-1ec9-4589-99b4-9df1d892ab9b.png</text:a></text:p>
          </table:table-cell>
          <table:table-cell table:style-name="ce1" office:value-type="string" calcext:value-type="string">
            <text:p>Human Torch can lift The Thing into the air and slam him down, dealing damage, launching enemies, and creating a zone that disables mobility abilities</text:p>
          </table:table-cell>
          <table:table-cell table:style-name="ce1" office:value-type="string" calcext:value-type="string">
            <text:p><text:a xlink:href="https://www.marvelrivals.com/20250220/41360_1213050.html" xlink:type="simple">https://www.marvelrivals.com/20250220/41360_1213050.html</text:a></text:p>
          </table:table-cell>
          <table:table-cell table:style-name="ce2" table:number-columns-repeated="24"/>
          <table:table-cell table:number-columns-repeated="16355"/>
        </table:table-row>
        <table:table-row table:style-name="ro1">
          <table:table-cell table:style-name="ce1" office:value-type="string" calcext:value-type="string">
            <text:p>INVISIBLE WOMAN</text:p>
          </table:table-cell>
          <table:table-cell table:style-name="ce1" office:value-type="string" calcext:value-type="string">
            <text:p>Orb Projection</text:p>
          </table:table-cell>
          <table:table-cell table:style-name="ce1" office:value-type="string" calcext:value-type="string">
            <text:p><text:a xlink:href="https://r.res.easebar.com/pic/20250110/79e037c4-353c-46a1-abb1-1188ff3f98e3.png" xlink:type="simple">https://r.res.easebar.com/pic/20250110/79e037c4-353c-46a1-abb1-1188ff3f98e3.png</text:a></text:p>
          </table:table-cell>
          <table:table-cell table:style-name="ce1" office:value-type="string" calcext:value-type="string">
            <text:p>Launch a force field orbs that can pierce heroes, flying to maximum distance before returning to Invisible Woman; damaging enemies and healing teammates</text:p>
          </table:table-cell>
          <table:table-cell table:style-name="ce1" office:value-type="string" calcext:value-type="string">
            <text:p><text:a xlink:href="https://www.marvelrivals.com/20250108/41360_1205353.html" xlink:type="simple">https://www.marvelrivals.com/20250108/41360_120535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INVISIBLE WOMAN</text:p>
          </table:table-cell>
          <table:table-cell table:style-name="ce1" office:value-type="string" calcext:value-type="string">
            <text:p>Guardian Shield</text:p>
          </table:table-cell>
          <table:table-cell table:style-name="ce1" office:value-type="string" calcext:value-type="string">
            <text:p><text:a xlink:href="https://r.res.easebar.com/pic/20250108/af32c3d3-713a-4faf-90f7-1be2dcfa8cbd.png" xlink:type="simple">https://r.res.easebar.com/pic/20250108/af32c3d3-713a-4faf-90f7-1be2dcfa8cbd.png</text:a></text:p>
          </table:table-cell>
          <table:table-cell table:style-name="ce1" office:value-type="string" calcext:value-type="string">
            <text:p>Generate a force shield in front of a selected ally or in front of you. The shield can block damage and provide Healing Over Time to nearby allies. Enemies that pass through the shield are slowed</text:p>
          </table:table-cell>
          <table:table-cell table:style-name="ce1" office:value-type="string" calcext:value-type="string">
            <text:p><text:a xlink:href="https://www.marvelrivals.com/20250108/41360_1205353.html" xlink:type="simple">https://www.marvelrivals.com/20250108/41360_1205353.html</text:a></text:p>
          </table:table-cell>
          <table:table-cell table:style-name="ce1" office:value-type="string" calcext:value-type="string">
            <text:p>Phoenix - Endsong Inferno, Ultron - Imperative: Patch, Mister Fantastic - Elastic Strength, Magik - Stepping Discs, Magik - Soulsword, Magik - Eldritch Whirl,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INVISIBLE WOMAN</text:p>
          </table:table-cell>
          <table:table-cell table:style-name="ce1" office:value-type="string" calcext:value-type="string">
            <text:p>Psionic Vortex</text:p>
          </table:table-cell>
          <table:table-cell table:style-name="ce1" office:value-type="string" calcext:value-type="string">
            <text:p><text:a xlink:href="https://r.res.easebar.com/pic/20250108/308c5ab3-2b3f-4f53-9eb6-05c171ad4863.png" xlink:type="simple">https://r.res.easebar.com/pic/20250108/308c5ab3-2b3f-4f53-9eb6-05c171ad4863.png</text:a></text:p>
          </table:table-cell>
          <table:table-cell table:style-name="ce1" office:value-type="string" calcext:value-type="string">
            <text:p>Gather psionic energy and then cast it, upon impact or pressing the Ability key again, it erupts into a psionic vortex, continuously drawing in enemies and causing damage</text:p>
          </table:table-cell>
          <table:table-cell table:style-name="ce1" office:value-type="string" calcext:value-type="string">
            <text:p><text:a xlink:href="https://www.marvelrivals.com/20250108/41360_1205353.html" xlink:type="simple">https://www.marvelrivals.com/20250108/41360_1205353.html</text:a></text:p>
          </table:table-cell>
          <table:table-cell table:style-name="ce2" table:number-columns-repeated="24"/>
          <table:table-cell table:number-columns-repeated="16355"/>
        </table:table-row>
        <table:table-row table:style-name="ro1">
          <table:table-cell table:style-name="ce1" office:value-type="string" calcext:value-type="string">
            <text:p>INVISIBLE WOMAN</text:p>
          </table:table-cell>
          <table:table-cell table:style-name="ce1" office:value-type="string" calcext:value-type="string">
            <text:p>Force Physics</text:p>
          </table:table-cell>
          <table:table-cell table:style-name="ce1" office:value-type="string" calcext:value-type="string">
            <text:p><text:a xlink:href="https://r.res.easebar.com/pic/20250108/0d7893e9-e90e-483f-8b90-414535d6f133.png" xlink:type="simple">https://r.res.easebar.com/pic/20250108/0d7893e9-e90e-483f-8b90-414535d6f133.png</text:a></text:p>
          </table:table-cell>
          <table:table-cell table:style-name="ce1" office:value-type="string" calcext:value-type="string">
            <text:p>Manipulate psionic energy to push or pull enemies in front of her</text:p>
          </table:table-cell>
          <table:table-cell table:style-name="ce1" office:value-type="string" calcext:value-type="string">
            <text:p><text:a xlink:href="https://www.marvelrivals.com/20250108/41360_1205353.html" xlink:type="simple">https://www.marvelrivals.com/20250108/41360_1205353.html</text:a></text:p>
          </table:table-cell>
          <table:table-cell table:style-name="ce1" office:value-type="string" calcext:value-type="string">
            <text:p>The Thing - Unyielding Will, Magik - Stepping Discs, Iron Fist - Dragon's Defense, Star-Lord - Stellar Shift, Hulk - HULK SMASH!, Hulk - Indestructible Guard, Hulk - World Breaker,</text:p>
          </table:table-cell>
          <table:table-cell table:style-name="ce2" table:number-columns-repeated="23"/>
          <table:table-cell table:number-columns-repeated="16355"/>
        </table:table-row>
        <table:table-row table:style-name="ro1">
          <table:table-cell table:style-name="ce1" office:value-type="string" calcext:value-type="string">
            <text:p>INVISIBLE WOMAN</text:p>
          </table:table-cell>
          <table:table-cell table:style-name="ce1" office:value-type="string" calcext:value-type="string">
            <text:p>Invisible Boundary</text:p>
          </table:table-cell>
          <table:table-cell table:style-name="ce1" office:value-type="string" calcext:value-type="string">
            <text:p><text:a xlink:href="https://r.res.easebar.com/pic/20250108/c10fa2f1-64e5-417a-abbe-0092e98b0afb.png" xlink:type="simple">https://r.res.easebar.com/pic/20250108/c10fa2f1-64e5-417a-abbe-0092e98b0afb.png</text:a></text:p>
          </table:table-cell>
          <table:table-cell table:style-name="ce1" office:value-type="string" calcext:value-type="string">
            <text:p>Manifest an unseen force field within a chosen area, rendering allies inside undetectable by enemies and provide Healing Over Time. Enemies that pass through the field are slowed</text:p>
          </table:table-cell>
          <table:table-cell table:style-name="ce1" office:value-type="string" calcext:value-type="string">
            <text:p><text:a xlink:href="https://www.marvelrivals.com/20250108/41360_1205353.html" xlink:type="simple">https://www.marvelrivals.com/20250108/41360_1205353.html</text:a></text:p>
          </table:table-cell>
          <table:table-cell table:style-name="ce1" office:value-type="string" calcext:value-type="string">
            <text:p>Mantis - Soul Resurgence, Mantis - Spore Slumber, Luna Snow - Ice Arts, Angela - Assassin's Charge, Blade - Daywalker Dash, Blade - Thousand-Fold Slash, Phoenix - Telepathic Illusion, Emma Frost - Psionic Seduction, The Thing - Yancy Street Charge, Wolverine - Last Stand, Wolverine - Feral Leap, Iron Man - Invincible Pulse Cannon, Namor - Horn of Proteus, Scarlet Witch - Reality Erasure, Winter Soldier - Trooper's Fist, Winter Soldier - Bionic Hook, Magik - Stepping Discs, Star-Lord - Stellar Shift, Spider-man - Get Over Here!, Jeff the Land Shark - It's Jeff!, Jeff the Land Shark - Hide and Seek, The Punisher - Final Judgement,</text:p>
          </table:table-cell>
          <table:table-cell table:style-name="ce2" table:number-columns-repeated="23"/>
          <table:table-cell table:number-columns-repeated="16355"/>
        </table:table-row>
        <table:table-row table:style-name="ro1">
          <table:table-cell table:style-name="ce1" office:value-type="string" calcext:value-type="string">
            <text:p>INVISIBLE WOMAN</text:p>
          </table:table-cell>
          <table:table-cell table:style-name="ce1" office:value-type="string" calcext:value-type="string">
            <text:p>Covert Advance</text:p>
          </table:table-cell>
          <table:table-cell table:style-name="ce1" office:value-type="string" calcext:value-type="string">
            <text:p><text:a xlink:href="https://r.res.easebar.com/pic/20250108/d273333c-e1da-4d98-925d-b7ce8601144c.png" xlink:type="simple">https://r.res.easebar.com/pic/20250108/d273333c-e1da-4d98-925d-b7ce8601144c.png</text:a></text:p>
          </table:table-cell>
          <table:table-cell table:style-name="ce1" office:value-type="string" calcext:value-type="string">
            <text:p>Enter Invisible state some time after disengaging from combat and grant yourself Healing Over Time</text:p>
          </table:table-cell>
          <table:table-cell table:style-name="ce1" office:value-type="string" calcext:value-type="string">
            <text:p><text:a xlink:href="https://www.marvelrivals.com/20250108/41360_1205353.html" xlink:type="simple">https://www.marvelrivals.com/20250108/41360_1205353.html</text:a></text:p>
          </table:table-cell>
          <table:table-cell table:style-name="ce1" office:value-type="string" calcext:value-type="string">
            <text:p>Invisible Woman - Psionic Vortex, Black Widow - Electro-Plasma Explosion, Black Widow- Edge Dancer, Deadpool - Deadpool in Your Area, Star-Lord - Blaster Barrage, Thor - Lightning Realm, Magik - Eldritch Whirl, Rogue - Fatal Attraction, Spider-man - Spider-Sense, Jeff the Land Shark - Joyful Splash,</text:p>
          </table:table-cell>
          <table:table-cell table:style-name="ce2" table:number-columns-repeated="23"/>
          <table:table-cell table:number-columns-repeated="16355"/>
        </table:table-row>
        <table:table-row table:style-name="ro1">
          <table:table-cell table:style-name="ce1" office:value-type="string" calcext:value-type="string">
            <text:p>INVISIBLE WOMAN</text:p>
          </table:table-cell>
          <table:table-cell table:style-name="ce1" office:value-type="string" calcext:value-type="string">
            <text:p>Veiled Step</text:p>
          </table:table-cell>
          <table:table-cell table:style-name="ce1" office:value-type="string" calcext:value-type="string">
            <text:p><text:a xlink:href="https://r.res.easebar.com/pic/20250108/eb7b6f46-9d82-4df8-a513-8d94c07546e9.png" xlink:type="simple">https://r.res.easebar.com/pic/20250108/eb7b6f46-9d82-4df8-a513-8d94c07546e9.png</text:a></text:p>
          </table:table-cell>
          <table:table-cell table:style-name="ce1" office:value-type="string" calcext:value-type="string">
            <text:p>Generate a force field at your feet, stepping on it propels her into the Invisible state</text:p>
          </table:table-cell>
          <table:table-cell table:style-name="ce1" office:value-type="string" calcext:value-type="string">
            <text:p><text:a xlink:href="https://www.marvelrivals.com/20250108/41360_1205353.html" xlink:type="simple">https://www.marvelrivals.com/20250108/41360_1205353.html</text:a></text:p>
          </table:table-cell>
          <table:table-cell table:style-name="ce1" office:value-type="string" calcext:value-type="string">
            <text:p>Invisible Woman - Psionic Vortex, Invisible Woman - Force Physics, Squirrel Girl - Unbeatable Squirrel Tsunami, Deadpool - Deadpool in Your Area, Star-Lord - Blaster Barrage, Thor - Lightning Realm, Rogue - Fatal Attraction, Spider-man - Spider-Sense, Jeff the Land Shark - Joyful Splash,</text:p>
          </table:table-cell>
          <table:table-cell table:style-name="ce1" office:value-type="string" calcext:value-type="string">
            <text:p>Invisible Woman's heals are relied on to heavily, if she is smart, she will stay invisible, but then the team will probably die. If she is skilled she will engage you in a fight and won't stay invisble for long. pacience is the counter here.</text:p>
          </table:table-cell>
          <table:table-cell table:style-name="ce2" table:number-columns-repeated="22"/>
          <table:table-cell table:number-columns-repeated="16355"/>
        </table:table-row>
        <table:table-row table:style-name="ro1">
          <table:table-cell table:style-name="ce1" office:value-type="string" calcext:value-type="string">
            <text:p>INVISIBLE WOMAN</text:p>
          </table:table-cell>
          <table:table-cell table:style-name="ce1" office:value-type="string" calcext:value-type="string">
            <text:p>Fantasti-Force</text:p>
          </table:table-cell>
          <table:table-cell table:style-name="ce1" office:value-type="string" calcext:value-type="string">
            <text:p><text:a xlink:href="https://r.res.easebar.com/pic/20250109/053365f9-0714-4d9c-a51f-2fd1c173a7f3.png" xlink:type="simple">https://r.res.easebar.com/pic/20250109/053365f9-0714-4d9c-a51f-2fd1c173a7f3.png</text:a></text:p>
          </table:table-cell>
          <table:table-cell table:style-name="ce1" office:value-type="string" calcext:value-type="string">
            <text:p>The Invisible Woman taps into her powers, channeling Psionic Might to fortify Mr.Fantastic. This formidable force bolsters Mr.Fantastic, granting damage resistance. Once activated, they can continually generate Bonus Health, making up for lost Health</text:p>
          </table:table-cell>
          <table:table-cell table:style-name="ce1" office:value-type="string" calcext:value-type="string">
            <text:p><text:a xlink:href="https://www.marvelrivals.com/20250108/41360_1205353.html" xlink:type="simple">https://www.marvelrivals.com/20250108/41360_1205353.html</text:a></text:p>
          </table:table-cell>
          <table:table-cell table:style-name="ce2" table:number-columns-repeated="24"/>
          <table:table-cell table:number-columns-repeated="16355"/>
        </table:table-row>
        <table:table-row table:style-name="ro1">
          <table:table-cell table:style-name="ce1" office:value-type="string" calcext:value-type="string">
            <text:p>MISTER FANTASTIC</text:p>
          </table:table-cell>
          <table:table-cell table:style-name="ce1" office:value-type="string" calcext:value-type="string">
            <text:p>Stretch Punch</text:p>
          </table:table-cell>
          <table:table-cell table:style-name="ce1" office:value-type="string" calcext:value-type="string">
            <text:p><text:a xlink:href="https://r.res.easebar.com/pic/20250110/6ca25ced-20ea-495c-b403-d84fa949b02a.png" xlink:type="simple">https://r.res.easebar.com/pic/20250110/6ca25ced-20ea-495c-b403-d84fa949b02a.png</text:a></text:p>
          </table:table-cell>
          <table:table-cell table:style-name="ce1" office:value-type="string" calcext:value-type="string">
            <text:p>Stretch out a forward punch to attack enemies</text:p>
          </table:table-cell>
          <table:table-cell table:style-name="ce1" office:value-type="string" calcext:value-type="string">
            <text:p><text:a xlink:href="https://www.marvelrivals.com/20250108/41360_1205352.html" xlink:type="simple">https://www.marvelrivals.com/20250108/41360_1205352.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Hypersonic Arrow,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MISTER FANTASTIC</text:p>
          </table:table-cell>
          <table:table-cell table:style-name="ce1" office:value-type="string" calcext:value-type="string">
            <text:p>Distended Grip</text:p>
          </table:table-cell>
          <table:table-cell table:style-name="ce1" office:value-type="string" calcext:value-type="string">
            <text:p><text:a xlink:href="https://r.res.easebar.com/pic/20250108/f2a1a063-eb4b-4274-a9b8-fac92c4abeba.png" xlink:type="simple">https://r.res.easebar.com/pic/20250108/f2a1a063-eb4b-4274-a9b8-fac92c4abeba.png</text:a></text:p>
          </table:table-cell>
          <table:table-cell table:style-name="ce1" office:value-type="string" calcext:value-type="string">
            <text:p>Extend arms forward to entangle an enemy, then press Primary Attack to pull the hit enemy toward him, or select and yank another enemy, Knocking Them Airborne against each other. Hit targets are Immobilized</text:p>
          </table:table-cell>
          <table:table-cell table:style-name="ce1" office:value-type="string" calcext:value-type="string">
            <text:p><text:a xlink:href="https://www.marvelrivals.com/20250108/41360_1205352.html" xlink:type="simple">https://www.marvelrivals.com/20250108/41360_1205352.html</text:a></text:p>
          </table:table-cell>
          <table:table-cell table:style-name="ce1" office:value-type="string" calcext:value-type="string">
            <text:p>The Thing - Unyielding Will,</text:p>
          </table:table-cell>
          <table:table-cell table:style-name="ce2" table:number-columns-repeated="23"/>
          <table:table-cell table:number-columns-repeated="16355"/>
        </table:table-row>
        <table:table-row table:style-name="ro1">
          <table:table-cell table:style-name="ce1" office:value-type="string" calcext:value-type="string">
            <text:p>MISTER FANTASTIC</text:p>
          </table:table-cell>
          <table:table-cell table:style-name="ce1" office:value-type="string" calcext:value-type="string">
            <text:p>Flexible Elongation</text:p>
          </table:table-cell>
          <table:table-cell table:style-name="ce1" office:value-type="string" calcext:value-type="string">
            <text:p><text:a xlink:href="https://r.res.easebar.com/pic/20250108/014f9fc0-5b64-4c2d-afb1-4669b7b5369c.png" xlink:type="simple">https://r.res.easebar.com/pic/20250108/014f9fc0-5b64-4c2d-afb1-4669b7b5369c.png</text:a></text:p>
          </table:table-cell>
          <table:table-cell table:style-name="ce1" office:value-type="string" calcext:value-type="string">
            <text:p>Gain a Shield, select a target and dash towards them, dealing damage to enemies or granting a Shield to allies</text:p>
          </table:table-cell>
          <table:table-cell table:style-name="ce1" office:value-type="string" calcext:value-type="string">
            <text:p><text:a xlink:href="https://www.marvelrivals.com/20250108/41360_1205352.html" xlink:type="simple">https://www.marvelrivals.com/20250108/41360_1205352.html</text:a></text:p>
          </table:table-cell>
          <table:table-cell table:style-name="ce1" office:value-type="string" calcext:value-type="string">
            <text:p>Phoenix - Telepathic Illusion, Phoenix - Telekinesis Burst, Emma Frost - Diamond Form, Emma Frost - Crystal Kick, Black Widow - Edge Dancer, Cloak&amp;Dagger - Terror Cape, Cloak&amp;Dagger - Dark Teleportation, Hela - Soul Drainer,</text:p>
          </table:table-cell>
          <table:table-cell table:style-name="ce2" table:number-columns-repeated="23"/>
          <table:table-cell table:number-columns-repeated="16355"/>
        </table:table-row>
        <table:table-row table:style-name="ro1">
          <table:table-cell table:style-name="ce1" office:value-type="string" calcext:value-type="string">
            <text:p>MISTER FANTASTIC</text:p>
          </table:table-cell>
          <table:table-cell table:style-name="ce1" office:value-type="string" calcext:value-type="string">
            <text:p>Reflexive Rubber</text:p>
          </table:table-cell>
          <table:table-cell table:style-name="ce1" office:value-type="string" calcext:value-type="string">
            <text:p><text:a xlink:href="https://r.res.easebar.com/pic/20250108/d152620a-90bc-407e-a3f1-b137503624d0.png" xlink:type="simple">https://r.res.easebar.com/pic/20250108/d152620a-90bc-407e-a3f1-b137503624d0.png</text:a></text:p>
          </table:table-cell>
          <table:table-cell table:style-name="ce1" office:value-type="string" calcext:value-type="string">
            <text:p>Stretch the body to absorb damage before launching stored damage in the targeted direction</text:p>
          </table:table-cell>
          <table:table-cell table:style-name="ce1" office:value-type="string" calcext:value-type="string">
            <text:p><text:a xlink:href="https://www.marvelrivals.com/20250108/41360_1205352.html" xlink:type="simple">https://www.marvelrivals.com/20250108/41360_1205352.html</text:a></text:p>
          </table:table-cell>
          <table:table-cell table:style-name="ce1" office:value-type="string" calcext:value-type="string">
            <text:p>Ultron - Imperative: Patch,</text:p>
          </table:table-cell>
          <table:table-cell table:style-name="ce2" table:number-columns-repeated="23"/>
          <table:table-cell table:number-columns-repeated="16355"/>
        </table:table-row>
        <table:table-row table:style-name="ro1">
          <table:table-cell table:style-name="ce1" office:value-type="string" calcext:value-type="string">
            <text:p>MISTER FANTASTIC</text:p>
          </table:table-cell>
          <table:table-cell table:style-name="ce1" office:value-type="string" calcext:value-type="string">
            <text:p>Brainiac Bounce</text:p>
          </table:table-cell>
          <table:table-cell table:style-name="ce1" office:value-type="string" calcext:value-type="string">
            <text:p><text:a xlink:href="https://r.res.easebar.com/pic/20250108/05dcb43c-4de3-483a-afc6-d06c6e76e4ff.png" xlink:type="simple">https://r.res.easebar.com/pic/20250108/05dcb43c-4de3-483a-afc6-d06c6e76e4ff.png</text:a></text:p>
          </table:table-cell>
          <table:table-cell table:style-name="ce1" office:value-type="string" calcext:value-type="string">
            <text:p>Leap upward and smash the ground, slowing enemies within range. Mister Fantastic can leap again upon landing a hit</text:p>
          </table:table-cell>
          <table:table-cell table:style-name="ce1" office:value-type="string" calcext:value-type="string">
            <text:p><text:a xlink:href="https://www.marvelrivals.com/20250108/41360_1205352.html" xlink:type="simple">https://www.marvelrivals.com/20250108/41360_1205352.html</text:a></text:p>
          </table:table-cell>
          <table:table-cell table:style-name="ce1" office:value-type="string" calcext:value-type="string">
            <text:p>Mantis - Soul Resurgence, Luna Snow - Fate of Both Worlds, Iron Man - Invincible Pulse Cannon, Star-Lord - Galactic Legend, Magik - Stepping Discs, Iron Fist - Dragon's Defense,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MISTER FANTASTIC</text:p>
          </table:table-cell>
          <table:table-cell table:style-name="ce1" office:value-type="string" calcext:value-type="string">
            <text:p>Elastic Strength</text:p>
          </table:table-cell>
          <table:table-cell table:style-name="ce1" office:value-type="string" calcext:value-type="string">
            <text:p><text:a xlink:href="https://r.res.easebar.com/pic/20250108/25010c9f-083e-4097-a443-544e0eeaa0ab.png" xlink:type="simple">https://r.res.easebar.com/pic/20250108/25010c9f-083e-4097-a443-544e0eeaa0ab.png</text:a></text:p>
          </table:table-cell>
          <table:table-cell table:style-name="ce1" office:value-type="string" calcext:value-type="string">
            <text:p>Using abilities generates Elasticity, boosting attack power. Reaching full Elasticity triggers an Inflated state that increases Maximum Health, further boosts damage, and enables the use of Reflexive Rubber</text:p>
          </table:table-cell>
          <table:table-cell table:style-name="ce1" office:value-type="string" calcext:value-type="string">
            <text:p><text:a xlink:href="https://www.marvelrivals.com/20250108/41360_1205352.html" xlink:type="simple">https://www.marvelrivals.com/20250108/41360_1205352.html</text:a></text:p>
          </table:table-cell>
          <table:table-cell table:style-name="ce1" office:value-type="string" calcext:value-type="string">
            <text:p>Phoenix - Telekinesis Burst, Iron Fist - Dragon's Defense,</text:p>
          </table:table-cell>
          <table:table-cell table:style-name="ce2" table:number-columns-repeated="23"/>
          <table:table-cell table:number-columns-repeated="16355"/>
        </table:table-row>
        <table:table-row table:style-name="ro1">
          <table:table-cell table:style-name="ce1" office:value-type="string" calcext:value-type="string">
            <text:p>MISTER FANTASTIC</text:p>
          </table:table-cell>
          <table:table-cell table:style-name="ce1" office:value-type="string" calcext:value-type="string">
            <text:p>FANTASTIC AMPLIFIER</text:p>
          </table:table-cell>
          <table:table-cell table:style-name="ce1" office:value-type="string" calcext:value-type="string">
            <text:p><text:a xlink:href="https://r.res.easebar.com/pic/20260213/eeb353f6-40cf-4c6d-b787-db7a4d316868.png" xlink:type="simple">https://r.res.easebar.com/pic/20260213/eeb353f6-40cf-4c6d-b787-db7a4d316868.png</text:a></text:p>
          </table:table-cell>
          <table:table-cell table:style-name="ce1" office:value-type="string" calcext:value-type="string">
            <text:p>Rocket Raccoon upgrades his B.R.B. for Star-Lord and Mister Fantastic. Star-Lord gets an Astral Jump device, allowing him to teleport to its deployment point from anywhere on the map. Mister Fantastic receives a Fantastic Amplifier, removing his Elasticity limit and letting him actively enter Inflation state</text:p>
          </table:table-cell>
          <table:table-cell table:style-name="ce1" office:value-type="string" calcext:value-type="string">
            <text:p><text:a xlink:href="https://www.marvelrivals.com/20250108/41360_1205352.html" xlink:type="simple">https://www.marvelrivals.com/20250108/41360_1205352.html</text:a></text:p>
          </table:table-cell>
          <table:table-cell table:style-name="ce2" table:number-columns-repeated="24"/>
          <table:table-cell table:number-columns-repeated="16355"/>
        </table:table-row>
        <table:table-row table:style-name="ro1">
          <table:table-cell table:style-name="ce1" office:value-type="string" calcext:value-type="string">
            <text:p>SQUIRREL GIRL</text:p>
          </table:table-cell>
          <table:table-cell table:style-name="ce1" office:value-type="string" calcext:value-type="string">
            <text:p>Burst Acorn</text:p>
          </table:table-cell>
          <table:table-cell table:style-name="ce1" office:value-type="string" calcext:value-type="string">
            <text:p><text:a xlink:href="https://r.res.easebar.com/pic/20241205/662dd801-7b3c-4929-bca7-4696b104811d.png" xlink:type="simple">https://r.res.easebar.com/pic/20241205/662dd801-7b3c-4929-bca7-4696b104811d.png</text:a></text:p>
          </table:table-cell>
          <table:table-cell table:style-name="ce1" office:value-type="string" calcext:value-type="string">
            <text:p>Shoot bouncing Burst Acorns</text:p>
          </table:table-cell>
          <table:table-cell table:style-name="ce1" office:value-type="string" calcext:value-type="string">
            <text:p><text:a xlink:href="https://www.marvelrivals.com/20241205/41360_1198132.html" xlink:type="simple">https://www.marvelrivals.com/20241205/41360_1198132.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SQUIRREL GIRL</text:p>
          </table:table-cell>
          <table:table-cell table:style-name="ce1" office:value-type="string" calcext:value-type="string">
            <text:p>Unbeatable Squirrel Tsunami</text:p>
          </table:table-cell>
          <table:table-cell table:style-name="ce1" office:value-type="string" calcext:value-type="string">
            <text:p><text:a xlink:href="https://r.res.easebar.com/pic/20241205/f87d8f38-b7d1-4a62-9aaa-eb00423c38d2.png" xlink:type="simple">https://r.res.easebar.com/pic/20241205/f87d8f38-b7d1-4a62-9aaa-eb00423c38d2.png</text:a></text:p>
          </table:table-cell>
          <table:table-cell table:style-name="ce1" office:value-type="string" calcext:value-type="string">
            <text:p>Summon a horde of squirrels to charge forward, dealing damage while bouncing against structures</text:p>
          </table:table-cell>
          <table:table-cell table:style-name="ce1" office:value-type="string" calcext:value-type="string">
            <text:p><text:a xlink:href="https://www.marvelrivals.com/20241205/41360_1198132.html" xlink:type="simple">https://www.marvelrivals.com/20241205/41360_1198132.html</text:a></text:p>
          </table:table-cell>
          <table:table-cell table:style-name="ce1" office:value-type="string" calcext:value-type="string">
            <text:p>Mantis - Soul Resurgence, Luna Snow - Fate of Both Worlds, Blade - Scarlet Shroud, Phoenix - Endsong Inferno, Ultron - Rage of Ultron, Loki - Doppelganger, Iron Fist - Dragon's Defense, Moon Knight - Hand of Khonshu, Namor - Blessing of the Deep, Star-Lord - Galactic Legend?, Magik - Stepping Discs, Star-Lord - Stellar Shift, The Punisher - Deliverance, The Punisher - Final Judgement, The Punisher - Adjudication, </text:p>
          </table:table-cell>
          <table:table-cell table:style-name="ce1" office:value-type="string" calcext:value-type="string">
            <text:p>The best counter is elevation, if you can get to higher ground like the floor is lava, then this ult means nothing to you and hopefully your team, also if you have the mobility bait the ult to run off the cliff and fall off the map, if you don't have the means to easily shoot it safely</text:p>
          </table:table-cell>
          <table:table-cell table:style-name="ce2" table:number-columns-repeated="22"/>
          <table:table-cell table:number-columns-repeated="16355"/>
        </table:table-row>
        <table:table-row table:style-name="ro1">
          <table:table-cell table:style-name="ce1" office:value-type="string" calcext:value-type="string">
            <text:p>SQUIRREL GIRL</text:p>
          </table:table-cell>
          <table:table-cell table:style-name="ce1" office:value-type="string" calcext:value-type="string">
            <text:p>Tail Bounce</text:p>
          </table:table-cell>
          <table:table-cell table:style-name="ce1" office:value-type="string" calcext:value-type="string">
            <text:p><text:a xlink:href="https://r.res.easebar.com/pic/20241205/cc6be0d3-f369-4fcf-861d-5e0f2594af1a.png" xlink:type="simple">https://r.res.easebar.com/pic/20241205/cc6be0d3-f369-4fcf-861d-5e0f2594af1a.png</text:a></text:p>
          </table:table-cell>
          <table:table-cell table:style-name="ce1" office:value-type="string" calcext:value-type="string">
            <text:p>Rocket upwards with a bounce of her tail</text:p>
          </table:table-cell>
          <table:table-cell table:style-name="ce1" office:value-type="string" calcext:value-type="string">
            <text:p><text:a xlink:href="https://www.marvelrivals.com/20241205/41360_1198132.html" xlink:type="simple">https://www.marvelrivals.com/20241205/41360_1198132.html</text:a></text:p>
          </table:table-cell>
          <table:table-cell table:style-name="ce1" office:value-type="string" calcext:value-type="string">
            <text:p>Phoenix - Telekinesis Burst, Invisible Woman - Force Physics, Mister Fantastic - Distended Grip, Squirrel Girl - Squirrel Blockade, Black Widow - Edge Dancer, Iron Fist - Yat Jee Chung Kuen, Psylocke - Psi-Blade Dash, Winter Soldier - Bionic Hook, Spider-man - Get Over Here!, Hela - Nightsword Thorn, Hela - Soul Drainer, Hulk - Incredible Leap,</text:p>
          </table:table-cell>
          <table:table-cell table:style-name="ce2" table:number-columns-repeated="23"/>
          <table:table-cell table:number-columns-repeated="16355"/>
        </table:table-row>
        <table:table-row table:style-name="ro1">
          <table:table-cell table:style-name="ce1" office:value-type="string" calcext:value-type="string">
            <text:p>SQUIRREL GIRL</text:p>
          </table:table-cell>
          <table:table-cell table:style-name="ce1" office:value-type="string" calcext:value-type="string">
            <text:p>Mammal Bond</text:p>
          </table:table-cell>
          <table:table-cell table:style-name="ce1" office:value-type="string" calcext:value-type="string">
            <text:p><text:a xlink:href="https://r.res.easebar.com/pic/20241205/5714be78-0962-47d3-b231-1a3b6d8d98d3.png" xlink:type="simple">https://r.res.easebar.com/pic/20241205/5714be78-0962-47d3-b231-1a3b6d8d98d3.png</text:a></text:p>
          </table:table-cell>
          <table:table-cell table:style-name="ce1" office:value-type="string" calcext:value-type="string">
            <text:p>Reload Burst Acorns and can use an ability without cooldown once in a short duration</text:p>
          </table:table-cell>
          <table:table-cell table:style-name="ce1" office:value-type="string" calcext:value-type="string">
            <text:p><text:a xlink:href="https://www.marvelrivals.com/20241205/41360_1198132.html" xlink:type="simple">https://www.marvelrivals.com/20241205/41360_1198132.html</text:a></text:p>
          </table:table-cell>
          <table:table-cell table:style-name="ce2" table:number-columns-repeated="24"/>
          <table:table-cell table:number-columns-repeated="16355"/>
        </table:table-row>
        <table:table-row table:style-name="ro1">
          <table:table-cell table:style-name="ce1" office:value-type="string" calcext:value-type="string">
            <text:p>SQUIRREL GIRL</text:p>
          </table:table-cell>
          <table:table-cell table:style-name="ce1" office:value-type="string" calcext:value-type="string">
            <text:p>Squirrel Blockade</text:p>
          </table:table-cell>
          <table:table-cell table:style-name="ce1" office:value-type="string" calcext:value-type="string">
            <text:p><text:a xlink:href="https://r.res.easebar.com/pic/20241205/403af848-dda8-42f7-a2a0-b3d0959eeefe.png" xlink:type="simple">https://r.res.easebar.com/pic/20241205/403af848-dda8-42f7-a2a0-b3d0959eeefe.png</text:a></text:p>
          </table:table-cell>
          <table:table-cell table:style-name="ce1" office:value-type="string" calcext:value-type="string">
            <text:p>Launch an acorn to unleash Squirrel Guards, Imprisoning the first hit enemy</text:p>
          </table:table-cell>
          <table:table-cell table:style-name="ce1" office:value-type="string" calcext:value-type="string">
            <text:p><text:a xlink:href="https://www.marvelrivals.com/20241205/41360_1198132.html" xlink:type="simple">https://www.marvelrivals.com/20241205/41360_1198132.html</text:a></text:p>
          </table:table-cell>
          <table:table-cell table:style-name="ce1" office:value-type="string" calcext:value-type="string">
            <text:p>The Thing - Yancy Street Charge, Iron Fist - Dragon's Defense, Magik - Stepping Discs, Star-Lord - Stellar Shift, Hulk - HULK SMASH!, Hulk - Indestructible Guard, Hulk - World Breaker,</text:p>
          </table:table-cell>
          <table:table-cell table:style-name="ce2" table:number-columns-repeated="23"/>
          <table:table-cell table:number-columns-repeated="16355"/>
        </table:table-row>
        <table:table-row table:style-name="ro1">
          <table:table-cell table:style-name="ce1" office:value-type="string" calcext:value-type="string">
            <text:p>SQUIRREL GIRL</text:p>
          </table:table-cell>
          <table:table-cell table:style-name="ce1" office:value-type="string" calcext:value-type="string">
            <text:p>Squirrel Missile</text:p>
          </table:table-cell>
          <table:table-cell table:style-name="ce1" office:value-type="string" calcext:value-type="string">
            <text:p><text:a xlink:href="https://r.res.easebar.com/pic/20250711/6a1bbb2e-7ee1-436e-87f0-f23f25f5799e.png" xlink:type="simple">https://r.res.easebar.com/pic/20250711/6a1bbb2e-7ee1-436e-87f0-f23f25f5799e.png</text:a></text:p>
          </table:table-cell>
          <table:table-cell table:style-name="ce1" office:value-type="string" calcext:value-type="string">
            <text:p>When Iron Man, Ultron and Squirrel Girl team up, Ultron's Encephalo-Ray upgrades to Nano-Ray, firing a beam that pierces through all characters, dealing continuous damage to foes while healing allies; Squirrel Girl gains the Squirrel Missile ability. She directs a squirrel to ride Iron Man's nanotech glove as a homing missile. Upon hit, the squirrel flees just before a fiery explosion!</text:p>
          </table:table-cell>
          <table:table-cell table:style-name="ce1" office:value-type="string" calcext:value-type="string">
            <text:p><text:a xlink:href="https://www.marvelrivals.com/20241205/41360_1198132.html" xlink:type="simple">https://www.marvelrivals.com/20241205/41360_1198132.html</text:a></text:p>
          </table:table-cell>
          <table:table-cell table:style-name="ce2" table:number-columns-repeated="24"/>
          <table:table-cell table:number-columns-repeated="16355"/>
        </table:table-row>
        <table:table-row table:style-name="ro1">
          <table:table-cell table:style-name="ce1" office:value-type="string" calcext:value-type="string">
            <text:p>BLACK WIDOW</text:p>
          </table:table-cell>
          <table:table-cell table:style-name="ce1" office:value-type="string" calcext:value-type="string">
            <text:p>Widow's Bite Baton</text:p>
          </table:table-cell>
          <table:table-cell table:style-name="ce1" office:value-type="string" calcext:value-type="string">
            <text:p><text:a xlink:href="https://r.res.easebar.com/pic/20241205/66ad25fa-5a94-4087-8d1d-d626e1a5c798.png" xlink:type="simple">https://r.res.easebar.com/pic/20241205/66ad25fa-5a94-4087-8d1d-d626e1a5c798.png</text:a></text:p>
          </table:table-cell>
          <table:table-cell table:style-name="ce1" office:value-type="string" calcext:value-type="string">
            <text:p>Strike with the enhanced electric batons</text:p>
          </table:table-cell>
          <table:table-cell table:style-name="ce1" office:value-type="string" calcext:value-type="string">
            <text:p><text:a xlink:href="https://www.marvelrivals.com/20241204/41360_1198106.html" xlink:type="simple">https://www.marvelrivals.com/20241204/41360_1198106.html</text:a></text:p>
          </table:table-cell>
          <table:table-cell table:style-name="ce1" office:value-type="string" calcext:value-type="string">
            <text:p>Black Widow - Red Room Rifle, Black Widow - Electro-Plasma Explosion, Black Widow - Edge Dancer, Hawkeye - Piercing Arrow,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BLACK WIDOW</text:p>
          </table:table-cell>
          <table:table-cell table:style-name="ce1" office:value-type="string" calcext:value-type="string">
            <text:p>Red Room Rifle</text:p>
          </table:table-cell>
          <table:table-cell table:style-name="ce1" office:value-type="string" calcext:value-type="string">
            <text:p><text:a xlink:href="https://r.res.easebar.com/pic/20241205/67bd0973-ab49-4e6d-a04b-70f67cb2514b.png" xlink:type="simple">https://r.res.easebar.com/pic/20241205/67bd0973-ab49-4e6d-a04b-70f67cb2514b.png</text:a></text:p>
          </table:table-cell>
          <table:table-cell table:style-name="ce1" office:value-type="string" calcext:value-type="string">
            <text:p>Attack with the Red Room Rifle</text:p>
          </table:table-cell>
          <table:table-cell table:style-name="ce1" office:value-type="string" calcext:value-type="string">
            <text:p><text:a xlink:href="https://www.marvelrivals.com/20241204/41360_1198106.html" xlink:type="simple">https://www.marvelrivals.com/20241204/41360_1198106.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Namor - Horn of Proteus, Star-Lord - Blaster Barrage,</text:p>
          </table:table-cell>
          <table:table-cell table:style-name="ce2" table:number-columns-repeated="23"/>
          <table:table-cell table:number-columns-repeated="16355"/>
        </table:table-row>
        <table:table-row table:style-name="ro1">
          <table:table-cell table:style-name="ce1" office:value-type="string" calcext:value-type="string">
            <text:p>BLACK WIDOW</text:p>
          </table:table-cell>
          <table:table-cell table:style-name="ce1" office:value-type="string" calcext:value-type="string">
            <text:p>Electro-Plasma Explosion</text:p>
          </table:table-cell>
          <table:table-cell table:style-name="ce1" office:value-type="string" calcext:value-type="string">
            <text:p><text:a xlink:href="https://r.res.easebar.com/pic/20241205/2ab04f37-ede8-4c33-aee0-ef47e6d4c495.png" xlink:type="simple">https://r.res.easebar.com/pic/20241205/2ab04f37-ede8-4c33-aee0-ef47e6d4c495.png</text:a></text:p>
          </table:table-cell>
          <table:table-cell table:style-name="ce1" office:value-type="string" calcext:value-type="string">
            <text:p>Switch the Red Room Rifle to Destruction mode and unleash an electro-plasma blast, damaging enemies within range and leaving plasma on the ground to Slow nearby enemies</text:p>
          </table:table-cell>
          <table:table-cell table:style-name="ce1" office:value-type="string" calcext:value-type="string">
            <text:p><text:a xlink:href="https://www.marvelrivals.com/20241204/41360_1198106.html" xlink:type="simple">https://www.marvelrivals.com/20241204/41360_1198106.html</text:a></text:p>
          </table:table-cell>
          <table:table-cell table:style-name="ce1" office:value-type="string" calcext:value-type="string">
            <text:p>Mantis - Spore Slumber, Luna Snow - Ice Arts, Phoenix - Telekinesis Burst, Mister Fantastic - Reflexive Rubber, Wolverine - Regenerative Healing Factor, Cloak&amp;Dagger - Dark Teleportation, Iron Fist - Dragon's Defense, Namor - Blessing of the Deep, Magik - Stepping Discs, Star-Lord - Stellar Shift, Jeff the Land Shark - It's Jeff!, Jeff the Land Shark - Hide and Seek, </text:p>
          </table:table-cell>
          <table:table-cell table:style-name="ce2" table:number-columns-repeated="23"/>
          <table:table-cell table:number-columns-repeated="16355"/>
        </table:table-row>
        <table:table-row table:style-name="ro1">
          <table:table-cell table:style-name="ce1" office:value-type="string" calcext:value-type="string">
            <text:p>BLACK WIDOW</text:p>
          </table:table-cell>
          <table:table-cell table:style-name="ce1" office:value-type="string" calcext:value-type="string">
            <text:p>Fleet Foot</text:p>
          </table:table-cell>
          <table:table-cell table:style-name="ce1" office:value-type="string" calcext:value-type="string">
            <text:p><text:a xlink:href="https://r.res.easebar.com/pic/20241205/c54964b7-5c00-4229-8f65-5d156f05ce27.png" xlink:type="simple">https://r.res.easebar.com/pic/20241205/c54964b7-5c00-4229-8f65-5d156f05ce27.png</text:a></text:p>
          </table:table-cell>
          <table:table-cell table:style-name="ce1" office:value-type="string" calcext:value-type="string">
            <text:p>Dash forward and enable a powerful jump</text:p>
          </table:table-cell>
          <table:table-cell table:style-name="ce1" office:value-type="string" calcext:value-type="string">
            <text:p><text:a xlink:href="https://www.marvelrivals.com/20241204/41360_1198106.html" xlink:type="simple">https://www.marvelrivals.com/20241204/41360_1198106.html</text:a></text:p>
          </table:table-cell>
          <table:table-cell table:style-name="ce1" office:value-type="string" calcext:value-type="string">
            <text:p>Phoenix - Telekinesis Burst, The Thing - Yancy Street Charge, Black Cat - Mento-Fish, Invisible Woman - Force Physics, Mister Fantastic - Distended Grip, Squirrel Girl - Squirrel Blockade, Cloak&amp;Dagger - Terror Cape, Cloak&amp;Dagger - Dark Teleportation, Iron Fist - Yat Jee Chung Kuen, Psylocke - Psi-Blade Dash, Hawkeye - Hypersonic Arrow, Moon Knight - Ancient Ankh, Winter Soldier - Tainted Voltage, Winter Soldier - Bionic Hook, Spider-man - Get Over Here!, Hela - Soul Drainer, Luna Snow - Ice Arts,</text:p>
          </table:table-cell>
          <table:table-cell table:style-name="ce2" table:number-columns-repeated="23"/>
          <table:table-cell table:number-columns-repeated="16355"/>
        </table:table-row>
        <table:table-row table:style-name="ro1">
          <table:table-cell table:style-name="ce1" office:value-type="string" calcext:value-type="string">
            <text:p>BLACK WIDOW</text:p>
          </table:table-cell>
          <table:table-cell table:style-name="ce1" office:value-type="string" calcext:value-type="string">
            <text:p>Edge Dancer</text:p>
          </table:table-cell>
          <table:table-cell table:style-name="ce1" office:value-type="string" calcext:value-type="string">
            <text:p><text:a xlink:href="https://r.res.easebar.com/pic/20241205/63a7474c-3d1a-4db1-933a-c70c5a37e9ca.png" xlink:type="simple">https://r.res.easebar.com/pic/20241205/63a7474c-3d1a-4db1-933a-c70c5a37e9ca.png</text:a></text:p>
          </table:table-cell>
          <table:table-cell table:style-name="ce1" office:value-type="string" calcext:value-type="string">
            <text:p>Unleash a spinning kick to Knock enemies airborne. Landing the hit will allow her to zip to the target with a grappling hook for a second kick</text:p>
          </table:table-cell>
          <table:table-cell table:style-name="ce1" office:value-type="string" calcext:value-type="string">
            <text:p><text:a xlink:href="https://www.marvelrivals.com/20241204/41360_1198106.html" xlink:type="simple">https://www.marvelrivals.com/20241204/41360_1198106.html</text:a></text:p>
          </table:table-cell>
          <table:table-cell table:style-name="ce1" office:value-type="string" calcext:value-type="string">
            <text:p>Mantis - Spore Slumber, Luna Snow - Ice Arts, Phoenix - Telepathic Illusion, Phoenix - Telekinesis Burst, Emma Frost - Diamond Form, Invisible Woman - Covert Advance, Psylocke - Psychic Stealth, Loki - Deception, Jeff the Land Shark - Hide and Seek, Hulk - HULK SMASH!, Hulk - Indestructible Guard, Hulk - World Breaker, Jeff the Land Shark - Hide and Seek, The Punisher - Culling Turret, </text:p>
          </table:table-cell>
          <table:table-cell table:style-name="ce2" table:number-columns-repeated="23"/>
          <table:table-cell table:number-columns-repeated="16355"/>
        </table:table-row>
        <table:table-row table:style-name="ro1">
          <table:table-cell table:style-name="ce1" office:value-type="string" calcext:value-type="string">
            <text:p>BLACK WIDOW</text:p>
          </table:table-cell>
          <table:table-cell table:style-name="ce1" office:value-type="string" calcext:value-type="string">
            <text:p>Straight Shooter</text:p>
          </table:table-cell>
          <table:table-cell table:style-name="ce1" office:value-type="string" calcext:value-type="string">
            <text:p><text:a xlink:href="https://r.res.easebar.com/pic/20241205/6361d366-98b8-4268-825e-1371bf7c99f0.png" xlink:type="simple">https://r.res.easebar.com/pic/20241205/6361d366-98b8-4268-825e-1371bf7c99f0.png</text:a></text:p>
          </table:table-cell>
          <table:table-cell table:style-name="ce1" office:value-type="string" calcext:value-type="string">
            <text:p>Switch the Red Room Rifle to Sniper mode to fire high-energy rounds</text:p>
          </table:table-cell>
          <table:table-cell table:style-name="ce1" office:value-type="string" calcext:value-type="string">
            <text:p><text:a xlink:href="https://www.marvelrivals.com/20241204/41360_1198106.html" xlink:type="simple">https://www.marvelrivals.com/20241204/41360_1198106.html</text:a></text:p>
          </table:table-cell>
          <table:table-cell table:style-name="ce2" table:number-columns-repeated="24"/>
          <table:table-cell table:number-columns-repeated="16355"/>
        </table:table-row>
        <table:table-row table:style-name="ro1">
          <table:table-cell table:style-name="ce1" office:value-type="string" calcext:value-type="string">
            <text:p>BLACK WIDOW</text:p>
          </table:table-cell>
          <table:table-cell table:style-name="ce1" office:value-type="string" calcext:value-type="string">
            <text:p>PHOENIX SNIPER</text:p>
          </table:table-cell>
          <table:table-cell table:style-name="ce1" office:value-type="string" calcext:value-type="string">
            <text:p><text:a xlink:href="https://r.res.easebar.com/pic/20251115/4763cec7-ceb7-4b14-8bd7-4d7d2b7a16ac.png" xlink:type="simple">https://r.res.easebar.com/pic/20251115/4763cec7-ceb7-4b14-8bd7-4d7d2b7a16ac.png</text:a></text:p>
          </table:table-cell>
          <table:table-cell table:style-name="ce1" office:value-type="string" calcext:value-type="string">
            <text:p>Jean Grey imbues Wolverine and Black Widow with the awe-inspiring Phoenix Force. When active, Wolverine's Feral Leap transforms into Phoenix Warrior, gaining lifesteal on all damage dealt and enveloping him with Phoenix flames that scorch nearby enemies, dealing Percentage Damage. Black Widow gains Phoenix Force-empowered bullets; her Phoenix Rounds explode on impact and heal allies in the blast radius</text:p>
          </table:table-cell>
          <table:table-cell table:style-name="ce1" office:value-type="string" calcext:value-type="string">
            <text:p><text:a xlink:href="https://www.marvelrivals.com/20241204/41360_1198106.html" xlink:type="simple">https://www.marvelrivals.com/20241204/41360_1198106.html</text:a></text:p>
          </table:table-cell>
          <table:table-cell table:style-name="ce2" table:number-columns-repeated="24"/>
          <table:table-cell table:number-columns-repeated="16355"/>
        </table:table-row>
        <table:table-row table:style-name="ro1">
          <table:table-cell table:style-name="ce1" office:value-type="string" calcext:value-type="string">
            <text:p>WOLVERINE</text:p>
          </table:table-cell>
          <table:table-cell table:style-name="ce1" office:value-type="string" calcext:value-type="string">
            <text:p>Savage Claw</text:p>
          </table:table-cell>
          <table:table-cell table:style-name="ce1" office:value-type="string" calcext:value-type="string">
            <text:p><text:a xlink:href="https://r.res.easebar.com/pic/20241205/97b1d4c6-7ea2-43f2-b528-5ea88904853f.png" xlink:type="simple">https://r.res.easebar.com/pic/20241205/97b1d4c6-7ea2-43f2-b528-5ea88904853f.png</text:a></text:p>
          </table:table-cell>
          <table:table-cell table:style-name="ce1" office:value-type="string" calcext:value-type="string">
            <text:p>Slash with Adamantium claws for a Claw Strike. Unleashing Feral Leap will enhance it to Berserk Claw Strike for a brief period</text:p>
          </table:table-cell>
          <table:table-cell table:style-name="ce1" office:value-type="string" calcext:value-type="string">
            <text:p><text:a xlink:href="https://www.marvelrivals.com/20241204/41360_1198101.html" xlink:type="simple">https://www.marvelrivals.com/20241204/41360_1198101.html</text:a></text:p>
          </table:table-cell>
          <table:table-cell table:style-name="ce1" office:value-type="string" calcext:value-type="string">
            <text:p>Squirrel Girl - Unbeatable Squirrel Hawkeye - Piercing Arrow,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WOLVERINE</text:p>
          </table:table-cell>
          <table:table-cell table:style-name="ce1" office:value-type="string" calcext:value-type="string">
            <text:p>Last Stand</text:p>
          </table:table-cell>
          <table:table-cell table:style-name="ce1" office:value-type="string" calcext:value-type="string">
            <text:p><text:a xlink:href="https://r.res.easebar.com/pic/20241205/6900d5e2-7074-4c28-a424-4015ad9780a8.png" xlink:type="simple">https://r.res.easebar.com/pic/20241205/6900d5e2-7074-4c28-a424-4015ad9780a8.png</text:a></text:p>
          </table:table-cell>
          <table:table-cell table:style-name="ce1" office:value-type="string" calcext:value-type="string">
            <text:p>Knock enemies ahead airborne and spiral through the air, sweeping up enemies along the path and delivering a devastating impact at the landing point</text:p>
          </table:table-cell>
          <table:table-cell table:style-name="ce1" office:value-type="string" calcext:value-type="string">
            <text:p><text:a xlink:href="https://www.marvelrivals.com/20241204/41360_1198101.html" xlink:type="simple">https://www.marvelrivals.com/20241204/41360_1198101.html</text:a></text:p>
          </table:table-cell>
          <table:table-cell table:style-name="ce1" office:value-type="string" calcext:value-type="string">
            <text:p>Mantis - Soul Resurgence, Luna Snow - Fate of Both Worlds, Mantis - Spore Slumber, Luna Snow - Ice Arts, Phoenix - Telepathic Illusion, The Thing - Yancy Street Charge, The Thing - Unyielding Will, Mister Fantastic - Distended Grip, Mister Fantastic - Reflexive Rubber, Wolverine - Regenerative Healing Factor, Cloak&amp;Dagger - Dark Teleportation, Iron Fist - Dragon's Defense, Namor - Blessing of the Deep, Magik - Stepping Discs, Star-Lord - Stellar Shift, The Punisher - Culling Turret,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WOLVERINE</text:p>
          </table:table-cell>
          <table:table-cell table:style-name="ce1" office:value-type="string" calcext:value-type="string">
            <text:p>Feral Leap</text:p>
          </table:table-cell>
          <table:table-cell table:style-name="ce1" office:value-type="string" calcext:value-type="string">
            <text:p><text:a xlink:href="https://r.res.easebar.com/pic/20241205/e88c7523-3fab-4cfb-a954-080c5824f0fe.png" xlink:type="simple">https://r.res.easebar.com/pic/20241205/e88c7523-3fab-4cfb-a954-080c5824f0fe.png</text:a></text:p>
          </table:table-cell>
          <table:table-cell table:style-name="ce1" office:value-type="string" calcext:value-type="string">
            <text:p>Leap like an animal to snatch the first enemy upon impact and Smash them to the ground. Unleashing this ability will enhance his normal attack to Berserk Claw Strike for a brief period</text:p>
          </table:table-cell>
          <table:table-cell table:style-name="ce1" office:value-type="string" calcext:value-type="string">
            <text:p><text:a xlink:href="https://www.marvelrivals.com/20241204/41360_1198101.html" xlink:type="simple">https://www.marvelrivals.com/20241204/41360_1198101.html</text:a></text:p>
          </table:table-cell>
          <table:table-cell table:style-name="ce1" office:value-type="string" calcext:value-type="string">
            <text:p>Angela - Assassin's Charge, Phoenix - Telepathic Illusion, Emma Frost - Diamond Form, Emma Frost - Crystal Kick, Emma Frost - Carbon Crush, The Thing - Yancy Street Charge, Black Cat - Mento-Fish, The Thing - Unyielding Will, Mister Fantastic - Distended Grip, Squirrel Girl - Tail Bounce, Squirrel Girl - Squirrel Blockade, Winter Soldier - Trooper's Fist, Winter Soldier - Bionic Hook, Magik - Stepping Discs, Iron Fist - Dragon's Defense, Star-Lord - Stellar Shift, Spider-man - Get Over Here!, Hela - Soul Drainer, Jeff the Land Shark - Hide and Seek, </text:p>
          </table:table-cell>
          <table:table-cell table:style-name="ce2" table:number-columns-repeated="23"/>
          <table:table-cell table:number-columns-repeated="16355"/>
        </table:table-row>
        <table:table-row table:style-name="ro1">
          <table:table-cell table:style-name="ce1" office:value-type="string" calcext:value-type="string">
            <text:p>WOLVERINE</text:p>
          </table:table-cell>
          <table:table-cell table:style-name="ce1" office:value-type="string" calcext:value-type="string">
            <text:p>Undying Animal</text:p>
          </table:table-cell>
          <table:table-cell table:style-name="ce1" office:value-type="string" calcext:value-type="string">
            <text:p><text:a xlink:href="https://r.res.easebar.com/pic/20241205/15a76d54-520c-447a-b8f1-2ab0a488faac.png" xlink:type="simple">https://r.res.easebar.com/pic/20241205/15a76d54-520c-447a-b8f1-2ab0a488faac.png</text:a></text:p>
          </table:table-cell>
          <table:table-cell table:style-name="ce1" office:value-type="string" calcext:value-type="string">
            <text:p>Unleash a fierce howl to briefly reduce incoming damage</text:p>
          </table:table-cell>
          <table:table-cell table:style-name="ce1" office:value-type="string" calcext:value-type="string">
            <text:p><text:a xlink:href="https://www.marvelrivals.com/20241204/41360_1198101.html" xlink:type="simple">https://www.marvelrivals.com/20241204/41360_1198101.html</text:a></text:p>
          </table:table-cell>
          <table:table-cell table:style-name="ce1" office:value-type="string" calcext:value-type="string">
            <text:p>Mantis - Spore Slumber, Luna Snow - Ice Arts, Black Widow - Electro-Plasma Explosion, Black Widow - Edge Dancer,</text:p>
          </table:table-cell>
          <table:table-cell table:style-name="ce2" table:number-columns-repeated="23"/>
          <table:table-cell table:number-columns-repeated="16355"/>
        </table:table-row>
        <table:table-row table:style-name="ro1">
          <table:table-cell table:style-name="ce1" office:value-type="string" calcext:value-type="string">
            <text:p>WOLVERINE</text:p>
          </table:table-cell>
          <table:table-cell table:style-name="ce1" office:value-type="string" calcext:value-type="string">
            <text:p>Vicious Rampage</text:p>
          </table:table-cell>
          <table:table-cell table:style-name="ce1" office:value-type="string" calcext:value-type="string">
            <text:p><text:a xlink:href="https://r.res.easebar.com/pic/20241205/a015b659-87d4-4569-a870-4af03347ecb3.png" xlink:type="simple">https://r.res.easebar.com/pic/20241205/a015b659-87d4-4569-a870-4af03347ecb3.png</text:a></text:p>
          </table:table-cell>
          <table:table-cell table:style-name="ce1" office:value-type="string" calcext:value-type="string">
            <text:p>Dash forward and unleash a Claw Strike</text:p>
          </table:table-cell>
          <table:table-cell table:style-name="ce1" office:value-type="string" calcext:value-type="string">
            <text:p><text:a xlink:href="https://www.marvelrivals.com/20241204/41360_1198101.html" xlink:type="simple">https://www.marvelrivals.com/20241204/41360_1198101.html</text:a></text:p>
          </table:table-cell>
          <table:table-cell table:style-name="ce1" office:value-type="string" calcext:value-type="string">
            <text:p>Invisible Woman - Force Physics, Mister Fantastic - Distended Grip, Squirrel Girl - Tail Bounce, Squirrel Girl - Squirrel Blockade, Moon Knight - Ancient Ankh, Winter Soldier - Trooper's Fist, Winter Soldier - Bionic Hook, Magik - Stepping Discs, Iron Fist - Dragon's Defense, Star-Lord - Stellar Shift,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WOLVERINE</text:p>
          </table:table-cell>
          <table:table-cell table:style-name="ce1" office:value-type="string" calcext:value-type="string">
            <text:p>Regenerative Healing Factor</text:p>
          </table:table-cell>
          <table:table-cell table:style-name="ce1" office:value-type="string" calcext:value-type="string">
            <text:p><text:a xlink:href="https://r.res.easebar.com/pic/20241205/031e30b1-f8d7-4be1-9a03-b758bdddc6be.png" xlink:type="simple">https://r.res.easebar.com/pic/20241205/031e30b1-f8d7-4be1-9a03-b758bdddc6be.png</text:a></text:p>
          </table:table-cell>
          <table:table-cell table:style-name="ce1" office:value-type="string" calcext:value-type="string">
            <text:p>Begin to heal and rise with a hefty Bonus Health, shaking off all debuffs. After a brief moment, any remaining Bonus Health morphs into a one-off heal, zeroing out his Rage. Assists in KOs reduce this cooldown</text:p>
          </table:table-cell>
          <table:table-cell table:style-name="ce1" office:value-type="string" calcext:value-type="string">
            <text:p><text:a xlink:href="https://www.marvelrivals.com/20241204/41360_1198101.html" xlink:type="simple">https://www.marvelrivals.com/20241204/41360_1198101.html</text:a></text:p>
          </table:table-cell>
          <table:table-cell table:style-name="ce1" office:value-type="string" calcext:value-type="string">
            <text:p>Phoenix - Endsong Inferno, Winter Soldier - Kraken Impact,</text:p>
          </table:table-cell>
          <table:table-cell table:style-name="ce2" table:number-columns-repeated="23"/>
          <table:table-cell table:number-columns-repeated="16355"/>
        </table:table-row>
        <table:table-row table:style-name="ro1">
          <table:table-cell table:style-name="ce1" office:value-type="string" calcext:value-type="string">
            <text:p>WOLVERINE</text:p>
          </table:table-cell>
          <table:table-cell table:style-name="ce1" office:value-type="string" calcext:value-type="string">
            <text:p>Berserker Rage</text:p>
          </table:table-cell>
          <table:table-cell table:style-name="ce1" office:value-type="string" calcext:value-type="string">
            <text:p><text:a xlink:href="https://r.res.easebar.com/pic/20241205/e97de2d3-6f28-4619-80cd-59da00931e8b.png" xlink:type="simple">https://r.res.easebar.com/pic/20241205/e97de2d3-6f28-4619-80cd-59da00931e8b.png</text:a></text:p>
          </table:table-cell>
          <table:table-cell table:style-name="ce1" office:value-type="string" calcext:value-type="string">
            <text:p>Rage builds when Wolverine attacks or takes hits, boosting the damage of his Claw Strikes and the Bonus Health from his regenerative healing factor</text:p>
          </table:table-cell>
          <table:table-cell table:style-name="ce1" office:value-type="string" calcext:value-type="string">
            <text:p><text:a xlink:href="https://www.marvelrivals.com/20241204/41360_1198101.html" xlink:type="simple">https://www.marvelrivals.com/20241204/41360_1198101.html</text:a></text:p>
          </table:table-cell>
          <table:table-cell table:style-name="ce2" table:number-columns-repeated="24"/>
          <table:table-cell table:number-columns-repeated="16355"/>
        </table:table-row>
        <table:table-row table:style-name="ro1">
          <table:table-cell table:style-name="ce1" office:value-type="string" calcext:value-type="string">
            <text:p>WOLVERINE</text:p>
          </table:table-cell>
          <table:table-cell table:style-name="ce1" office:value-type="string" calcext:value-type="string">
            <text:p>Phoenix Warrior</text:p>
          </table:table-cell>
          <table:table-cell table:style-name="ce1" office:value-type="string" calcext:value-type="string">
            <text:p><text:a xlink:href="https://r.res.easebar.com/pic/20250712/052fd724-4a96-47a3-97d7-fef8ac9056ac.png" xlink:type="simple">https://r.res.easebar.com/pic/20250712/052fd724-4a96-47a3-97d7-fef8ac9056ac.png</text:a></text:p>
          </table:table-cell>
          <table:table-cell table:style-name="ce1" office:value-type="string" calcext:value-type="string">
            <text:p>Wolverine and Hulk can interact with each other. Once both parties confirm, Hulk can lift Wolverine and press the key to hurl him forwardJean Grey imbues Wolverine with the awe-inspiring Phoenix Force. With this power, Wolverine's Feral Leap transforms into Phoenix Warrior. While active, he is enveloped in Phoenix flames that continuously scorch him and nearby enemies, dealing Percentage Damage. In this state, Wolverine's abilities gain Lifesteal when inflicting damage</text:p>
          </table:table-cell>
          <table:table-cell table:style-name="ce1" office:value-type="string" calcext:value-type="string">
            <text:p><text:a xlink:href="https://www.marvelrivals.com/20241204/41360_1198101.html" xlink:type="simple">https://www.marvelrivals.com/20241204/41360_1198101.html</text:a></text:p>
          </table:table-cell>
          <table:table-cell table:style-name="ce2" table:number-columns-repeated="24"/>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Darkforce Cloak</text:p>
          </table:table-cell>
          <table:table-cell table:style-name="ce1" office:value-type="string" calcext:value-type="string">
            <text:p><text:a xlink:href="https://r.res.easebar.com/pic/20241205/94227f4c-02fd-4954-900c-f149b05b5cea.png" xlink:type="simple">https://r.res.easebar.com/pic/20241205/94227f4c-02fd-4954-900c-f149b05b5cea.png</text:a></text:p>
          </table:table-cell>
          <table:table-cell table:style-name="ce1" office:value-type="string" calcext:value-type="string">
            <text:p>Inflict continuous damage on an enemy</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Eternal Bond</text:p>
          </table:table-cell>
          <table:table-cell table:style-name="ce1" office:value-type="string" calcext:value-type="string">
            <text:p><text:a xlink:href="https://r.res.easebar.com/pic/20241205/9791de0a-9b39-4111-a535-77a8fccaef5a.png" xlink:type="simple">https://r.res.easebar.com/pic/20241205/9791de0a-9b39-4111-a535-77a8fccaef5a.png</text:a></text:p>
          </table:table-cell>
          <table:table-cell table:style-name="ce1" office:value-type="string" calcext:value-type="string">
            <text:p>Perform four rapid dashes, healing allies and damaging enemies along the path</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1" office:value-type="string" calcext:value-type="string">
            <text:p>Angela - Assassin's Charge, Blade - Thousand-Fold Slash, Wolverine - Last Stand, Wolverine - Feral Leap, Psylocke - Dance of the Butterfly, Hawkeye - Piercing Arrow, Iron Man - Invincible Pulse Cannon, Moon Knight - Hand of Khonshu, Namor - Horn of Proteus, Scarlet Witch - Reality Erasure, Winter Soldier - Trooper's Fist, Winter Soldier - Bionic Hook, Spider-man - Get Over Here!, Jeff the Land Shark - It's Jeff!, The Punisher - Deliverance, The Punisher - Final Judgement,</text:p>
          </table:table-cell>
          <table:table-cell table:style-name="ce2" table:number-columns-repeated="23"/>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Light's Embrace</text:p>
          </table:table-cell>
          <table:table-cell table:style-name="ce1" office:value-type="string" calcext:value-type="string">
            <text:p><text:a xlink:href="https://r.res.easebar.com/pic/20241205/d79fe95c-03cf-4d39-97ce-a2af95dd180b.png" xlink:type="simple">https://r.res.easebar.com/pic/20241205/d79fe95c-03cf-4d39-97ce-a2af95dd180b.png</text:a></text:p>
          </table:table-cell>
          <table:table-cell table:style-name="ce1" office:value-type="string" calcext:value-type="string">
            <text:p>Switch to Dagger</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1" office:value-type="string" calcext:value-type="string">
            <text:p>Scarlet Witch - Dark Seal,</text:p>
          </table:table-cell>
          <table:table-cell table:style-name="ce2" table:number-columns-repeated="23"/>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Terror Cape</text:p>
          </table:table-cell>
          <table:table-cell table:style-name="ce1" office:value-type="string" calcext:value-type="string">
            <text:p><text:a xlink:href="https://r.res.easebar.com/pic/20241205/a57ebbc2-dcf5-4511-8a5e-7291aefbaf3f.png" xlink:type="simple">https://r.res.easebar.com/pic/20241205/a57ebbc2-dcf5-4511-8a5e-7291aefbaf3f.png</text:a></text:p>
          </table:table-cell>
          <table:table-cell table:style-name="ce1" office:value-type="string" calcext:value-type="string">
            <text:p>Deploy a Veil of Darkforce to damage enemies upon touch, applying Blind to narrow their sight and Vulnerability to amplify damage received</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1" office:value-type="string" calcext:value-type="string">
            <text:p>Emma Frost - Diamond Form, Emma Frost - Mind's Aegis, Captain America - Living Legend, Magneto - Metallic Curtain, Doctor Strange - Shield of the Seraphim, Groot - Thornlash Wall, Groot - Ironwood Wall, Deadpool - Magical Unicorn Shield!, Invisible Woman - Guardian Shield, The Thing - Yancy Street Charge, Iron Fist - Dragon's Defense, Namor - Blessing of the Deep, Magik - Stepping Discs, Star-Lord - Stellar Shift, Jeff the Land Shark - Hide and Seek, The Punisher - Culling Turret, The Punisher - Final Judgement,</text:p>
          </table:table-cell>
          <table:table-cell table:style-name="ce2" table:number-columns-repeated="23"/>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Dark Teleportation</text:p>
          </table:table-cell>
          <table:table-cell table:style-name="ce1" office:value-type="string" calcext:value-type="string">
            <text:p><text:a xlink:href="https://r.res.easebar.com/pic/20241205/08104768-56d7-4bda-84ae-bd4cd7245223.png" xlink:type="simple">https://r.res.easebar.com/pic/20241205/08104768-56d7-4bda-84ae-bd4cd7245223.png</text:a></text:p>
          </table:table-cell>
          <table:table-cell table:style-name="ce1" office:value-type="string" calcext:value-type="string">
            <text:p>Enshroud nearby allies in the Darkforce Dimension, plunging them into the Phased state, making them untargetable and invisible to enemies and granting them a Movement Boost</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2"/>
          <table:table-cell table:style-name="ce1" office:value-type="string" calcext:value-type="string">
            <text:p>If Cloak is trying to Dark Teleport his allies, nine times out of ten it will only be for a millisecond because Cloak's teammates need to avoid attacking or shooting to use the full 2 seconds. If you were targeting Cloak, she can't be healed in this state so you just have to follow center of the visible boundary he casts and continue the attack.</text:p>
          </table:table-cell>
          <table:table-cell table:style-name="ce2" table:number-columns-repeated="22"/>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FROM SHADOW TO LIGHT</text:p>
          </table:table-cell>
          <table:table-cell table:style-name="ce1" office:value-type="string" calcext:value-type="string">
            <text:p><text:a xlink:href="https://r.res.easebar.com/pic/20251115/9a215533-35d3-4b33-b726-f9696b57259c.png" xlink:type="simple">https://r.res.easebar.com/pic/20251115/9a215533-35d3-4b33-b726-f9696b57259c.png</text:a></text:p>
          </table:table-cell>
          <table:table-cell table:style-name="ce1" office:value-type="string" calcext:value-type="string">
            <text:p>Cloak &amp; Dagger inject light and dark energy into Hawkeye's katana. When Hawkeye uses Crescent Slash, enemies hit are launched back, and a blade wave filled with light and energy sweeps forward. This wave passes through both allies and enemies: it heals and boosts healing for allies, while damaging enemies and applying Vulnerability</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2" table:number-columns-repeated="24"/>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Lightforce Dagger</text:p>
          </table:table-cell>
          <table:table-cell table:style-name="ce1" office:value-type="string" calcext:value-type="string">
            <text:p><text:a xlink:href="https://r.res.easebar.com/pic/20241205/5211b159-6fa8-4589-829f-facb1c455241.png" xlink:type="simple">https://r.res.easebar.com/pic/20241205/5211b159-6fa8-4589-829f-facb1c455241.png</text:a></text:p>
          </table:table-cell>
          <table:table-cell table:style-name="ce1" office:value-type="string" calcext:value-type="string">
            <text:p>Unleash a bouncing Lightforce Dagger to damage enemies and heal nearby allies</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Shadow's Embrace</text:p>
          </table:table-cell>
          <table:table-cell table:style-name="ce1" office:value-type="string" calcext:value-type="string">
            <text:p><text:a xlink:href="https://r.res.easebar.com/pic/20241205/3e810039-6b5c-43e0-b1c6-22808f1ee3cf.png" xlink:type="simple">https://r.res.easebar.com/pic/20241205/3e810039-6b5c-43e0-b1c6-22808f1ee3cf.png</text:a></text:p>
          </table:table-cell>
          <table:table-cell table:style-name="ce1" office:value-type="string" calcext:value-type="string">
            <text:p>Switch to Cloak</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1" office:value-type="string" calcext:value-type="string">
            <text:p>Scarlet Witch - Dark Seal,</text:p>
          </table:table-cell>
          <table:table-cell table:style-name="ce2" table:number-columns-repeated="23"/>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Veil of Lightforce</text:p>
          </table:table-cell>
          <table:table-cell table:style-name="ce1" office:value-type="string" calcext:value-type="string">
            <text:p><text:a xlink:href="https://r.res.easebar.com/pic/20241205/b2149229-d3c4-4056-9fa4-04704c96c3af.png" xlink:type="simple">https://r.res.easebar.com/pic/20241205/b2149229-d3c4-4056-9fa4-04704c96c3af.png</text:a></text:p>
          </table:table-cell>
          <table:table-cell table:style-name="ce1" office:value-type="string" calcext:value-type="string">
            <text:p>Deploy a Veil of Lightforce to heal allies upon touch and grant them a Healing Boost</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1" office:value-type="string" calcext:value-type="string">
            <text:p>Blade - Thousand-Fold Slash, Blade - Daywalker Dash, 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CLOAK&amp;DAGGER</text:p>
          </table:table-cell>
          <table:table-cell table:style-name="ce1" office:value-type="string" calcext:value-type="string">
            <text:p>Dagger Storm</text:p>
          </table:table-cell>
          <table:table-cell table:style-name="ce1" office:value-type="string" calcext:value-type="string">
            <text:p><text:a xlink:href="https://r.res.easebar.com/pic/20241205/a106ebc0-80b0-4dd9-bf68-0c19f464e8bc.png" xlink:type="simple">https://r.res.easebar.com/pic/20241205/a106ebc0-80b0-4dd9-bf68-0c19f464e8bc.png</text:a></text:p>
          </table:table-cell>
          <table:table-cell table:style-name="ce1" office:value-type="string" calcext:value-type="string">
            <text:p>Launch a volley of daggers, creating a Healing Over Time field in the impact area</text:p>
          </table:table-cell>
          <table:table-cell table:style-name="ce1" office:value-type="string" calcext:value-type="string">
            <text:p><text:a xlink:href="https://www.marvelrivals.com/20241204/41360_1198095.html" xlink:type="simple">https://www.marvelrivals.com/20241204/41360_1198095.html</text:a></text:p>
          </table:table-cell>
          <table:table-cell table:style-name="ce1" office:value-type="string" calcext:value-type="string">
            <text:p>Blade - Daywalker Dash, Moon Knight - Hand of Khonshu, Moon Knight - Ancient Ankh,</text:p>
          </table:table-cell>
          <table:table-cell table:style-name="ce2" table:number-columns-repeated="23"/>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Jeet Kune Do</text:p>
          </table:table-cell>
          <table:table-cell table:style-name="ce1" office:value-type="string" calcext:value-type="string">
            <text:p><text:a xlink:href="https://r.res.easebar.com/pic/20241205/08e65caa-9aa0-425c-aeba-fa1544c03be2.png" xlink:type="simple">https://r.res.easebar.com/pic/20241205/08e65caa-9aa0-425c-aeba-fa1544c03be2.png</text:a></text:p>
          </table:table-cell>
          <table:table-cell table:style-name="ce1" office:value-type="string" calcext:value-type="string">
            <text:p>Strike the targeted enemy with Jeet Kune Do, reducing the cooldown of Block and Strike with every hit</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1" office:value-type="string" calcext:value-type="string">
            <text:p>The Thing - Unyielding Will, Black Widow - Electro-Plasma Explosion, Hawkeye - Piercing Arrow, Hawkeye - Blast Arrow, 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Yat Jee Chung Kuen</text:p>
          </table:table-cell>
          <table:table-cell table:style-name="ce1" office:value-type="string" calcext:value-type="string">
            <text:p><text:a xlink:href="https://r.res.easebar.com/pic/20241205/fd8bfe86-ffd7-4752-9da3-d005bafa8668.png" xlink:type="simple">https://r.res.easebar.com/pic/20241205/fd8bfe86-ffd7-4752-9da3-d005bafa8668.png</text:a></text:p>
          </table:table-cell>
          <table:table-cell table:style-name="ce1" office:value-type="string" calcext:value-type="string">
            <text:p>Dash forward to pursue the targeted enemy and unleash a flurry of attacks</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1" office:value-type="string" calcext:value-type="string">
            <text:p>Cloak&amp;Dagger - Terror Cape, Cloak&amp;Dagger - Dark Teleportation, Invisible Woman - Invisible Boundary, Invisible Woman - Veiled Step, Loki - Deception, Emma Frost - Psionic Seduction, Moon Knight - Ancient Ankh, Namor - Horn of Proteus,</text:p>
          </table:table-cell>
          <table:table-cell table:style-name="ce2" table:number-columns-repeated="23"/>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Living Chi</text:p>
          </table:table-cell>
          <table:table-cell table:style-name="ce1" office:value-type="string" calcext:value-type="string">
            <text:p><text:a xlink:href="https://r.res.easebar.com/pic/20241205/080f088b-94dd-45ac-9bc7-9e5c512d51d0.png" xlink:type="simple">https://r.res.easebar.com/pic/20241205/080f088b-94dd-45ac-9bc7-9e5c512d51d0.png</text:a></text:p>
          </table:table-cell>
          <table:table-cell table:style-name="ce1" office:value-type="string" calcext:value-type="string">
            <text:p>Become living Chi to boost his speed, damage, and attack range, delivering stronger punches while reducing the cooldown of Dragon's Defense</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1" office:value-type="string" calcext:value-type="string">
            <text:p>Mantis - Soul Resurgence, Luna Snow - Fate of Both Worlds, Mantis - Spore Slumber, Luna Snow - Ice Arts, Emma Frost - Psionic Seduction, Cloak&amp;Dagger - Eternal Bond, Cloak&amp;Dagger - Terror Cape, Cloak&amp;Dagger - Dark Teleportation, Star-Lord - Galactic Legend,</text:p>
          </table:table-cell>
          <table:table-cell table:style-name="ce2" table:number-columns-repeated="23"/>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K'un-Lun Kick</text:p>
          </table:table-cell>
          <table:table-cell table:style-name="ce1" office:value-type="string" calcext:value-type="string">
            <text:p><text:a xlink:href="https://r.res.easebar.com/pic/20241205/e5377516-d352-4169-bb87-7bd68523dda7.png" xlink:type="simple">https://r.res.easebar.com/pic/20241205/e5377516-d352-4169-bb87-7bd68523dda7.png</text:a></text:p>
          </table:table-cell>
          <table:table-cell table:style-name="ce1" office:value-type="string" calcext:value-type="string">
            <text:p>Dash forward, delivering a flying kick when hitting an enemy or reaching full range, dealing damage to nearby enemies. Damage increases with lower enemy health</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1" office:value-type="string" calcext:value-type="string">
            <text:p>The Thing - Unyielding Will, Invisible Woman - Force Physics, Mister Fantastic - Distended Grip, Squirrel Girl - Squirrel Blockade, Black Widow - Edge Dancer, Iron Fist - Yat Jee Chung Kuen, Hela - Soul Drainer,</text:p>
          </table:table-cell>
          <table:table-cell table:style-name="ce2" table:number-columns-repeated="23"/>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Harmony Recovery</text:p>
          </table:table-cell>
          <table:table-cell table:style-name="ce1" office:value-type="string" calcext:value-type="string">
            <text:p><text:a xlink:href="https://r.res.easebar.com/pic/20241205/14e2c16b-cf9f-4e49-bef0-690bcc3d910c.png" xlink:type="simple">https://r.res.easebar.com/pic/20241205/14e2c16b-cf9f-4e49-bef0-690bcc3d910c.png</text:a></text:p>
          </table:table-cell>
          <table:table-cell table:style-name="ce1" office:value-type="string" calcext:value-type="string">
            <text:p>Cross legs and channel Chi, slowly gaining Bonus Health</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1" office:value-type="string" calcext:value-type="string">
            <text:p>Angela - Assassin's Charge, Phoenix - Endsong Inferno,</text:p>
          </table:table-cell>
          <table:table-cell table:style-name="ce2" table:number-columns-repeated="23"/>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Crane Leap</text:p>
          </table:table-cell>
          <table:table-cell table:style-name="ce1" office:value-type="string" calcext:value-type="string">
            <text:p><text:a xlink:href="https://r.res.easebar.com/pic/20241205/62f2f94b-228c-4015-9d56-b9134c171cf5.png" xlink:type="simple">https://r.res.easebar.com/pic/20241205/62f2f94b-228c-4015-9d56-b9134c171cf5.png</text:a></text:p>
          </table:table-cell>
          <table:table-cell table:style-name="ce1" office:value-type="string" calcext:value-type="string">
            <text:p>Perform up to three consecutive jumps while airborne</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1" office:value-type="string" calcext:value-type="string">
            <text:p>Invisible Woman - Force Physics, Mister Fantastic - Distended Grip, Squirrel Girl - Squirrel Blockade, Black Widow - Edge Dancer, Iron Fist - Yat Jee Chung Kuen, Winter Soldier - Trooper's Fist,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Dragon's Defense</text:p>
          </table:table-cell>
          <table:table-cell table:style-name="ce1" office:value-type="string" calcext:value-type="string">
            <text:p><text:a xlink:href="https://r.res.easebar.com/pic/20241205/5745baab-4f3f-47f0-9eb0-8b8ea67f81f2.png" xlink:type="simple">https://r.res.easebar.com/pic/20241205/5745baab-4f3f-47f0-9eb0-8b8ea67f81f2.png</text:a></text:p>
          </table:table-cell>
          <table:table-cell table:style-name="ce1" office:value-type="string" calcext:value-type="string">
            <text:p>Assume a defensive stance with a boost of Chi to block incoming attacks and gain Damage Reduction, then strike back with Yat Jee Chung Kuen</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2" table:number-columns-repeated="24"/>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Wall Runner</text:p>
          </table:table-cell>
          <table:table-cell table:style-name="ce1" office:value-type="string" calcext:value-type="string">
            <text:p><text:a xlink:href="https://r.res.easebar.com/pic/20241205/53125bd3-2ca7-4b39-a51c-bac18c6ecfdd.png" xlink:type="simple">https://r.res.easebar.com/pic/20241205/53125bd3-2ca7-4b39-a51c-bac18c6ecfdd.png</text:a></text:p>
          </table:table-cell>
          <table:table-cell table:style-name="ce1" office:value-type="string" calcext:value-type="string">
            <text:p>Run horizontally along the walls</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1" office:value-type="string" calcext:value-type="string">
            <text:p>Invisible Woman - Force Physics, Mister Fantastic - Distended Grip, Squirrel Girl - Squirrel Blockade, Black Widow - Edge Dancer, Iron Fist - Yat Jee Chung Kuen, Winter Soldier - Trooper's Fist,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Chi Absorption</text:p>
          </table:table-cell>
          <table:table-cell table:style-name="ce1" office:value-type="string" calcext:value-type="string">
            <text:p><text:a xlink:href="https://r.res.easebar.com/pic/20241205/2946ce20-8956-4efb-9729-afbdaa5efc51.png" xlink:type="simple">https://r.res.easebar.com/pic/20241205/2946ce20-8956-4efb-9729-afbdaa5efc51.png</text:a></text:p>
          </table:table-cell>
          <table:table-cell table:style-name="ce1" office:value-type="string" calcext:value-type="string">
            <text:p>Assists in taking down enemies allow him to absorb their Chi and gain Bonus Health</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2" table:number-columns-repeated="24"/>
          <table:table-cell table:number-columns-repeated="16355"/>
        </table:table-row>
        <table:table-row table:style-name="ro1">
          <table:table-cell table:style-name="ce1" office:value-type="string" calcext:value-type="string">
            <text:p>IRON FIST</text:p>
          </table:table-cell>
          <table:table-cell table:style-name="ce1" office:value-type="string" calcext:value-type="string">
            <text:p>Lunar Chi</text:p>
          </table:table-cell>
          <table:table-cell table:style-name="ce1" office:value-type="string" calcext:value-type="string">
            <text:p><text:a xlink:href="https://r.res.easebar.com/pic/20250808/63e8c36e-c83a-439d-9359-5f343c7d65fa.png" xlink:type="simple">https://r.res.easebar.com/pic/20250808/63e8c36e-c83a-439d-9359-5f343c7d65fa.png</text:a></text:p>
          </table:table-cell>
          <table:table-cell table:style-name="ce1" office:value-type="string" calcext:value-type="string">
            <text:p>Luna Snow grants Winter's Chill to Hawkeye and Iron Fist. When Iron Fist activates Harmony Recovery, he can heal nearby allies with Lunar Chi</text:p>
          </table:table-cell>
          <table:table-cell table:style-name="ce1" office:value-type="string" calcext:value-type="string">
            <text:p><text:a xlink:href="https://www.marvelrivals.com/20241201/41360_1197227.html" xlink:type="simple">https://www.marvelrivals.com/20241201/41360_1197227.html</text:a></text:p>
          </table:table-cell>
          <table:table-cell table:style-name="ce1" office:value-type="string" calcext:value-type="string">
            <text:p>Phoenix - Endsong Inferno,</text:p>
          </table:table-cell>
          <table:table-cell table:style-name="ce2" table:number-columns-repeated="23"/>
          <table:table-cell table:number-columns-repeated="16355"/>
        </table:table-row>
        <table:table-row table:style-name="ro1">
          <table:table-cell table:style-name="ce1" office:value-type="string" calcext:value-type="string">
            <text:p>PSYLOCKE</text:p>
          </table:table-cell>
          <table:table-cell table:style-name="ce1" office:value-type="string" calcext:value-type="string">
            <text:p>Psionic Crossbow</text:p>
          </table:table-cell>
          <table:table-cell table:style-name="ce1" office:value-type="string" calcext:value-type="string">
            <text:p><text:a xlink:href="https://r.res.easebar.com/pic/20241127/95719d81-365d-4ad7-bf6b-026166c95aed.png" xlink:type="simple">https://r.res.easebar.com/pic/20241127/95719d81-365d-4ad7-bf6b-026166c95aed.png</text:a></text:p>
          </table:table-cell>
          <table:table-cell table:style-name="ce1" office:value-type="string" calcext:value-type="string">
            <text:p>Unleash bolts with psionic crossbows to damage enemies and reduce the cooldowns of all her abilities</text:p>
          </table:table-cell>
          <table:table-cell table:style-name="ce1" office:value-type="string" calcext:value-type="string">
            <text:p><text:a xlink:href="https://www.marvelrivals.com/20241124/41360_1195754.html" xlink:type="simple">https://www.marvelrivals.com/20241124/41360_1195754.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PSYLOCKE</text:p>
          </table:table-cell>
          <table:table-cell table:style-name="ce1" office:value-type="string" calcext:value-type="string">
            <text:p>Dance of the Butterfly</text:p>
          </table:table-cell>
          <table:table-cell table:style-name="ce1" office:value-type="string" calcext:value-type="string">
            <text:p><text:a xlink:href="https://r.res.easebar.com/pic/20241127/dabcc1e3-5490-4fa4-87ab-b9440a74b69b.png" xlink:type="simple">https://r.res.easebar.com/pic/20241127/dabcc1e3-5490-4fa4-87ab-b9440a74b69b.png</text:a></text:p>
          </table:table-cell>
          <table:table-cell table:style-name="ce1" office:value-type="string" calcext:value-type="string">
            <text:p>Slash nearby enemies with a psionic katana, dealing massive damage</text:p>
          </table:table-cell>
          <table:table-cell table:style-name="ce1" office:value-type="string" calcext:value-type="string">
            <text:p><text:a xlink:href="https://www.marvelrivals.com/20241124/41360_1195754.html" xlink:type="simple">https://www.marvelrivals.com/20241124/41360_1195754.html</text:a></text:p>
          </table:table-cell>
          <table:table-cell table:style-name="ce1" office:value-type="string" calcext:value-type="string">
            <text:p>Mantis - Soul Resurgence, Luna Snow - Fate of Both Worlds, Mantis - Spore Slumber, Luna Snow - Ice Arts, Mister Fantastic - Reflexive Rubber, Psylocke - Psychic Stealth, Invisible Woman - Veiled Step, Loki - Deception, Cloak&amp;Dagger - Dark Teleportation, Iron Fist - Dragon's Defense, Namor - Blessing of the Deep, Magik - Stepping Discs, Star-Lord - Stellar Shift, Hulk - HULK SMASH!, Hulk - Indestructible Guard, Hulk - World Breaker,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PSYLOCKE</text:p>
          </table:table-cell>
          <table:table-cell table:style-name="ce1" office:value-type="string" calcext:value-type="string">
            <text:p>Psi-Blade Dash</text:p>
          </table:table-cell>
          <table:table-cell table:style-name="ce1" office:value-type="string" calcext:value-type="string">
            <text:p><text:a xlink:href="https://r.res.easebar.com/pic/20241127/af147052-f9a1-416b-8bfc-0143471b18c1.png" xlink:type="simple">https://r.res.easebar.com/pic/20241127/af147052-f9a1-416b-8bfc-0143471b18c1.png</text:a></text:p>
          </table:table-cell>
          <table:table-cell table:style-name="ce1" office:value-type="string" calcext:value-type="string">
            <text:p>Dash forward and slice through enemies along the path with psionic blades</text:p>
          </table:table-cell>
          <table:table-cell table:style-name="ce1" office:value-type="string" calcext:value-type="string">
            <text:p><text:a xlink:href="https://www.marvelrivals.com/20241124/41360_1195754.html" xlink:type="simple">https://www.marvelrivals.com/20241124/41360_1195754.html</text:a></text:p>
          </table:table-cell>
          <table:table-cell table:style-name="ce1" office:value-type="string" calcext:value-type="string">
            <text:p>Mantis - Spore Slumber, Luna Snow - Ice Arts, Phoenix - Telekinesis Burst, The Thing - Yancy Street Charge, Black Cat - Mento-Fish, Mister Fantastic - Distended Grip, Black Widow - Edge Dancer, Iron Fist - Yat Jee Chung Kuen, Winter Soldier - Bionic Hook, Winter Soldier - Trooper's Fist,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PSYLOCKE</text:p>
          </table:table-cell>
          <table:table-cell table:style-name="ce1" office:value-type="string" calcext:value-type="string">
            <text:p>Psychic Stealth</text:p>
          </table:table-cell>
          <table:table-cell table:style-name="ce1" office:value-type="string" calcext:value-type="string">
            <text:p><text:a xlink:href="https://r.res.easebar.com/pic/20241127/55b04754-bda5-4bcf-8a95-44479c836508.png" xlink:type="simple">https://r.res.easebar.com/pic/20241127/55b04754-bda5-4bcf-8a95-44479c836508.png</text:a></text:p>
          </table:table-cell>
          <table:table-cell table:style-name="ce1" office:value-type="string" calcext:value-type="string">
            <text:p>Enter stealth and gain a Movement Boost</text:p>
          </table:table-cell>
          <table:table-cell table:style-name="ce1" office:value-type="string" calcext:value-type="string">
            <text:p><text:a xlink:href="https://www.marvelrivals.com/20241124/41360_1195754.html" xlink:type="simple">https://www.marvelrivals.com/20241124/41360_1195754.html</text:a></text:p>
          </table:table-cell>
          <table:table-cell table:style-name="ce1" office:value-type="string" calcext:value-type="string">
            <text:p>Invisible Woman - Psionic Vortex, Squirrel Girl - Unbeatable Squirrel Tsunami, Black Widow- Edge Dancer, Deadpool - Deadpool in Your Area, Star-Lord - Blaster Barrage, Thor - Lightning Realm, Magik - Eldritch Whirl, Rogue - Fatal Attraction, Spider-man - Spider-Sense, Hela - Soul Drainer, Jeff the Land Shark - Joyful Splash,</text:p>
          </table:table-cell>
          <table:table-cell table:style-name="ce2" table:number-columns-repeated="23"/>
          <table:table-cell table:number-columns-repeated="16355"/>
        </table:table-row>
        <table:table-row table:style-name="ro1">
          <table:table-cell table:style-name="ce1" office:value-type="string" calcext:value-type="string">
            <text:p>PSYLOCKE</text:p>
          </table:table-cell>
          <table:table-cell table:style-name="ce1" office:value-type="string" calcext:value-type="string">
            <text:p>Wing Shurikens</text:p>
          </table:table-cell>
          <table:table-cell table:style-name="ce1" office:value-type="string" calcext:value-type="string">
            <text:p><text:a xlink:href="https://r.res.easebar.com/pic/20241127/90b85285-ea24-4fb2-8ec4-b60d3f177569.png" xlink:type="simple">https://r.res.easebar.com/pic/20241127/90b85285-ea24-4fb2-8ec4-b60d3f177569.png</text:a></text:p>
          </table:table-cell>
          <table:table-cell table:style-name="ce1" office:value-type="string" calcext:value-type="string">
            <text:p>Launch a volley of psionic shurikens that stick to enemies, dealing damage and granting herself Bonus Health. Press again to recall the shurikens</text:p>
          </table:table-cell>
          <table:table-cell table:style-name="ce1" office:value-type="string" calcext:value-type="string">
            <text:p><text:a xlink:href="https://www.marvelrivals.com/20241124/41360_1195754.html" xlink:type="simple">https://www.marvelrivals.com/20241124/41360_1195754.html</text:a></text:p>
          </table:table-cell>
          <table:table-cell table:style-name="ce2" table:number-columns-repeated="24"/>
          <table:table-cell table:number-columns-repeated="16355"/>
        </table:table-row>
        <table:table-row table:style-name="ro1">
          <table:table-cell table:style-name="ce1" office:value-type="string" calcext:value-type="string">
            <text:p>PSYLOCKE</text:p>
          </table:table-cell>
          <table:table-cell table:style-name="ce1" office:value-type="string" calcext:value-type="string">
            <text:p>LIGHT &amp; DARK DARTS</text:p>
          </table:table-cell>
          <table:table-cell table:style-name="ce1" office:value-type="string" calcext:value-type="string">
            <text:p><text:a xlink:href="https://r.res.easebar.com/pic/20251212/67962d9c-35dd-4d15-9e06-5f85ea2c0aff.png" xlink:type="simple">https://r.res.easebar.com/pic/20251212/67962d9c-35dd-4d15-9e06-5f85ea2c0aff.png</text:a></text:p>
          </table:table-cell>
          <table:table-cell table:style-name="ce1" office:value-type="string" calcext:value-type="string">
            <text:p>Cloak &amp; Dagger share light and dark energy with Hawkeye and Psylocke. When Hawkeye uses Crescent Slash, he also releases a blade wave that heals and boosts healing for teammates, while inflicting damage and Vulnerability on enemies. Psylocke can launch a Light Boomerang Dart that heals allies, harms enemies, and provides her with temporary healing upon return. She can also unleash a ring of Dark Darts that slow enemies while she briefly enters a Phased state</text:p>
          </table:table-cell>
          <table:table-cell table:style-name="ce1" office:value-type="string" calcext:value-type="string">
            <text:p><text:a xlink:href="https://www.marvelrivals.com/20241124/41360_1195754.html" xlink:type="simple">https://www.marvelrivals.com/20241124/41360_1195754.html</text:a></text:p>
          </table:table-cell>
          <table:table-cell table:style-name="ce2" table:number-columns-repeated="24"/>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Piercing Arrow</text:p>
          </table:table-cell>
          <table:table-cell table:style-name="ce1" office:value-type="string" calcext:value-type="string">
            <text:p><text:a xlink:href="https://r.res.easebar.com/pic/20241124/9107db4e-f275-49aa-87bf-96c697157a15.png" xlink:type="simple">https://r.res.easebar.com/pic/20241124/9107db4e-f275-49aa-87bf-96c697157a15.png</text:a></text:p>
          </table:table-cell>
          <table:table-cell table:style-name="ce1" office:value-type="string" calcext:value-type="string">
            <text:p>Shoot a powerful arrow</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Black Widow - Red Room Rifle, Iron Fist - Dragon's Defense, Hawkeye - Piercing Arrow,Hawkeye - Ronin Slash, Star-Lord - Blaster Barrage,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Blast Arrow</text:p>
          </table:table-cell>
          <table:table-cell table:style-name="ce1" office:value-type="string" calcext:value-type="string">
            <text:p><text:a xlink:href="https://r.res.easebar.com/pic/20241124/b54fcda9-4e31-4a7b-87c7-c7e8fd675434.png" xlink:type="simple">https://r.res.easebar.com/pic/20241124/b54fcda9-4e31-4a7b-87c7-c7e8fd675434.png</text:a></text:p>
          </table:table-cell>
          <table:table-cell table:style-name="ce1" office:value-type="string" calcext:value-type="string">
            <text:p>Shoot three explosive arrows</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Iron Fist - Dragon's Defense, </text:p>
          </table:table-cell>
          <table:table-cell table:style-name="ce2" table:number-columns-repeated="23"/>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Hunter's Sight</text:p>
          </table:table-cell>
          <table:table-cell table:style-name="ce1" office:value-type="string" calcext:value-type="string">
            <text:p><text:a xlink:href="https://r.res.easebar.com/pic/20241124/15af78f7-6723-402d-916e-0e17ebf4b6df.png" xlink:type="simple">https://r.res.easebar.com/pic/20241124/15af78f7-6723-402d-916e-0e17ebf4b6df.png</text:a></text:p>
          </table:table-cell>
          <table:table-cell table:style-name="ce1" office:value-type="string" calcext:value-type="string">
            <text:p>Capture Afterimages of enemies in his view. Damage dealt to an Afterimage is transferred to the corresponding enemy</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1" office:value-type="string" calcext:value-type="string">
            <text:p>Mantis - Soul Resurgence, Luna Snow - Fate of Both Worlds, Mantis - Spore Slumber, Luna Snow - Ice Arts, Psylocke - Psychic Stealth, Invisible Woman - Invisible Boundary, Invisible Woman - Veiled Step, Loki - Deception, Emma Frost - Psionic Seduction, Cloak&amp;Dagger - Eternal Bond, Cloak&amp;Dagger - Terror Cape, Cloak&amp;Dagger - Dark Teleportation, Daredevil - Let the Devel Out, Hulk - Indestructible Guard, Magneto - Metal Bulwark, Magneto - Iron Bulwark, Iron Man - Invincible Pulse Cannon, Namor - Horn of Proteus, Magik - Stepping Discs, Spider-man - Spectacular Spin, Jeff the Land Shark - It's Jeff!, Jeff the Land Shark - Hide and Seek?,</text:p>
          </table:table-cell>
          <table:table-cell table:style-name="ce2" table:number-columns-repeated="23"/>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Crescent Slash</text:p>
          </table:table-cell>
          <table:table-cell table:style-name="ce1" office:value-type="string" calcext:value-type="string">
            <text:p><text:a xlink:href="https://r.res.easebar.com/pic/20241124/a598cd3c-e1d2-4403-8d48-13bf9dcf1b39.png" xlink:type="simple">https://r.res.easebar.com/pic/20241124/a598cd3c-e1d2-4403-8d48-13bf9dcf1b39.png</text:a></text:p>
          </table:table-cell>
          <table:table-cell table:style-name="ce1" office:value-type="string" calcext:value-type="string">
            <text:p>Unsheathe a katana and slash forward, launching up enemies hit</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1" office:value-type="string" calcext:value-type="string">
            <text:p>The Thing - Unyielding Will,</text:p>
          </table:table-cell>
          <table:table-cell table:style-name="ce2" table:number-columns-repeated="23"/>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Hypersonic Arrow</text:p>
          </table:table-cell>
          <table:table-cell table:style-name="ce1" office:value-type="string" calcext:value-type="string">
            <text:p><text:a xlink:href="https://r.res.easebar.com/pic/20241124/96e35f6b-b42a-461a-9cd9-554ed05e3470.png" xlink:type="simple">https://r.res.easebar.com/pic/20241124/96e35f6b-b42a-461a-9cd9-554ed05e3470.png</text:a></text:p>
          </table:table-cell>
          <table:table-cell table:style-name="ce1" office:value-type="string" calcext:value-type="string">
            <text:p>Shoot a Hypersonic Arrow, dealing two instances of damage to enemies in its path and inflicting them with Slow. This ability can Knock Down flying heroes</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2" table:number-columns-repeated="24"/>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Ronin Slash</text:p>
          </table:table-cell>
          <table:table-cell table:style-name="ce1" office:value-type="string" calcext:value-type="string">
            <text:p><text:a xlink:href="https://r.res.easebar.com/pic/20241124/d8d9cc33-6737-4481-b442-ce0375138806.png" xlink:type="simple">https://r.res.easebar.com/pic/20241124/d8d9cc33-6737-4481-b442-ce0375138806.png</text:a></text:p>
          </table:table-cell>
          <table:table-cell table:style-name="ce1" office:value-type="string" calcext:value-type="string">
            <text:p>Swing a wakizashi to strike frontal enemies, deflecting all incoming projectiles</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1" office:value-type="string" calcext:value-type="string">
            <text:p>Phoenix - Telekinesis Burst, Hawkeye - Blast Arrow,</text:p>
          </table:table-cell>
          <table:table-cell table:style-name="ce2" table:number-columns-repeated="23"/>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Skyward Leap</text:p>
          </table:table-cell>
          <table:table-cell table:style-name="ce1" office:value-type="string" calcext:value-type="string">
            <text:p><text:a xlink:href="https://r.res.easebar.com/pic/20241124/83892ce1-2db5-4c6c-a0f2-a4117ab86aab.png" xlink:type="simple">https://r.res.easebar.com/pic/20241124/83892ce1-2db5-4c6c-a0f2-a4117ab86aab.png</text:a></text:p>
          </table:table-cell>
          <table:table-cell table:style-name="ce1" office:value-type="string" calcext:value-type="string">
            <text:p>Perform a double jump in the direction of movement</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1" office:value-type="string" calcext:value-type="string">
            <text:p>Phoenix - Telekinesis Burst, Invisible Woman - Force Physics, Mister Fantastic - Distended Grip,Squirrel Girl - Squirrel Blockade, Black Widow - Red Room Rifle, Black Widow - Edge Dancer, Iron Fist - Yat Jee Chung Kuen, Psylocke - Psi-Blade Dash, Winter Soldier - Trooper's Fist, Winter Soldier - Bionic Hook, Spider-man - Get Over Here!, Hela - Soul Drainer,</text:p>
          </table:table-cell>
          <table:table-cell table:style-name="ce2" table:number-columns-repeated="23"/>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Archer's Focus</text:p>
          </table:table-cell>
          <table:table-cell table:style-name="ce1" office:value-type="string" calcext:value-type="string">
            <text:p><text:a xlink:href="https://r.res.easebar.com/pic/20241124/54419864-579b-4029-bc38-150d604b96c2.png" xlink:type="simple">https://r.res.easebar.com/pic/20241124/54419864-579b-4029-bc38-150d604b96c2.png</text:a></text:p>
          </table:table-cell>
          <table:table-cell table:style-name="ce1" office:value-type="string" calcext:value-type="string">
            <text:p>Aim at an enemy to improve focus, enhancing the damage inflicted by Piercing Arrow</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1" office:value-type="string" calcext:value-type="string">
            <text:p>Cloak&amp;Dagger - Terror Cape, Cloak&amp;Dagger - Dark Teleportation,</text:p>
          </table:table-cell>
          <table:table-cell table:style-name="ce2" table:number-columns-repeated="23"/>
          <table:table-cell table:number-columns-repeated="16355"/>
        </table:table-row>
        <table:table-row table:style-name="ro1">
          <table:table-cell table:style-name="ce1" office:value-type="string" calcext:value-type="string">
            <text:p>HAWKEYE</text:p>
          </table:table-cell>
          <table:table-cell table:style-name="ce1" office:value-type="string" calcext:value-type="string">
            <text:p>MOONLIT SLASH</text:p>
          </table:table-cell>
          <table:table-cell table:style-name="ce1" office:value-type="string" calcext:value-type="string">
            <text:p><text:a xlink:href="https://r.res.easebar.com/pic/20251115/51eb0c6d-b829-4f42-8254-63a45af24047.png" xlink:type="simple">https://r.res.easebar.com/pic/20251115/51eb0c6d-b829-4f42-8254-63a45af24047.png</text:a></text:p>
          </table:table-cell>
          <table:table-cell table:style-name="ce1" office:value-type="string" calcext:value-type="string">
            <text:p>Cloak &amp; Dagger inject light and dark energy into Hawkeye's katana. When Hawkeye uses Crescent Slash, enemies hit are launched back, and a blade wave filled with light and energy sweeps forward. This wave passes through both allies and enemies: it heals and boosts healing for allies, while damaging enemies and applying Vulnerability</text:p>
          </table:table-cell>
          <table:table-cell table:style-name="ce1" office:value-type="string" calcext:value-type="string">
            <text:p><text:a xlink:href="https://www.marvelrivals.com/20241124/41360_1195753.html" xlink:type="simple">https://www.marvelrivals.com/20241124/41360_1195753.html</text:a></text:p>
          </table:table-cell>
          <table:table-cell table:style-name="ce2" table:number-columns-repeated="24"/>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Repulsor Blast</text:p>
          </table:table-cell>
          <table:table-cell table:style-name="ce1" office:value-type="string" calcext:value-type="string">
            <text:p><text:a xlink:href="https://r.res.easebar.com/pic/20241120/d69cf17a-732e-486d-87e3-43c5892e42c3.png" xlink:type="simple">https://r.res.easebar.com/pic/20241120/d69cf17a-732e-486d-87e3-43c5892e42c3.png</text:a></text:p>
          </table:table-cell>
          <table:table-cell table:style-name="ce1" office:value-type="string" calcext:value-type="string">
            <text:p>Fire nano pulse cannons forward</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Repulsor Blast (Armor Overdrive)</text:p>
          </table:table-cell>
          <table:table-cell table:style-name="ce1" office:value-type="string" calcext:value-type="string">
            <text:p><text:a xlink:href="https://r.res.easebar.com/pic/20241120/d69cf17a-732e-486d-87e3-43c5892e42c3.png" xlink:type="simple">https://r.res.easebar.com/pic/20241120/d69cf17a-732e-486d-87e3-43c5892e42c3.png</text:a></text:p>
          </table:table-cell>
          <table:table-cell table:style-name="ce1" office:value-type="string" calcext:value-type="string">
            <text:p>Fire nano pulse cannons forward</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Unibeam</text:p>
          </table:table-cell>
          <table:table-cell table:style-name="ce1" office:value-type="string" calcext:value-type="string">
            <text:p><text:a xlink:href="https://r.res.easebar.com/pic/20241120/5a005241-4e91-4240-9da0-671454971524.png" xlink:type="simple">https://r.res.easebar.com/pic/20241120/5a005241-4e91-4240-9da0-671454971524.png</text:a></text:p>
          </table:table-cell>
          <table:table-cell table:style-name="ce1" office:value-type="string" calcext:value-type="string">
            <text:p>Fire nano pulse cannons forward</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Unibeam (Armor Overdrive)</text:p>
          </table:table-cell>
          <table:table-cell table:style-name="ce1" office:value-type="string" calcext:value-type="string">
            <text:p><text:a xlink:href="https://r.res.easebar.com/pic/20241120/5a005241-4e91-4240-9da0-671454971524.png" xlink:type="simple">https://r.res.easebar.com/pic/20241120/5a005241-4e91-4240-9da0-671454971524.png</text:a></text:p>
          </table:table-cell>
          <table:table-cell table:style-name="ce1" office:value-type="string" calcext:value-type="string">
            <text:p>Fire nano pulse cannons forward</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Invincible Pulse Cannon</text:p>
          </table:table-cell>
          <table:table-cell table:style-name="ce1" office:value-type="string" calcext:value-type="string">
            <text:p><text:a xlink:href="https://r.res.easebar.com/pic/20241120/35909ad4-f7f5-4d30-8d58-b076bebca067.png" xlink:type="simple">https://r.res.easebar.com/pic/20241120/35909ad4-f7f5-4d30-8d58-b076bebca067.png</text:a></text:p>
          </table:table-cell>
          <table:table-cell table:style-name="ce1" office:value-type="string" calcext:value-type="string">
            <text:p>Fire a devastating pulse cannon in the targeted direction, delivering catastrophic damage to the targeted area upon impact</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1" office:value-type="string" calcext:value-type="string">
            <text:p>Mantis - Spore Slumber, Luna Snow - Ice Arts, Angela - Assassin's Charge, Angela - Shielded Stance, Blade - Scarlet Shroud, Mister Fantastic - Reflexive Rubber, Wolverine - Last Stand, Wolverine - Feral Leap, Wolverine - Regenerative Healing Factor, Cloak&amp;Dagger - Terror Cape, Cloak&amp;Dagger - Dark Teleportation, Iron Fist - Dragon's Defense, Psylocke - Dance of the Butterfly, Emma Frost - Mind's Aegis, Captain America - Living Legend, Magneto - Metallic Curtain, Doctor Strange - Shield of the Seraphim, Groot - Thornlash Wall, Groot - Ironwood Wall, Deadpool - Magical Unicorn Shield!, Invisible Woman - Guardian Shield, Emma Frost - Psionic Seduction, Deadpool - Healing Factor, Namor - Blessing of the Deep, Scarlet Witch - Mystic Projection, Scarlet Witch - Dark Seal, Winter Soldier - Trooper's Fist, Winter Soldier - Bionic Hook, Winter Soldier - Tainted Voltage, Magik - Stepping Discs, Star-Lord - Stellar Shift, Spider-man - Get Over Here!, Hela - Soul Drainer, Hulk - HULK SMASH!, Hulk - Indestructible Guard, Hulk - World Breaker, Hulk - Radioactive Lockdown, Hulk - Incredible Leap, Jeff the Land Shark - It's Jeff!, The Punisher - Culling Turret, The Punisher - Adjudication, Luna Snow - Light &amp; Dark Ice, Adam Warlock - Karmic Revival, Adam Warlock - Regenerative Cocoon,</text:p>
          </table:table-cell>
          <table:table-cell table:style-name="ce1" office:value-type="string" calcext:value-type="string">
            <text:p>If Iron Man has gone quiet for 10 seconds, and you do not hear any Repulsor Blasts or Hyper-Velocity engine noises, he's hiding to pull this Ultamite out, prepare the team for a blast or figure out where he went before moving to the objective.</text:p>
          </table:table-cell>
          <table:table-cell table:style-name="ce2" table:number-columns-repeated="22"/>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Hyper-Velocity</text:p>
          </table:table-cell>
          <table:table-cell table:style-name="ce1" office:value-type="string" calcext:value-type="string">
            <text:p><text:a xlink:href="https://r.res.easebar.com/pic/20241120/ea996cd4-74a0-40d7-9498-3253084b9be2.png" xlink:type="simple">https://r.res.easebar.com/pic/20241120/ea996cd4-74a0-40d7-9498-3253084b9be2.png</text:a></text:p>
          </table:table-cell>
          <table:table-cell table:style-name="ce1" office:value-type="string" calcext:value-type="string">
            <text:p>Activate Hyper-Velocity state for swift forward flight</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1" office:value-type="string" calcext:value-type="string">
            <text:p>The Thing - Yancy Street Charge, Black Cat - Mento-Fish, The Thing - Stone Haymaker, The Thing - Battle Blitz, Invisible Woman - Psionic Vortex, Invisible Woman - Force Physics, Mister Fantastic - Distended Grip, Black Widow - Red Room Rifle, Iron Fist - Yat Jee Chung Kuen, Psylocke - Dance of the Butterfly, Hawkeye - Crescent Slash, Hawkeye - Hypersonic Arrow, Star-Lord - Stellar Shift, Scarlet Witch - Chaos Control, Winter Soldier - Bionic Hook, Spider-man - Get Over Here!, Hela - Nightsword Thorn, Storm - Omega Hurricane, Storm - Goddess Boost, Hulk - Incredible Leap,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Hyper-Velocity (Armor Overdrive)</text:p>
          </table:table-cell>
          <table:table-cell table:style-name="ce1" office:value-type="string" calcext:value-type="string">
            <text:p><text:a xlink:href="https://r.res.easebar.com/pic/20241120/ea996cd4-74a0-40d7-9498-3253084b9be2.png" xlink:type="simple">https://r.res.easebar.com/pic/20241120/ea996cd4-74a0-40d7-9498-3253084b9be2.png</text:a></text:p>
          </table:table-cell>
          <table:table-cell table:style-name="ce1" office:value-type="string" calcext:value-type="string">
            <text:p>Activate Hyper-Velocity state for swift forward flight</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1" office:value-type="string" calcext:value-type="string">
            <text:p>The Thing - Yancy Street Charge, Black Cat - Mento-Fish, The Thing - Stone Haymaker, The Thing - Battle Blitz, Invisible Woman - Psionic Vortex, Invisible Woman - Force Physics, Mister Fantastic - Distended Grip, Black Widow - Red Room Rifle, Iron Fist - Yat Jee Chung Kuen, Psylocke - Dance of the Butterfly, Hawkeye - Crescent Slash, Hawkeye - Hypersonic Arrow, Star-Lord - Galactic Legend, Scarlet Witch - Chaos Control, Winter Soldier - Trooper's Fist, Winter Soldier - Bionic Hook, Spider-man - Get Over Here!, Hela - Nightsword Thorn, Storm - Omega Hurricane, Storm - Goddess Boost, Hulk - Incredible Leap,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Armor Overdrive</text:p>
          </table:table-cell>
          <table:table-cell table:style-name="ce1" office:value-type="string" calcext:value-type="string">
            <text:p><text:a xlink:href="https://r.res.easebar.com/pic/20241120/27f07e85-4220-4227-892b-04c9850a7c02.png" xlink:type="simple">https://r.res.easebar.com/pic/20241120/27f07e85-4220-4227-892b-04c9850a7c02.png</text:a></text:p>
          </table:table-cell>
          <table:table-cell table:style-name="ce1" office:value-type="string" calcext:value-type="string">
            <text:p>Activate Armor Overdrive state, enhancing the damage of Repulsor Blast and Unibeam</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2" table:number-columns-repeated="24"/>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Micro-Missile Barrage</text:p>
          </table:table-cell>
          <table:table-cell table:style-name="ce1" office:value-type="string" calcext:value-type="string">
            <text:p><text:a xlink:href="https://r.res.easebar.com/pic/20241120/19e4e5da-fa8d-4cf8-a817-1111d91dc389.png" xlink:type="simple">https://r.res.easebar.com/pic/20241120/19e4e5da-fa8d-4cf8-a817-1111d91dc389.png</text:a></text:p>
          </table:table-cell>
          <table:table-cell table:style-name="ce1" office:value-type="string" calcext:value-type="string">
            <text:p>When Hyper-Velocity or Armor Overdrive is used, Iron Man can launch a missile bombardment</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2" table:number-columns-repeated="24"/>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Micro-Missile Barrage (Armor Overdrive)</text:p>
          </table:table-cell>
          <table:table-cell table:style-name="ce1" office:value-type="string" calcext:value-type="string">
            <text:p><text:a xlink:href="https://r.res.easebar.com/pic/20241120/19e4e5da-fa8d-4cf8-a817-1111d91dc389.png" xlink:type="simple">https://r.res.easebar.com/pic/20241120/19e4e5da-fa8d-4cf8-a817-1111d91dc389.png</text:a></text:p>
          </table:table-cell>
          <table:table-cell table:style-name="ce1" office:value-type="string" calcext:value-type="string">
            <text:p>When Hyper-Velocity or Armor Overdrive is used, Iron Man can launch a missile bombardment</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2" table:number-columns-repeated="24"/>
          <table:table-cell table:number-columns-repeated="16355"/>
        </table:table-row>
        <table:table-row table:style-name="ro1">
          <table:table-cell table:style-name="ce1" office:value-type="string" calcext:value-type="string">
            <text:p>IRON MAN</text:p>
          </table:table-cell>
          <table:table-cell table:style-name="ce1" office:value-type="string" calcext:value-type="string">
            <text:p>NANO TECH</text:p>
          </table:table-cell>
          <table:table-cell table:style-name="ce1" office:value-type="string" calcext:value-type="string">
            <text:p><text:a xlink:href="https://r.res.easebar.com/pic/20250531/2d4ab1bf-a8da-4216-9c4c-5e755596e86d.png" xlink:type="simple">https://r.res.easebar.com/pic/20250531/2d4ab1bf-a8da-4216-9c4c-5e755596e86d.png</text:a></text:p>
          </table:table-cell>
          <table:table-cell table:style-name="ce1" office:value-type="string" calcext:value-type="string">
            <text:p>When Iron Man, Ultron and Squirrel Girl team up, Ultron's Encephalo-Ray upgrades to Nano-Ray, firing a beam that pierces through all characters, dealing continuous damage to foes while healing allies; Squirrel Girl gains the Squirrel Missile ability. She directs a squirrel to ride Iron Man's nanotech glove as a homing missile. Upon hit, the squirrel flees just before a fiery explosion!</text:p>
          </table:table-cell>
          <table:table-cell table:style-name="ce1" office:value-type="string" calcext:value-type="string">
            <text:p><text:a xlink:href="https://www.marvelrivals.com/20241123/41360_1195687.html" xlink:type="simple">https://www.marvelrivals.com/20241123/41360_1195687.html</text:a></text:p>
          </table:table-cell>
          <table:table-cell table:style-name="ce2" table:number-columns-repeated="24"/>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Crescent Dart</text:p>
          </table:table-cell>
          <table:table-cell table:style-name="ce1" office:value-type="string" calcext:value-type="string">
            <text:p><text:a xlink:href="https://r.res.easebar.com/pic/20241120/f4bab63c-dd7b-4ddc-b9f5-d0481acffaf3.png" xlink:type="simple">https://r.res.easebar.com/pic/20241120/f4bab63c-dd7b-4ddc-b9f5-d0481acffaf3.png</text:a></text:p>
          </table:table-cell>
          <table:table-cell table:style-name="ce1" office:value-type="string" calcext:value-type="string">
            <text:p>Unleash Crescent Darts forward that can bounce between enemies and Ankhs, dealing damage to enemies</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The Thing - Embattled Leap, Black Widow - Red Room Rifle, Hawkeye - Piercing Arrow, Hawkeye - Ronin Slash, Star-Lord - Blaster Barrage?,</text:p>
          </table:table-cell>
          <table:table-cell table:style-name="ce2" table:number-columns-repeated="23"/>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Hand of Khonshu</text:p>
          </table:table-cell>
          <table:table-cell table:style-name="ce1" office:value-type="string" calcext:value-type="string">
            <text:p><text:a xlink:href="https://r.res.easebar.com/pic/20241120/9253ada4-37a7-4cc9-9008-2d3e748d8dc1.png" xlink:type="simple">https://r.res.easebar.com/pic/20241120/9253ada4-37a7-4cc9-9008-2d3e748d8dc1.png</text:a></text:p>
          </table:table-cell>
          <table:table-cell table:style-name="ce1" office:value-type="string" calcext:value-type="string">
            <text:p>Open a portal that allows Khonshu to bombard enemies with his talons</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1" office:value-type="string" calcext:value-type="string">
            <text:p>Mantis - Soul Resurgence, Luna Snow - Fate of Both Worlds, Mantis - Spore Slumber, Luna Snow - Ice Arts, Ultron - Rage of Ultron, Mister Fantastic - Reflexive Rubber, Cloak&amp;Dagger - Dark Teleportation, Iron Fist - Dragon's Defense, Psylocke - Dance of the Butterfly, Namor - Blessing of the Deep, Magik - Stepping Discs,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Night Glider</text:p>
          </table:table-cell>
          <table:table-cell table:style-name="ce1" office:value-type="string" calcext:value-type="string">
            <text:p><text:a xlink:href="https://r.res.easebar.com/pic/20241120/815eee35-da1f-4c84-808b-ce71aa39df9c.png" xlink:type="simple">https://r.res.easebar.com/pic/20241120/815eee35-da1f-4c84-808b-ce71aa39df9c.png</text:a></text:p>
          </table:table-cell>
          <table:table-cell table:style-name="ce1" office:value-type="string" calcext:value-type="string">
            <text:p>Hold SHIFT to glide</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1" office:value-type="string" calcext:value-type="string">
            <text:p>Iron Fist - Yat Jee Chung Kuen, Psylocke - Psi-Blade Dash, Winter Soldier - Trooper's Fist, Winter Soldier - Bionic Hook, Winter Soldier - Tainted Voltage,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Ancient Ankh</text:p>
          </table:table-cell>
          <table:table-cell table:style-name="ce1" office:value-type="string" calcext:value-type="string">
            <text:p><text:a xlink:href="https://r.res.easebar.com/pic/20241120/4dee2bf5-3255-4ce7-bfe4-463eb64bda06.png" xlink:type="simple">https://r.res.easebar.com/pic/20241120/4dee2bf5-3255-4ce7-bfe4-463eb64bda06.png</text:a></text:p>
          </table:table-cell>
          <table:table-cell table:style-name="ce1" office:value-type="string" calcext:value-type="string">
            <text:p>Fire an Ankh to launch up enemies within its radius towards the center</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1" office:value-type="string" calcext:value-type="string">
            <text:p>Phoenix - Endsong Inferno, The Thing - Unyielding Will, Squirrel Girl - Tail Bounce, Cloak&amp;Dagger - Dark Teleportation, Iron Fist - Dragon's Defense, Hawkeye - Blast Arrow, Mister Fantastic - Reflexive Rubber, Magik - Stepping Discs,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Moonlight Hook</text:p>
          </table:table-cell>
          <table:table-cell table:style-name="ce1" office:value-type="string" calcext:value-type="string">
            <text:p><text:a xlink:href="https://r.res.easebar.com/pic/20241120/60e26c6a-92ea-4e8a-a669-4c3a9be668f7.png" xlink:type="simple">https://r.res.easebar.com/pic/20241120/60e26c6a-92ea-4e8a-a669-4c3a9be668f7.png</text:a></text:p>
          </table:table-cell>
          <table:table-cell table:style-name="ce1" office:value-type="string" calcext:value-type="string">
            <text:p>Launch a frontal grappling hook that pulls Moon Knight towards it</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1" office:value-type="string" calcext:value-type="string">
            <text:p>Phoenix - Telekinesis Burst, The Thing - Yancy Street Charge, Black Cat - Mento-Fish, The Thing - Battle Blitz, Invisible Woman - Force Physics, Mister Fantastic - Distended Grip, Squirrel Girl - Squirrel Blockade, Iron Fist - Yat Jee Chung Kuen,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Rising Leap</text:p>
          </table:table-cell>
          <table:table-cell table:style-name="ce1" office:value-type="string" calcext:value-type="string">
            <text:p><text:a xlink:href="https://r.res.easebar.com/pic/20241120/f7f1a460-7069-42b0-b926-a5fd1c43d171.png" xlink:type="simple">https://r.res.easebar.com/pic/20241120/f7f1a460-7069-42b0-b926-a5fd1c43d171.png</text:a></text:p>
          </table:table-cell>
          <table:table-cell table:style-name="ce1" office:value-type="string" calcext:value-type="string">
            <text:p>Perform a double jump</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1" office:value-type="string" calcext:value-type="string">
            <text:p>Phoenix - Telekinesis Burst, The Thing - Yancy Street Charge, Black Cat - Mento-Fish, The Thing - Battle Blitz, Invisible Woman - Force Physics, Mister Fantastic - Distended Grip, Squirrel Girl - Squirrel Blockade, Black Widow - Edge Dancer, Iron Fist - Yat Jee Chung Kuen,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Moon Blade</text:p>
          </table:table-cell>
          <table:table-cell table:style-name="ce1" office:value-type="string" calcext:value-type="string">
            <text:p><text:a xlink:href="https://r.res.easebar.com/pic/20241120/7864c28b-7c4b-4cc4-8e74-d600e7c586ee.png" xlink:type="simple">https://r.res.easebar.com/pic/20241120/7864c28b-7c4b-4cc4-8e74-d600e7c586ee.png</text:a></text:p>
          </table:table-cell>
          <table:table-cell table:style-name="ce1" office:value-type="string" calcext:value-type="string">
            <text:p>Launch forward a Moon Blade that can bounce between enemies and Ankhs, dealing damage to enemies</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1" office:value-type="string" calcext:value-type="string">
            <text:p>The Thing - Embattled Leap,</text:p>
          </table:table-cell>
          <table:table-cell table:style-name="ce2" table:number-columns-repeated="23"/>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Triple Eclipse</text:p>
          </table:table-cell>
          <table:table-cell table:style-name="ce1" office:value-type="string" calcext:value-type="string">
            <text:p><text:a xlink:href="https://r.res.easebar.com/pic/20241125/9b92fd1c-3cdc-4d9d-83cf-f43d6706a73d.png" xlink:type="simple">https://r.res.easebar.com/pic/20241125/9b92fd1c-3cdc-4d9d-83cf-f43d6706a73d.png</text:a></text:p>
          </table:table-cell>
          <table:table-cell table:style-name="ce1" office:value-type="string" calcext:value-type="string">
            <text:p>Perform a combo with his truncheon, and the third strike will launch up the enemy hit slightly</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1" office:value-type="string" calcext:value-type="string">
            <text:p>The Thing - Unyielding Will,</text:p>
          </table:table-cell>
          <table:table-cell table:style-name="ce2" table:number-columns-repeated="23"/>
          <table:table-cell table:number-columns-repeated="16355"/>
        </table:table-row>
        <table:table-row table:style-name="ro1">
          <table:table-cell table:style-name="ce1" office:value-type="string" calcext:value-type="string">
            <text:p>MOON KNIGHT</text:p>
          </table:table-cell>
          <table:table-cell table:style-name="ce1" office:value-type="string" calcext:value-type="string">
            <text:p>MOON GOD'S CHOSEN</text:p>
          </table:table-cell>
          <table:table-cell table:style-name="ce1" office:value-type="string" calcext:value-type="string">
            <text:p><text:a xlink:href="https://r.res.easebar.com/pic/20251115/85d68157-5d41-4297-a2b2-d353a96dda73.png" xlink:type="simple">https://r.res.easebar.com/pic/20251115/85d68157-5d41-4297-a2b2-d353a96dda73.png</text:a></text:p>
          </table:table-cell>
          <table:table-cell table:style-name="ce1" office:value-type="string" calcext:value-type="string">
            <text:p>Blessed by Khonshu, Blade gains a new ability. When activated, Blade swings his Ancestral Sword in a powerful slash, dashing forward a short distance. At the end of the dash, he swiftly slashes four times, each strike sending a Darkmoon Blade forward. When a Darkmoon Blade hits an enemy, it bounces to nearby targets</text:p>
          </table:table-cell>
          <table:table-cell table:style-name="ce1" office:value-type="string" calcext:value-type="string">
            <text:p><text:a xlink:href="https://www.marvelrivals.com/20241123/41360_1195685.html" xlink:type="simple">https://www.marvelrivals.com/20241123/41360_1195685.html</text:a></text:p>
          </table:table-cell>
          <table:table-cell table:style-name="ce2" table:number-columns-repeated="24"/>
          <table:table-cell table:number-columns-repeated="16355"/>
        </table:table-row>
        <table:table-row table:style-name="ro1">
          <table:table-cell table:style-name="ce1" office:value-type="string" calcext:value-type="string">
            <text:p>NAMOR</text:p>
          </table:table-cell>
          <table:table-cell table:style-name="ce1" office:value-type="string" calcext:value-type="string">
            <text:p>Trident of Neptune</text:p>
          </table:table-cell>
          <table:table-cell table:style-name="ce1" office:value-type="string" calcext:value-type="string">
            <text:p><text:a xlink:href="https://r.res.easebar.com/pic/20241120/cc74a8d7-aa7a-4bef-9777-6f2499ece5a4.png" xlink:type="simple">https://r.res.easebar.com/pic/20241120/cc74a8d7-aa7a-4bef-9777-6f2499ece5a4.png</text:a></text:p>
          </table:table-cell>
          <table:table-cell table:style-name="ce1" office:value-type="string" calcext:value-type="string">
            <text:p>Throw the trident forward, reducing Aquatic Dominion's cooldown upon enemy impact. Critical hits cause Monstro Spawn to enter a berserk state, gaining increased Attack Speed</text:p>
          </table:table-cell>
          <table:table-cell table:style-name="ce1" office:value-type="string" calcext:value-type="string">
            <text:p><text:a xlink:href="https://www.marvelrivals.com/20241123/41360_1195686.html" xlink:type="simple">https://www.marvelrivals.com/20241123/41360_1195686.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 Star-Lord - Blaster Barrage,</text:p>
          </table:table-cell>
          <table:table-cell table:style-name="ce2" table:number-columns-repeated="23"/>
          <table:table-cell table:number-columns-repeated="16355"/>
        </table:table-row>
        <table:table-row table:style-name="ro1">
          <table:table-cell table:style-name="ce1" office:value-type="string" calcext:value-type="string">
            <text:p>NAMOR</text:p>
          </table:table-cell>
          <table:table-cell table:style-name="ce1" office:value-type="string" calcext:value-type="string">
            <text:p>Horn of Proteus</text:p>
          </table:table-cell>
          <table:table-cell table:style-name="ce1" office:value-type="string" calcext:value-type="string">
            <text:p><text:a xlink:href="https://r.res.easebar.com/pic/20241120/41fb388d-1b2c-433f-ab04-3a02562c5b19.png" xlink:type="simple">https://r.res.easebar.com/pic/20241120/41fb388d-1b2c-433f-ab04-3a02562c5b19.png</text:a></text:p>
          </table:table-cell>
          <table:table-cell table:style-name="ce1" office:value-type="string" calcext:value-type="string">
            <text:p>Summon Giganto to leap atop enemies within range, disabling their mobility abilities</text:p>
          </table:table-cell>
          <table:table-cell table:style-name="ce1" office:value-type="string" calcext:value-type="string">
            <text:p><text:a xlink:href="https://www.marvelrivals.com/20241123/41360_1195686.html" xlink:type="simple">https://www.marvelrivals.com/20241123/41360_1195686.html</text:a></text:p>
          </table:table-cell>
          <table:table-cell table:style-name="ce1" office:value-type="string" calcext:value-type="string">
            <text:p>Mantis - Soul Resurgence, Luna Snow - Fate of Both Worlds, Mantis - Spore Slumber, Luna Snow - Ice Arts, Blade - Scarlet Shroud, Emma Frost - Mind's Aegis, Captain America - Living Legend, Magneto - Metallic Curtain, Doctor Strange - Shield of the Seraphim, Groot - Thornlash Wall, Groot - Ironwood Wall, Deadpool - Magical Unicorn Shield!, Invisible Woman - Guardian Shield, Mister Fantastic - Reflexive Rubber, Wolverine - Regenerative Healing Factor, Cloak&amp;Dagger - Dark Teleportation, Iron Fist - Dragon's Defense, Namor - Blessing of the Deep?, Hulk - HULK SMASH!, Hulk - Indestructible Guard, Hulk - World Breaker, Jeff the Land Shark - It's Jeff!?, The Punisher - Culling Turret, </text:p>
          </table:table-cell>
          <table:table-cell table:style-name="ce2" table:number-columns-repeated="23"/>
          <table:table-cell table:number-columns-repeated="16355"/>
        </table:table-row>
        <table:table-row table:style-name="ro1">
          <table:table-cell table:style-name="ce1" office:value-type="string" calcext:value-type="string">
            <text:p>NAMOR</text:p>
          </table:table-cell>
          <table:table-cell table:style-name="ce1" office:value-type="string" calcext:value-type="string">
            <text:p>Blessing of the Deep</text:p>
          </table:table-cell>
          <table:table-cell table:style-name="ce1" office:value-type="string" calcext:value-type="string">
            <text:p><text:a xlink:href="https://r.res.easebar.com/pic/20241120/e301578f-ee43-42c9-a95a-f162259d62fb.png" xlink:type="simple">https://r.res.easebar.com/pic/20241120/e301578f-ee43-42c9-a95a-f162259d62fb.png</text:a></text:p>
          </table:table-cell>
          <table:table-cell table:style-name="ce1" office:value-type="string" calcext:value-type="string">
            <text:p>Summon a protective barrier while flying upwards</text:p>
          </table:table-cell>
          <table:table-cell table:style-name="ce1" office:value-type="string" calcext:value-type="string">
            <text:p><text:a xlink:href="https://www.marvelrivals.com/20241123/41360_1195686.html" xlink:type="simple">https://www.marvelrivals.com/20241123/41360_1195686.html</text:a></text:p>
          </table:table-cell>
          <table:table-cell table:style-name="ce1" office:value-type="string" calcext:value-type="string">
            <text:p>Iron Fist - Yat Jee Chung Kuen, Winter Soldier - Bionic Hook, Winter Soldier - Tainted Voltage, Spider-man - Get Over Here!, Hulk - Incredible Leap,</text:p>
          </table:table-cell>
          <table:table-cell table:style-name="ce2" table:number-columns-repeated="23"/>
          <table:table-cell table:number-columns-repeated="16355"/>
        </table:table-row>
        <table:table-row table:style-name="ro1">
          <table:table-cell table:style-name="ce1" office:value-type="string" calcext:value-type="string">
            <text:p>NAMOR</text:p>
          </table:table-cell>
          <table:table-cell table:style-name="ce1" office:value-type="string" calcext:value-type="string">
            <text:p>Aquatic Dominion</text:p>
          </table:table-cell>
          <table:table-cell table:style-name="ce1" office:value-type="string" calcext:value-type="string">
            <text:p><text:a xlink:href="https://r.res.easebar.com/pic/20241120/4bf22127-5c87-4163-82d7-ba90c1edae57.png" xlink:type="simple">https://r.res.easebar.com/pic/20241120/4bf22127-5c87-4163-82d7-ba90c1edae57.png</text:a></text:p>
          </table:table-cell>
          <table:table-cell table:style-name="ce1" office:value-type="string" calcext:value-type="string">
            <text:p>Summon a Monstro Spawn that can autonomously attack enemies</text:p>
          </table:table-cell>
          <table:table-cell table:style-name="ce1" office:value-type="string" calcext:value-type="string">
            <text:p><text:a xlink:href="https://www.marvelrivals.com/20241123/41360_1195686.html" xlink:type="simple">https://www.marvelrivals.com/20241123/41360_1195686.html</text:a></text:p>
          </table:table-cell>
          <table:table-cell table:style-name="ce1" office:value-type="string" calcext:value-type="string">
            <text:p>Phoenix - Endsong Inferno, Emma Frost - Mind's Aegis, Captain America - Living Legend, Magneto - Metallic Curtain, Doctor Strange - Shield of the Seraphim, Groot - Thornlash Wall, Groot - Ironwood Wall, Deadpool - Magical Unicorn Shield!, Invisible Woman - Guardian Shield, Moon Knight - Crescent Dart?,</text:p>
          </table:table-cell>
          <table:table-cell table:style-name="ce2" table:number-columns-repeated="23"/>
          <table:table-cell table:number-columns-repeated="16355"/>
        </table:table-row>
        <table:table-row table:style-name="ro1">
          <table:table-cell table:style-name="ce1" office:value-type="string" calcext:value-type="string">
            <text:p>NAMOR</text:p>
          </table:table-cell>
          <table:table-cell table:style-name="ce1" office:value-type="string" calcext:value-type="string">
            <text:p>Wrath of the Seven Seas</text:p>
          </table:table-cell>
          <table:table-cell table:style-name="ce1" office:value-type="string" calcext:value-type="string">
            <text:p><text:a xlink:href="https://r.res.easebar.com/pic/20241120/0e8f873c-9edf-43ff-87f8-1db24dcb4500.png" xlink:type="simple">https://r.res.easebar.com/pic/20241120/0e8f873c-9edf-43ff-87f8-1db24dcb4500.png</text:a></text:p>
          </table:table-cell>
          <table:table-cell table:style-name="ce1" office:value-type="string" calcext:value-type="string">
            <text:p>Launch the trident forward to damage nearby enemies, then direct all Monstro Spawn to perform an enhanced attack on the nearest hit enemy. When the trident hits an enemy, Monstro Spawn to enter a berserk state, gaining increased Attack Speed</text:p>
          </table:table-cell>
          <table:table-cell table:style-name="ce1" office:value-type="string" calcext:value-type="string">
            <text:p><text:a xlink:href="https://www.marvelrivals.com/20241123/41360_1195686.html" xlink:type="simple">https://www.marvelrivals.com/20241123/41360_1195686.html</text:a></text:p>
          </table:table-cell>
          <table:table-cell table:style-name="ce2" table:number-columns-repeated="24"/>
          <table:table-cell table:number-columns-repeated="16355"/>
        </table:table-row>
        <table:table-row table:style-name="ro1">
          <table:table-cell table:style-name="ce1" office:value-type="string" calcext:value-type="string">
            <text:p>NAMOR</text:p>
          </table:table-cell>
          <table:table-cell table:style-name="ce1" office:value-type="string" calcext:value-type="string">
            <text:p>TIDAL DIRGE</text:p>
          </table:table-cell>
          <table:table-cell table:style-name="ce1" office:value-type="string" calcext:value-type="string">
            <text:p><text:a xlink:href="https://r.res.easebar.com/pic/20251011/e1e60d27-462f-41da-90cb-96f47ef58548.png" xlink:type="simple">https://r.res.easebar.com/pic/20251011/e1e60d27-462f-41da-90cb-96f47ef58548.png</text:a></text:p>
          </table:table-cell>
          <table:table-cell table:style-name="ce1" office:value-type="string" calcext:value-type="string">
            <text:p>Hela channels energy of the undead to empower Namor. When Namor strikes with his trident, a spectral water column erupts at the target area, slowing enemies hit. Whenever Hela or Namor assist in a KO, an invulnerable Undead Monstro spawns at the fallen enemy's position, automatically attacking the nearest foe for a short time before vanishing</text:p>
          </table:table-cell>
          <table:table-cell table:style-name="ce1" office:value-type="string" calcext:value-type="string">
            <text:p><text:a xlink:href="https://www.marvelrivals.com/20241123/41360_1195686.html" xlink:type="simple">https://www.marvelrivals.com/20241123/41360_1195686.html</text:a></text:p>
          </table:table-cell>
          <table:table-cell table:style-name="ce2" table:number-columns-repeated="24"/>
          <table:table-cell table:number-columns-repeated="16355"/>
        </table:table-row>
        <table:table-row table:style-name="ro1">
          <table:table-cell table:style-name="ce1" office:value-type="string" calcext:value-type="string">
            <text:p>STAR-LORD</text:p>
          </table:table-cell>
          <table:table-cell table:style-name="ce1" office:value-type="string" calcext:value-type="string">
            <text:p>Element Guns</text:p>
          </table:table-cell>
          <table:table-cell table:style-name="ce1" office:value-type="string" calcext:value-type="string">
            <text:p><text:a xlink:href="https://r.res.easebar.com/pic/20241120/947d9975-ec6d-4d17-b00b-ce4642fafebc.png" xlink:type="simple">https://r.res.easebar.com/pic/20241120/947d9975-ec6d-4d17-b00b-ce4642fafebc.png</text:a></text:p>
          </table:table-cell>
          <table:table-cell table:style-name="ce1" office:value-type="string" calcext:value-type="string">
            <text:p>Shoot enemies with dual Element Guns</text:p>
          </table:table-cell>
          <table:table-cell table:style-name="ce1" office:value-type="string" calcext:value-type="string">
            <text:p><text:a xlink:href="https://www.marvelrivals.com/20241123/41360_1195683.html" xlink:type="simple">https://www.marvelrivals.com/20241123/41360_119568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text:p>
          </table:table-cell>
          <table:table-cell table:style-name="ce2" table:number-columns-repeated="23"/>
          <table:table-cell table:number-columns-repeated="16355"/>
        </table:table-row>
        <table:table-row table:style-name="ro1">
          <table:table-cell table:style-name="ce1" office:value-type="string" calcext:value-type="string">
            <text:p>STAR-LORD</text:p>
          </table:table-cell>
          <table:table-cell table:style-name="ce1" office:value-type="string" calcext:value-type="string">
            <text:p>Galactic Legend</text:p>
          </table:table-cell>
          <table:table-cell table:style-name="ce1" office:value-type="string" calcext:value-type="string">
            <text:p><text:a xlink:href="https://r.res.easebar.com/pic/20241120/cdfdc8b1-27e7-4a28-a666-3a3387b92263.png" xlink:type="simple">https://r.res.easebar.com/pic/20241120/cdfdc8b1-27e7-4a28-a666-3a3387b92263.png</text:a></text:p>
          </table:table-cell>
          <table:table-cell table:style-name="ce1" office:value-type="string" calcext:value-type="string">
            <text:p>Engage in free-flight and lock onto enemies in sight</text:p>
          </table:table-cell>
          <table:table-cell table:style-name="ce1" office:value-type="string" calcext:value-type="string">
            <text:p><text:a xlink:href="https://www.marvelrivals.com/20241123/41360_1195683.html" xlink:type="simple">https://www.marvelrivals.com/20241123/41360_1195683.html</text:a></text:p>
          </table:table-cell>
          <table:table-cell table:style-name="ce1" office:value-type="string" calcext:value-type="string">
            <text:p>Angela - Assassin's Charge, Emma Frost - Mind's Aegis, Captain America - Living Legend, Magneto - Metallic Curtain, Doctor Strange - Shield of the Seraphim, Groot - Thornlash Wall, Groot - Ironwood Wall, Deadpool - Magical Unicorn Shield!, Invisible Woman - Guardian Shield, Emma Frost - Psionic Seduction, Black Cat - Mento-Fish, The Thing - Stone Haymaker, The Thing - Battle Blitz, Invisible Woman - Covert Advance, Invisible Woman - Invisible Boundary, Psylocke - Psychic Stealth, Loki - Deception, Wolverine - Last Stand, Wolverine - Feral Leap, Cloak&amp;Dagger - Eternal Bond, Cloak&amp;Dagger - Terror Cape, Cloak&amp;Dagger - Dark Teleportation, Iron Fist - Yat Jee Chung Kuen, Iron Fist - Dragon's Defense, Psylocke - Dance of the Butterfly, Hawkeye - Crescent Slash, Hawkeye - Hypersonic Arrow, Namor - Blessing of the Deep, Star-Lord - Galactic Legend, Hulk - Incredible Leap, Jeff the Land Shark - Aqua Burst, The Punisher - Culling Turret?, </text:p>
          </table:table-cell>
          <table:table-cell table:style-name="ce1" office:value-type="string" calcext:value-type="string">
            <text:p>Star-Lord likes to have a clear line of sight of the whole team before using this ultamite, you rarely see a Star-Lord use this at ground level for your team to react to, so if you see Star-Lord flying to the moon, prepare to take cover, or develop counter to either break line of sight or stun him.</text:p>
          </table:table-cell>
          <table:table-cell table:style-name="ce2" table:number-columns-repeated="22"/>
          <table:table-cell table:number-columns-repeated="16355"/>
        </table:table-row>
        <table:table-row table:style-name="ro1">
          <table:table-cell table:style-name="ce1" office:value-type="string" calcext:value-type="string">
            <text:p>STAR-LORD</text:p>
          </table:table-cell>
          <table:table-cell table:style-name="ce1" office:value-type="string" calcext:value-type="string">
            <text:p>Rocket Propulsion</text:p>
          </table:table-cell>
          <table:table-cell table:style-name="ce1" office:value-type="string" calcext:value-type="string">
            <text:p><text:a xlink:href="https://r.res.easebar.com/pic/20241120/2c065ae8-398d-4001-a38d-c30a2d4737bc.png" xlink:type="simple">https://r.res.easebar.com/pic/20241120/2c065ae8-398d-4001-a38d-c30a2d4737bc.png</text:a></text:p>
          </table:table-cell>
          <table:table-cell table:style-name="ce1" office:value-type="string" calcext:value-type="string">
            <text:p>Consume energy to gain a Movement Boost and soar forward</text:p>
          </table:table-cell>
          <table:table-cell table:style-name="ce1" office:value-type="string" calcext:value-type="string">
            <text:p><text:a xlink:href="https://www.marvelrivals.com/20241123/41360_1195683.html" xlink:type="simple">https://www.marvelrivals.com/20241123/41360_1195683.html</text:a></text:p>
          </table:table-cell>
          <table:table-cell table:style-name="ce1" office:value-type="string" calcext:value-type="string">
            <text:p>The Thing - Yancy Street Charge, The Thing - Battle Blitz, Invisible Woman - Psionic Vortex, Invisible Woman - Force Physics, Mister Fantastic - Distended Grip, Squirrel Girl - Squirrel Blockade, Black Widow - Edge Dancer, Iron Fist - Yat Jee Chung Kuen, Hawkeye - Crescent Slash, Hawkeye - Hypersonic Arrow, Moon Knight - Ancient Ankh, Winter Soldier - Trooper's Fist, Winter Soldier - Bionic Hook, Winter Soldier - Tainted Voltage, Spider-man - Get Over Here!, Hela - Nightsword Thorn, Hela - Soul Drainer, Jeff the Land Shark - Aqua Burst, The Punisher - Adjudication, Luna Snow - Light &amp; Dark Ice,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STAR-LORD</text:p>
          </table:table-cell>
          <table:table-cell table:style-name="ce1" office:value-type="string" calcext:value-type="string">
            <text:p>Blaster Barrage</text:p>
          </table:table-cell>
          <table:table-cell table:style-name="ce1" office:value-type="string" calcext:value-type="string">
            <text:p><text:a xlink:href="https://r.res.easebar.com/pic/20241120/00802ad1-6900-44dc-a134-258fae77b326.png" xlink:type="simple">https://r.res.easebar.com/pic/20241120/00802ad1-6900-44dc-a134-258fae77b326.png</text:a></text:p>
          </table:table-cell>
          <table:table-cell table:style-name="ce1" office:value-type="string" calcext:value-type="string">
            <text:p>Fire a frenzy of shots, causing damage to enemies within range.</text:p>
          </table:table-cell>
          <table:table-cell table:style-name="ce1" office:value-type="string" calcext:value-type="string">
            <text:p><text:a xlink:href="https://www.marvelrivals.com/20241123/41360_1195683.html" xlink:type="simple">https://www.marvelrivals.com/20241123/41360_1195683.html</text:a></text:p>
          </table:table-cell>
          <table:table-cell table:style-name="ce1" office:value-type="string" calcext:value-type="string">
            <text:p>Phoenix - Telekinesis Burst, 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STAR-LORD</text:p>
          </table:table-cell>
          <table:table-cell table:style-name="ce1" office:value-type="string" calcext:value-type="string">
            <text:p>Stellar Shift</text:p>
          </table:table-cell>
          <table:table-cell table:style-name="ce1" office:value-type="string" calcext:value-type="string">
            <text:p><text:a xlink:href="https://r.res.easebar.com/pic/20241120/8f25f3a9-7dba-437d-b794-fed37ea2fdd3.png" xlink:type="simple">https://r.res.easebar.com/pic/20241120/8f25f3a9-7dba-437d-b794-fed37ea2fdd3.png</text:a></text:p>
          </table:table-cell>
          <table:table-cell table:style-name="ce1" office:value-type="string" calcext:value-type="string">
            <text:p>Dodge in the direction of movement and swiftly reload</text:p>
          </table:table-cell>
          <table:table-cell table:style-name="ce1" office:value-type="string" calcext:value-type="string">
            <text:p><text:a xlink:href="https://www.marvelrivals.com/20241123/41360_1195683.html" xlink:type="simple">https://www.marvelrivals.com/20241123/41360_1195683.html</text:a></text:p>
          </table:table-cell>
          <table:table-cell table:style-name="ce1" office:value-type="string" calcext:value-type="string">
            <text:p>Scarlet Witch - Dark Seal,</text:p>
          </table:table-cell>
          <table:table-cell table:style-name="ce2" table:number-columns-repeated="23"/>
          <table:table-cell table:number-columns-repeated="16355"/>
        </table:table-row>
        <table:table-row table:style-name="ro1">
          <table:table-cell table:style-name="ce1" office:value-type="string" calcext:value-type="string">
            <text:p>STAR-LORD</text:p>
          </table:table-cell>
          <table:table-cell table:style-name="ce1" office:value-type="string" calcext:value-type="string">
            <text:p>Astral Jump</text:p>
          </table:table-cell>
          <table:table-cell table:style-name="ce1" office:value-type="string" calcext:value-type="string">
            <text:p><text:a xlink:href="https://r.res.easebar.com/pic/20250808/cd6417e5-8cbb-4e85-b34f-0e4d79875b80.png" xlink:type="simple">https://r.res.easebar.com/pic/20250808/cd6417e5-8cbb-4e85-b34f-0e4d79875b80.png</text:a></text:p>
          </table:table-cell>
          <table:table-cell table:style-name="ce1" office:value-type="string" calcext:value-type="string">
            <text:p>Star-Lord gets a teleport to its deployment point from anywhere on the map</text:p>
          </table:table-cell>
          <table:table-cell table:style-name="ce1" office:value-type="string" calcext:value-type="string">
            <text:p><text:a xlink:href="https://www.marvelrivals.com/20241123/41360_1195683.html" xlink:type="simple">https://www.marvelrivals.com/20241123/41360_1195683.html</text:a></text:p>
          </table:table-cell>
          <table:table-cell table:style-name="ce1" office:value-type="string" calcext:value-type="string">
            <text:p>Phoenix - Endsong Inferno, 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SCARLET WITCH</text:p>
          </table:table-cell>
          <table:table-cell table:style-name="ce1" office:value-type="string" calcext:value-type="string">
            <text:p>Chaos Control</text:p>
          </table:table-cell>
          <table:table-cell table:style-name="ce1" office:value-type="string" calcext:value-type="string">
            <text:p><text:a xlink:href="https://r.res.easebar.com/pic/20241120/9df1d11b-6486-4f0e-83a8-b7e5dca461b6.png" xlink:type="simple">https://r.res.easebar.com/pic/20241120/9df1d11b-6486-4f0e-83a8-b7e5dca461b6.png</text:a></text:p>
          </table:table-cell>
          <table:table-cell table:style-name="ce1" office:value-type="string" calcext:value-type="string">
            <text:p>Unleash Chaos Magic on enemies to deal damage and restore Chaos Energy</text:p>
          </table:table-cell>
          <table:table-cell table:style-name="ce1" office:value-type="string" calcext:value-type="string">
            <text:p><text:a xlink:href="https://www.marvelrivals.com/20241123/41360_1195684.html" xlink:type="simple">https://www.marvelrivals.com/20241123/41360_1195684.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Invisible Woman - Covert Advance, Psylocke - Psychic Stealth, Loki - Deception, Star-Lord - Blaster Barrage?,</text:p>
          </table:table-cell>
          <table:table-cell table:style-name="ce2" table:number-columns-repeated="23"/>
          <table:table-cell table:number-columns-repeated="16355"/>
        </table:table-row>
        <table:table-row table:style-name="ro1">
          <table:table-cell table:style-name="ce1" office:value-type="string" calcext:value-type="string">
            <text:p>SCARLET WITCH</text:p>
          </table:table-cell>
          <table:table-cell table:style-name="ce1" office:value-type="string" calcext:value-type="string">
            <text:p>Reality Erasure</text:p>
          </table:table-cell>
          <table:table-cell table:style-name="ce1" office:value-type="string" calcext:value-type="string">
            <text:p><text:a xlink:href="https://r.res.easebar.com/pic/20241120/9fe279e3-1ca1-4202-b925-4eaddc649f14.png" xlink:type="simple">https://r.res.easebar.com/pic/20241120/9fe279e3-1ca1-4202-b925-4eaddc649f14.png</text:a></text:p>
          </table:table-cell>
          <table:table-cell table:style-name="ce1" office:value-type="string" calcext:value-type="string">
            <text:p>Engage in free-flight while charging energy, then unleash it to deal massive damage</text:p>
          </table:table-cell>
          <table:table-cell table:style-name="ce1" office:value-type="string" calcext:value-type="string">
            <text:p><text:a xlink:href="https://www.marvelrivals.com/20241123/41360_1195684.html" xlink:type="simple">https://www.marvelrivals.com/20241123/41360_1195684.html</text:a></text:p>
          </table:table-cell>
          <table:table-cell table:style-name="ce1" office:value-type="string" calcext:value-type="string">
            <text:p>Mantis - Soul Resurgence, Mantis - Spore Slumber, Luna Snow - Ice Arts, Angela - Assassin's Charge, Angela - Shielded Stance, Phoenix - Telekinesis Burst, Emma Frost - Psionic Seduction, The Thing - Clobberin' Time, Black Cat - Mento-Fish, The Thing - Stone Haymaker, Mister Fantastic - Reflexive Rubber, Black Widow - Red Room Rifle, Black Widow - Edge Dancer, Wolverine - Last Stand, Wolverine - Feral Leap, Wolverine - Regenerative Healing Factor, Cloak&amp;Dagger - Dark Teleportation, Iron Fist - Dragon's Defense, Psylocke - Dance of the Butterfly, Hawkeye - Piercing Arrow, Hawkeye - Hypersonic Arrow, Iron Man - Invincible Pulse Cannon,Iron Man - Invincible Pulse Cannon, Moon Knight - Hand of Khonshu, Namor - Blessing of the Deep, Namor - Horn of Proteus, Star-Lord - Galactic Legend, Star-Lord - Stellar Shift, Scarlet Witch - Dark Seal, Scarlet Witch - Mystic Projection, Winter Soldier - Bionic Hook, Winter Solider - Tainted Voltage, Magik - Stepping Discs, Spider-man - Get Over Here!, Spider-man - Spectacular Spin, Hela - Soul Drainer, Hulk - HULK SMASH!, Hulk - Indestructible Guard, Hulk - World Breaker, Hulk - Radioactive Lockdown, Hulk - Incredible Leap, Jeff the Land Shark - It's Jeff!, The Punisher - Culling Turret, Adam Warlock - Karmic Revival, Adam Warlock - Regenerative Cocoon,</text:p>
          </table:table-cell>
          <table:table-cell table:style-name="ce1" office:value-type="string" calcext:value-type="string">
            <text:p>The best time Wanda wants to use this ult is when there is plenty of chaos to divide the teams attention. She wants to be the last thing everyone is thinking about, so to counter it, retreat if the team is already going through chaos. The team needs to minimize the chaos before Wanda can add to it. Any time Wanda ults by herself, she will draw all the attention to her and everyone will get into position to handle it.</text:p>
          </table:table-cell>
          <table:table-cell table:style-name="ce2" table:number-columns-repeated="22"/>
          <table:table-cell table:number-columns-repeated="16355"/>
        </table:table-row>
        <table:table-row table:style-name="ro1">
          <table:table-cell table:style-name="ce1" office:value-type="string" calcext:value-type="string">
            <text:p>SCARLET WITCH</text:p>
          </table:table-cell>
          <table:table-cell table:style-name="ce1" office:value-type="string" calcext:value-type="string">
            <text:p>Mystic Projection</text:p>
          </table:table-cell>
          <table:table-cell table:style-name="ce1" office:value-type="string" calcext:value-type="string">
            <text:p><text:a xlink:href="https://r.res.easebar.com/pic/20241120/a1bd056d-4040-4dda-a79a-c1c721718e2b.png" xlink:type="simple">https://r.res.easebar.com/pic/20241120/a1bd056d-4040-4dda-a79a-c1c721718e2b.png</text:a></text:p>
          </table:table-cell>
          <table:table-cell table:style-name="ce1" office:value-type="string" calcext:value-type="string">
            <text:p>Enter the Phased state for free-flight. Press again to exit early</text:p>
          </table:table-cell>
          <table:table-cell table:style-name="ce1" office:value-type="string" calcext:value-type="string">
            <text:p><text:a xlink:href="https://www.marvelrivals.com/20241123/41360_1195684.html" xlink:type="simple">https://www.marvelrivals.com/20241123/41360_1195684.html</text:a></text:p>
          </table:table-cell>
          <table:table-cell table:style-name="ce1" office:value-type="string" calcext:value-type="string">
            <text:p>The Thing - Yancy Street Charge, The Thing - Battle Blitz,</text:p>
          </table:table-cell>
          <table:table-cell table:style-name="ce2" table:number-columns-repeated="23"/>
          <table:table-cell table:number-columns-repeated="16355"/>
        </table:table-row>
        <table:table-row table:style-name="ro1">
          <table:table-cell table:style-name="ce1" office:value-type="string" calcext:value-type="string">
            <text:p>SCARLET WITCH</text:p>
          </table:table-cell>
          <table:table-cell table:style-name="ce1" office:value-type="string" calcext:value-type="string">
            <text:p>Dark Seal</text:p>
          </table:table-cell>
          <table:table-cell table:style-name="ce1" office:value-type="string" calcext:value-type="string">
            <text:p><text:a xlink:href="https://r.res.easebar.com/pic/20241120/06d393d2-e8b7-443c-8e04-3696ecefac86.png" xlink:type="simple">https://r.res.easebar.com/pic/20241120/06d393d2-e8b7-443c-8e04-3696ecefac86.png</text:a></text:p>
          </table:table-cell>
          <table:table-cell table:style-name="ce1" office:value-type="string" calcext:value-type="string">
            <text:p>Land a hit on a target or the scene, or press E to generate a Force Field that periodically Stuns enemies within range</text:p>
          </table:table-cell>
          <table:table-cell table:style-name="ce1" office:value-type="string" calcext:value-type="string">
            <text:p><text:a xlink:href="https://www.marvelrivals.com/20241123/41360_1195684.html" xlink:type="simple">https://www.marvelrivals.com/20241123/41360_1195684.html</text:a></text:p>
          </table:table-cell>
          <table:table-cell table:style-name="ce1" office:value-type="string" calcext:value-type="string">
            <text:p>Iron Fist - Dragon's Defense, Hulk - HULK SMASH!, Hulk - Indestructible Guard, Hulk - World Breaker, The Punisher - Final Judgement,</text:p>
          </table:table-cell>
          <table:table-cell table:style-name="ce2" table:number-columns-repeated="23"/>
          <table:table-cell table:number-columns-repeated="16355"/>
        </table:table-row>
        <table:table-row table:style-name="ro1">
          <table:table-cell table:style-name="ce1" office:value-type="string" calcext:value-type="string">
            <text:p>SCARLET WITCH</text:p>
          </table:table-cell>
          <table:table-cell table:style-name="ce1" office:value-type="string" calcext:value-type="string">
            <text:p>Telekinesis</text:p>
          </table:table-cell>
          <table:table-cell table:style-name="ce1" office:value-type="string" calcext:value-type="string">
            <text:p><text:a xlink:href="https://r.res.easebar.com/pic/20241120/2893e078-cc3e-49ec-8447-4ff73a549139.png" xlink:type="simple">https://r.res.easebar.com/pic/20241120/2893e078-cc3e-49ec-8447-4ff73a549139.png</text:a></text:p>
          </table:table-cell>
          <table:table-cell table:style-name="ce1" office:value-type="string" calcext:value-type="string">
            <text:p>Hold Space to fall slowly</text:p>
          </table:table-cell>
          <table:table-cell table:style-name="ce1" office:value-type="string" calcext:value-type="string">
            <text:p><text:a xlink:href="https://www.marvelrivals.com/20241123/41360_1195684.html" xlink:type="simple">https://www.marvelrivals.com/20241123/41360_1195684.html</text:a></text:p>
          </table:table-cell>
          <table:table-cell table:style-name="ce1" office:value-type="string" calcext:value-type="string">
            <text:p>Black Cat - Mento-Fish, The Thing - Stone Haymaker, Invisible Woman - Psionic Vortex, Invisible Woman - Force Physics, Squirrel Girl - Squirrel Blockade, Iron Fist - Yat Jee Chung Kuen, Hawkeye - Crescent Slash, Hawkeye - Hypersonic Arrow, Winter Soldier - Bionic Hook, Winter Solider - Tainted Voltage, Spider-man - Get Over Here!,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SCARLET WITCH</text:p>
          </table:table-cell>
          <table:table-cell table:style-name="ce1" office:value-type="string" calcext:value-type="string">
            <text:p>Chthonian Burst</text:p>
          </table:table-cell>
          <table:table-cell table:style-name="ce1" office:value-type="string" calcext:value-type="string">
            <text:p><text:a xlink:href="https://r.res.easebar.com/pic/20241120/97e67269-1308-46d2-aef0-99ef179d9748.png" xlink:type="simple">https://r.res.easebar.com/pic/20241120/97e67269-1308-46d2-aef0-99ef179d9748.png</text:a></text:p>
          </table:table-cell>
          <table:table-cell table:style-name="ce1" office:value-type="string" calcext:value-type="string">
            <text:p>Consume Chaos Energy to fire explosive magic missiles, damaging enemies</text:p>
          </table:table-cell>
          <table:table-cell table:style-name="ce1" office:value-type="string" calcext:value-type="string">
            <text:p><text:a xlink:href="https://www.marvelrivals.com/20241123/41360_1195684.html" xlink:type="simple">https://www.marvelrivals.com/20241123/41360_1195684.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SCARLET WITCH</text:p>
          </table:table-cell>
          <table:table-cell table:style-name="ce1" office:value-type="string" calcext:value-type="string">
            <text:p>Sorcery Surge</text:p>
          </table:table-cell>
          <table:table-cell table:style-name="ce1" office:value-type="string" calcext:value-type="string">
            <text:p><text:a xlink:href="https://r.res.easebar.com/pic/20250410/99eb7c66-a521-4b6b-aa54-1048db609e28.png" xlink:type="simple">https://r.res.easebar.com/pic/20250410/99eb7c66-a521-4b6b-aa54-1048db609e28.png</text:a></text:p>
          </table:table-cell>
          <table:table-cell table:style-name="ce1" office:value-type="string" calcext:value-type="string">
            <text:p>Doctor Strange shares his arcane mastery, replacing Scarlet Witch's Chthonian Burst with Mystic Burst upon activation. Hold down the attack button to unleash a rapid, relentless salvo of magical missiles in the target direction</text:p>
          </table:table-cell>
          <table:table-cell table:style-name="ce1" office:value-type="string" calcext:value-type="string">
            <text:p><text:a xlink:href="https://www.marvelrivals.com/20241123/41360_1195684.html" xlink:type="simple">https://www.marvelrivals.com/20241123/41360_1195684.html</text:a></text:p>
          </table:table-cell>
          <table:table-cell table:style-name="ce2" table:number-columns-repeated="24"/>
          <table:table-cell table:number-columns-repeated="16355"/>
        </table:table-row>
        <table:table-row table:style-name="ro1">
          <table:table-cell table:style-name="ce1" office:value-type="string" calcext:value-type="string">
            <text:p>WINTER SOLDIER</text:p>
          </table:table-cell>
          <table:table-cell table:style-name="ce1" office:value-type="string" calcext:value-type="string">
            <text:p>Roterstern</text:p>
          </table:table-cell>
          <table:table-cell table:style-name="ce1" office:value-type="string" calcext:value-type="string">
            <text:p><text:a xlink:href="https://r.res.easebar.com/pic/20241120/c394a786-61e2-4311-af38-ddbb77fb0c17.png" xlink:type="simple">https://r.res.easebar.com/pic/20241120/c394a786-61e2-4311-af38-ddbb77fb0c17.png</text:a></text:p>
          </table:table-cell>
          <table:table-cell table:style-name="ce1" office:value-type="string" calcext:value-type="string">
            <text:p>Fire explosive rounds with his blaster, Roterstern, damaging the target hit and enemies behind them.</text:p>
          </table:table-cell>
          <table:table-cell table:style-name="ce1" office:value-type="string" calcext:value-type="string">
            <text:p><text:a xlink:href="https://www.marvelrivals.com/20241123/41360_1195681.html" xlink:type="simple">https://www.marvelrivals.com/20241123/41360_1195681.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WINTER SOLDIER</text:p>
          </table:table-cell>
          <table:table-cell table:style-name="ce1" office:value-type="string" calcext:value-type="string">
            <text:p>Kraken Impact</text:p>
          </table:table-cell>
          <table:table-cell table:style-name="ce1" office:value-type="string" calcext:value-type="string">
            <text:p><text:a xlink:href="https://r.res.easebar.com/pic/20241120/a53ce147-45d7-472a-b01d-27c0824f21e0.png" xlink:type="simple">https://r.res.easebar.com/pic/20241120/a53ce147-45d7-472a-b01d-27c0824f21e0.png</text:a></text:p>
          </table:table-cell>
          <table:table-cell table:style-name="ce1" office:value-type="string" calcext:value-type="string">
            <text:p>Leap high, then dash forward and slam down with the bionic arm, dealing damage to enemies in range, marking them for Culling. Marked enemies will perish instantly if their health falls below a certain threshold, recharging the bionic arm for another Kraken Impact within a short period</text:p>
          </table:table-cell>
          <table:table-cell table:style-name="ce1" office:value-type="string" calcext:value-type="string">
            <text:p><text:a xlink:href="https://www.marvelrivals.com/20241123/41360_1195681.html" xlink:type="simple">https://www.marvelrivals.com/20241123/41360_1195681.html</text:a></text:p>
          </table:table-cell>
          <table:table-cell table:style-name="ce1" office:value-type="string" calcext:value-type="string">
            <text:p>Mantis - Soul Resurgence, Luna Snow - Fate of Both Worlds, Mantis - Spore Slumber, Luna Snow - Ice Arts, Blade - Scarlet Shroud, Emma Frost - Psionic Seduction, Invisible Woman - Veiled Step, Mister Fantastic - Reflexive Rubber, Cloak&amp;Dagger - Eternal Bond, Cloak&amp;Dagger - Dark Teleportation, Iron Fist - Dragon's Defense, Psylocke - Dance of the Butterfly, Iron Man - Invincible Pulse Cannon, Moon Knight - Hand of Khonshu, Namor - Blessing of the Deep, Star-Lord - Stellar Shift, Magik - Stepping Discs, Captain America -Freedom Charge, Rocket Raccon - C.Y.A., Hulk - HULK SMASH!, Hulk - Indestructible Guard, Hulk - World Breaker, Jeff the Land Shark - It's Jeff!, </text:p>
          </table:table-cell>
          <table:table-cell table:style-name="ce2" table:number-columns-repeated="23"/>
          <table:table-cell table:number-columns-repeated="16355"/>
        </table:table-row>
        <table:table-row table:style-name="ro1">
          <table:table-cell table:style-name="ce1" office:value-type="string" calcext:value-type="string">
            <text:p>WINTER SOLDIER</text:p>
          </table:table-cell>
          <table:table-cell table:style-name="ce1" office:value-type="string" calcext:value-type="string">
            <text:p>Trooper's Fist</text:p>
          </table:table-cell>
          <table:table-cell table:style-name="ce1" office:value-type="string" calcext:value-type="string">
            <text:p><text:a xlink:href="https://r.res.easebar.com/pic/20241120/239b4e01-33ed-4f71-afd9-845810e96b8e.png" xlink:type="simple">https://r.res.easebar.com/pic/20241120/239b4e01-33ed-4f71-afd9-845810e96b8e.png</text:a></text:p>
          </table:table-cell>
          <table:table-cell table:style-name="ce1" office:value-type="string" calcext:value-type="string">
            <text:p>Dash forward, seizing enemies along the path and launching up enemies at the end of the dash</text:p>
          </table:table-cell>
          <table:table-cell table:style-name="ce1" office:value-type="string" calcext:value-type="string">
            <text:p><text:a xlink:href="https://www.marvelrivals.com/20241123/41360_1195681.html" xlink:type="simple">https://www.marvelrivals.com/20241123/41360_1195681.html</text:a></text:p>
          </table:table-cell>
          <table:table-cell table:style-name="ce1" office:value-type="string" calcext:value-type="string">
            <text:p>Phoenix - Telepathic Illusion, Phoenix - Telekinesis Burst, The Thing - Yancy Street Charge, Black Cat - Mento-Fish, The Thing - Unyielding Will, Squirrel Girl - Squirrel Blockade, Black Widow - Edge Dancer, Star-Lord - Blaster Barrage, Magik - Stepping Discs, Iron Fist - Dragon's Defense, Star-Lord - Stellar Shift,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WINTER SOLDIER</text:p>
          </table:table-cell>
          <table:table-cell table:style-name="ce1" office:value-type="string" calcext:value-type="string">
            <text:p>Tainted Voltage</text:p>
          </table:table-cell>
          <table:table-cell table:style-name="ce1" office:value-type="string" calcext:value-type="string">
            <text:p><text:a xlink:href="https://r.res.easebar.com/pic/20241120/65cf216c-9ad1-4a8e-9e2c-d7f1c2a9964c.png" xlink:type="simple">https://r.res.easebar.com/pic/20241120/65cf216c-9ad1-4a8e-9e2c-d7f1c2a9964c.png</text:a></text:p>
          </table:table-cell>
          <table:table-cell table:style-name="ce1" office:value-type="string" calcext:value-type="string">
            <text:p>Charge up and launch a powerful electrical punch with the bionic arm in the target direction, dealing damage to enemies within range and Slowing them. This ability can Knock Down flying heroes</text:p>
          </table:table-cell>
          <table:table-cell table:style-name="ce1" office:value-type="string" calcext:value-type="string">
            <text:p><text:a xlink:href="https://www.marvelrivals.com/20241123/41360_1195681.html" xlink:type="simple">https://www.marvelrivals.com/20241123/41360_1195681.html</text:a></text:p>
          </table:table-cell>
          <table:table-cell table:style-name="ce2" table:number-columns-repeated="24"/>
          <table:table-cell table:number-columns-repeated="16355"/>
        </table:table-row>
        <table:table-row table:style-name="ro1">
          <table:table-cell table:style-name="ce1" office:value-type="string" calcext:value-type="string">
            <text:p>WINTER SOLDIER</text:p>
          </table:table-cell>
          <table:table-cell table:style-name="ce1" office:value-type="string" calcext:value-type="string">
            <text:p>Bionic Hook</text:p>
          </table:table-cell>
          <table:table-cell table:style-name="ce1" office:value-type="string" calcext:value-type="string">
            <text:p><text:a xlink:href="https://r.res.easebar.com/pic/20241120/4173fa58-8641-47f9-9ee5-b63472fe074e.png" xlink:type="simple">https://r.res.easebar.com/pic/20241120/4173fa58-8641-47f9-9ee5-b63472fe074e.png</text:a></text:p>
          </table:table-cell>
          <table:table-cell table:style-name="ce1" office:value-type="string" calcext:value-type="string">
            <text:p>Charge up and launch a hook with his bionic arm, reeling in the first target hit and enemies lurking behind</text:p>
          </table:table-cell>
          <table:table-cell table:style-name="ce1" office:value-type="string" calcext:value-type="string">
            <text:p><text:a xlink:href="https://www.marvelrivals.com/20241123/41360_1195681.html" xlink:type="simple">https://www.marvelrivals.com/20241123/41360_1195681.html</text:a></text:p>
          </table:table-cell>
          <table:table-cell table:style-name="ce1" office:value-type="string" calcext:value-type="string">
            <text:p>Phoenix - Telepathic Illusion, Phoenix - Telekinesis Burst, The Thing - Yancy Street Charge, The Thing - Unyielding Will, Squirrel Girl - Tail Bounce, Magik - Stepping Discs, Iron Fist - Dragon's Defense, Star-Lord - Stellar Shift, Jeff the Land Shark - Hide and Seek, The Punisher - Culling Turret,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WINTER SOLDIER</text:p>
          </table:table-cell>
          <table:table-cell table:style-name="ce1" office:value-type="string" calcext:value-type="string">
            <text:p>Ceaseless Charge</text:p>
          </table:table-cell>
          <table:table-cell table:style-name="ce1" office:value-type="string" calcext:value-type="string">
            <text:p><text:a xlink:href="https://r.res.easebar.com/pic/20241120/55a1b572-78dd-47c3-8006-5b26e8d8813a.png" xlink:type="simple">https://r.res.easebar.com/pic/20241120/55a1b572-78dd-47c3-8006-5b26e8d8813a.png</text:a></text:p>
          </table:table-cell>
          <table:table-cell table:style-name="ce1" office:value-type="string" calcext:value-type="string">
            <text:p>Roterstern reloads automatically while the bionic arm is in action, granting Bonus Health to the Winter Soldier</text:p>
          </table:table-cell>
          <table:table-cell table:style-name="ce1" office:value-type="string" calcext:value-type="string">
            <text:p><text:a xlink:href="https://www.marvelrivals.com/20241123/41360_1195681.html" xlink:type="simple">https://www.marvelrivals.com/20241123/41360_1195681.html</text:a></text:p>
          </table:table-cell>
          <table:table-cell table:style-name="ce2" table:number-columns-repeated="24"/>
          <table:table-cell table:number-columns-repeated="16355"/>
        </table:table-row>
        <table:table-row table:style-name="ro1">
          <table:table-cell table:style-name="ce1" office:value-type="string" calcext:value-type="string">
            <text:p>WINTER SOLDIER</text:p>
          </table:table-cell>
          <table:table-cell table:style-name="ce1" office:value-type="string" calcext:value-type="string">
            <text:p>Stellar Impact</text:p>
          </table:table-cell>
          <table:table-cell table:style-name="ce1" office:value-type="string" calcext:value-type="string">
            <text:p><text:a xlink:href="https://r.res.easebar.com/pic/20250410/c34a6f5c-8be1-4bcb-a0f0-f5572a64e6e9.png" xlink:type="simple">https://r.res.easebar.com/pic/20250410/c34a6f5c-8be1-4bcb-a0f0-f5572a64e6e9.png</text:a></text:p>
          </table:table-cell>
          <table:table-cell table:style-name="ce1" office:value-type="string" calcext:value-type="string">
            <text:p>Inspired by Captain America's resolve, Winter Soldier can leap to the aid of a designated ally, slamming the ground with his mechanical arm to damage nearby foes and grant Bonus Health to allies within range. Captain America and Winter Soldier can interact with each other once both parties confirm. The duo then collides and unleashes a shockwave that damages and slows enemies</text:p>
          </table:table-cell>
          <table:table-cell table:style-name="ce1" office:value-type="string" calcext:value-type="string">
            <text:p><text:a xlink:href="https://www.marvelrivals.com/20241123/41360_1195681.html" xlink:type="simple">https://www.marvelrivals.com/20241123/41360_1195681.html</text:a></text:p>
          </table:table-cell>
          <table:table-cell table:style-name="ce2" table:number-columns-repeated="24"/>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Soulsword</text:p>
          </table:table-cell>
          <table:table-cell table:style-name="ce1" office:value-type="string" calcext:value-type="string">
            <text:p><text:a xlink:href="https://r.res.easebar.com/pic/20241120/3c254667-aec0-4d1f-bac8-8f74e5c7ec57.png" xlink:type="simple">https://r.res.easebar.com/pic/20241120/3c254667-aec0-4d1f-bac8-8f74e5c7ec57.png</text:a></text:p>
          </table:table-cell>
          <table:table-cell table:style-name="ce1" office:value-type="string" calcext:value-type="string">
            <text:p>Slash forward with the Soulsword</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Hawkeye - Piercing Arrow, Hawkeye - Blast Arrow,</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Darkchild</text:p>
          </table:table-cell>
          <table:table-cell table:style-name="ce1" office:value-type="string" calcext:value-type="string">
            <text:p><text:a xlink:href="https://r.res.easebar.com/pic/20241120/54ceb957-f089-4149-9b6e-f19b0b434f76.png" xlink:type="simple">https://r.res.easebar.com/pic/20241120/54ceb957-f089-4149-9b6e-f19b0b434f76.png</text:a></text:p>
          </table:table-cell>
          <table:table-cell table:style-name="ce1" office:value-type="string" calcext:value-type="string">
            <text:p>Transform into Darkchild, gaining enhancements to all her abilities</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Mantis - Soul Resurgence, Luna Snow - Fate of Both Worlds, Mantis - Spore Slumber, Luna Snow - Ice Arts, Angela - Assassin's Charge, Emma Frost - Psionic Seduction, Psylocke - Dance of the Butterfly, Moon Knight - Hand of Khonshu, Moon Knight - Ancient Ankh, Namor - Horn of Proteus, Star-Lord - Galactic Legend, Scarlet Witch - Dark Seal, Winter Soldier - Bionic Hook, Spider-man - Get Over Here!, Black Widow - Edge Dancer, Hela - Soul Drainer, Hulk - Radioactive Lockdown, Jeff the Land Shark - It's Jeff!,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Stepping Discs</text:p>
          </table:table-cell>
          <table:table-cell table:style-name="ce1" office:value-type="string" calcext:value-type="string">
            <text:p><text:a xlink:href="https://r.res.easebar.com/pic/20241120/83bdc026-b6c1-4c72-8a4e-b82036d06a5b.png" xlink:type="simple">https://r.res.easebar.com/pic/20241120/83bdc026-b6c1-4c72-8a4e-b82036d06a5b.png</text:a></text:p>
          </table:table-cell>
          <table:table-cell table:style-name="ce1" office:value-type="string" calcext:value-type="string">
            <text:p>Jump through a Stepping Disc, teleporting a short distance in the direction of movement. Become Invincible while teleporting</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The Thing - Yancy Street Charge, Black Cat - Mento-Fish,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Umbral Incursion</text:p>
          </table:table-cell>
          <table:table-cell table:style-name="ce1" office:value-type="string" calcext:value-type="string">
            <text:p><text:a xlink:href="https://r.res.easebar.com/pic/20241120/23e2f98e-b25d-465f-8aca-92772da73677.png" xlink:type="simple">https://r.res.easebar.com/pic/20241120/23e2f98e-b25d-465f-8aca-92772da73677.png</text:a></text:p>
          </table:table-cell>
          <table:table-cell table:style-name="ce1" office:value-type="string" calcext:value-type="string">
            <text:p>Dash forward and launch up enemies</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Phoenix - Telepathic Illusion, Phoenix - Telekinesis Burst, Mantis - Spore Slumber, Luna Snow - Ice Arts, Emma Frost - Carbon Crush, The Thing - Yancy Street Charge, Black Cat - Mento-Fish, The Thing - Unyielding Will, Black Widow - Edge Dancer, Iron Fist - Yat Jee Chung Kuen, Iron Fist - Dragon's Defense,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Eldritch Whirl</text:p>
          </table:table-cell>
          <table:table-cell table:style-name="ce1" office:value-type="string" calcext:value-type="string">
            <text:p><text:a xlink:href="https://r.res.easebar.com/pic/20241120/a360c242-9475-4d7b-ba43-efb57fdbc44a.png" xlink:type="simple">https://r.res.easebar.com/pic/20241120/a360c242-9475-4d7b-ba43-efb57fdbc44a.png</text:a></text:p>
          </table:table-cell>
          <table:table-cell table:style-name="ce1" office:value-type="string" calcext:value-type="string">
            <text:p>Spin while swinging the Soulsword after exiting a Stepping Disc</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Phoenix - Telekinesis Burst, Mantis - Spore Slumber, Luna Snow - Ice Arts,</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Magik Slash</text:p>
          </table:table-cell>
          <table:table-cell table:style-name="ce1" office:value-type="string" calcext:value-type="string">
            <text:p><text:a xlink:href="https://r.res.easebar.com/pic/20241120/ddcc3be2-0a9f-4588-bbeb-b6ecc289d8cf.png" xlink:type="simple">https://r.res.easebar.com/pic/20241120/ddcc3be2-0a9f-4588-bbeb-b6ecc289d8cf.png</text:a></text:p>
          </table:table-cell>
          <table:table-cell table:style-name="ce1" office:value-type="string" calcext:value-type="string">
            <text:p>Strike forward an air slash</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Magik - Stepping Discs, Iron Fist - Dragon's Defense,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Demon's Rage</text:p>
          </table:table-cell>
          <table:table-cell table:style-name="ce1" office:value-type="string" calcext:value-type="string">
            <text:p><text:a xlink:href="https://r.res.easebar.com/pic/20241120/a9c67524-0a71-4106-8a95-f26d78aa15e1.png" xlink:type="simple">https://r.res.easebar.com/pic/20241120/a9c67524-0a71-4106-8a95-f26d78aa15e1.png</text:a></text:p>
          </table:table-cell>
          <table:table-cell table:style-name="ce1" office:value-type="string" calcext:value-type="string">
            <text:p>Summon a Limbo demon that attacks enemies after exiting a Stepping Disc</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Phoenix - Endsong Inferno, 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Limbo's Might</text:p>
          </table:table-cell>
          <table:table-cell table:style-name="ce1" office:value-type="string" calcext:value-type="string">
            <text:p><text:a xlink:href="https://r.res.easebar.com/pic/20241120/ca2c47d6-8349-4bae-b6bc-58436c47776b.png" xlink:type="simple">https://r.res.easebar.com/pic/20241120/ca2c47d6-8349-4bae-b6bc-58436c47776b.png</text:a></text:p>
          </table:table-cell>
          <table:table-cell table:style-name="ce1" office:value-type="string" calcext:value-type="string">
            <text:p>Convert damage inflicted on enemies into Bonus Health to herself</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Phoenix - Endsong Inferno,</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CHAIN OF CYTTORAK</text:p>
          </table:table-cell>
          <table:table-cell table:style-name="ce1" office:value-type="string" calcext:value-type="string">
            <text:p><text:a xlink:href="https://r.res.easebar.com/pic/20250912/d6385e94-02b9-4890-b366-46e7194f8ade.png" xlink:type="simple">https://r.res.easebar.com/pic/20250912/d6385e94-02b9-4890-b366-46e7194f8ade.png</text:a></text:p>
          </table:table-cell>
          <table:table-cell table:style-name="ce1" office:value-type="string" calcext:value-type="string">
            <text:p>Doctor Strange shares his arcane mastery with Scarlet Witch and Magik. Scarlet Witch's Chthonian Burst is replaced with Mystic Burst upon activation. Hold down the attack button to unleash a rapid, relentless salvo of magical missiles in the target direction. Magik can unleash a Chain of Cyttorak that links two enemies and slows them; the farther they are apart, the greater the Slow effect inflicted during the link</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2" table:number-columns-repeated="24"/>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Soulsword</text:p>
          </table:table-cell>
          <table:table-cell table:style-name="ce1" office:value-type="string" calcext:value-type="string">
            <text:p><text:a xlink:href="https://r.res.easebar.com/pic/20241120/1429fdcf-3e9f-4dd9-873e-4ccf6f758cfd.png" xlink:type="simple">https://r.res.easebar.com/pic/20241120/1429fdcf-3e9f-4dd9-873e-4ccf6f758cfd.png</text:a></text:p>
          </table:table-cell>
          <table:table-cell table:style-name="ce1" office:value-type="string" calcext:value-type="string">
            <text:p>Slash forward with the Soulsword</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2" table:number-columns-repeated="24"/>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Stepping Discs</text:p>
          </table:table-cell>
          <table:table-cell table:style-name="ce1" office:value-type="string" calcext:value-type="string">
            <text:p><text:a xlink:href="https://r.res.easebar.com/pic/20241120/77738b7f-79a1-4eae-8d72-8bbda393bd5e.png" xlink:type="simple">https://r.res.easebar.com/pic/20241120/77738b7f-79a1-4eae-8d72-8bbda393bd5e.png</text:a></text:p>
          </table:table-cell>
          <table:table-cell table:style-name="ce1" office:value-type="string" calcext:value-type="string">
            <text:p>Jump through a Stepping Disc, teleporting a short distance in the direction of movement. Become Invincible while teleporting</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The Thing - Yancy Street Charge, Black Cat - Mento-Fish,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Umbral Incursion</text:p>
          </table:table-cell>
          <table:table-cell table:style-name="ce1" office:value-type="string" calcext:value-type="string">
            <text:p><text:a xlink:href="https://r.res.easebar.com/pic/20241120/d5f0b817-5275-4e8f-a1cf-7674cfe5e077.png" xlink:type="simple">https://r.res.easebar.com/pic/20241120/d5f0b817-5275-4e8f-a1cf-7674cfe5e077.png</text:a></text:p>
          </table:table-cell>
          <table:table-cell table:style-name="ce1" office:value-type="string" calcext:value-type="string">
            <text:p>Dash forward and launch up enemies</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Emma Frost - Carbon Crush, Emma Frost - Diamond Form, The Thing - Yancy Street Charge, Black Cat - Mento-Fish, The Thing - Unyielding Will, Mister Fantastic - Distended Grip, Squirrel Girl - Squirrel Blockade, Black Widow - Edge Dancer, Iron Fist - Yat Jee Chung Kuen, Iron Fist - Dragon's Defense,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Eldritch Whirl</text:p>
          </table:table-cell>
          <table:table-cell table:style-name="ce1" office:value-type="string" calcext:value-type="string">
            <text:p><text:a xlink:href="https://r.res.easebar.com/pic/20241120/ab4444b3-e2b2-4855-bce8-ac5e4aadec45.png" xlink:type="simple">https://r.res.easebar.com/pic/20241120/ab4444b3-e2b2-4855-bce8-ac5e4aadec45.png</text:a></text:p>
          </table:table-cell>
          <table:table-cell table:style-name="ce1" office:value-type="string" calcext:value-type="string">
            <text:p>Spin while swinging the Soulsword after exiting a Stepping Disc</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2" table:number-columns-repeated="24"/>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Magik Slash</text:p>
          </table:table-cell>
          <table:table-cell table:style-name="ce1" office:value-type="string" calcext:value-type="string">
            <text:p><text:a xlink:href="https://r.res.easebar.com/pic/20241120/055e35e2-253d-45da-ae04-82984115f741.png" xlink:type="simple">https://r.res.easebar.com/pic/20241120/055e35e2-253d-45da-ae04-82984115f741.png</text:a></text:p>
          </table:table-cell>
          <table:table-cell table:style-name="ce1" office:value-type="string" calcext:value-type="string">
            <text:p>Strike forward an air slash</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Mister Fantastic - Distended Grip, Magik - Stepping Discs, Iron Fist - Dragon's Defense,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MAGIK</text:p>
          </table:table-cell>
          <table:table-cell table:style-name="ce1" office:value-type="string" calcext:value-type="string">
            <text:p>Demon's Rage</text:p>
          </table:table-cell>
          <table:table-cell table:style-name="ce1" office:value-type="string" calcext:value-type="string">
            <text:p><text:a xlink:href="https://r.res.easebar.com/pic/20241120/7c8271e5-5e8c-4394-a7d5-7a9e6f578295.png" xlink:type="simple">https://r.res.easebar.com/pic/20241120/7c8271e5-5e8c-4394-a7d5-7a9e6f578295.png</text:a></text:p>
          </table:table-cell>
          <table:table-cell table:style-name="ce1" office:value-type="string" calcext:value-type="string">
            <text:p>Summon a Limbo demon that attacks enemies after exiting a Stepping Disc</text:p>
          </table:table-cell>
          <table:table-cell table:style-name="ce1" office:value-type="string" calcext:value-type="string">
            <text:p><text:a xlink:href="https://www.marvelrivals.com/20241123/41360_1195682.html" xlink:type="simple">https://www.marvelrivals.com/20241123/41360_1195682.html</text:a></text:p>
          </table:table-cell>
          <table:table-cell table:style-name="ce1" office:value-type="string" calcext:value-type="string">
            <text:p>Phoenix - Endsong Inferno, Namor - Aquatic Dominion,</text:p>
          </table:table-cell>
          <table:table-cell table:style-name="ce2" table:number-columns-repeated="23"/>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Spider-Power</text:p>
          </table:table-cell>
          <table:table-cell table:style-name="ce1" office:value-type="string" calcext:value-type="string">
            <text:p><text:a xlink:href="https://r.res.easebar.com/pic/20241120/b69dc2e7-1a28-471e-a000-19b06a1adac4.png" xlink:type="simple">https://r.res.easebar.com/pic/20241120/b69dc2e7-1a28-471e-a000-19b06a1adac4.png</text:a></text:p>
          </table:table-cell>
          <table:table-cell table:style-name="ce1" office:value-type="string" calcext:value-type="string">
            <text:p>Swing fists forward to strike, dealing extra damage to the enemy with a Spider-Tracer</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2" table:number-columns-repeated="24"/>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Web-Cluster</text:p>
          </table:table-cell>
          <table:table-cell table:style-name="ce1" office:value-type="string" calcext:value-type="string">
            <text:p><text:a xlink:href="https://r.res.easebar.com/pic/20241120/51836fcc-b278-46b2-80d6-3450f9902f18.png" xlink:type="simple">https://r.res.easebar.com/pic/20241120/51836fcc-b278-46b2-80d6-3450f9902f18.png</text:a></text:p>
          </table:table-cell>
          <table:table-cell table:style-name="ce1" office:value-type="string" calcext:value-type="string">
            <text:p>Shoot a Web-Cluster that deals damage and attaches a Spider-Tracer to the hit enemy</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Ronin Slash, Star-Lord - Blaster Barrage,</text:p>
          </table:table-cell>
          <table:table-cell table:style-name="ce2" table:number-columns-repeated="23"/>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Spectacular Spin</text:p>
          </table:table-cell>
          <table:table-cell table:style-name="ce1" office:value-type="string" calcext:value-type="string">
            <text:p><text:a xlink:href="https://r.res.easebar.com/pic/20241120/df0e1190-adea-471c-aa47-186aaabe41dc.png" xlink:type="simple">https://r.res.easebar.com/pic/20241120/df0e1190-adea-471c-aa47-186aaabe41dc.png</text:a></text:p>
          </table:table-cell>
          <table:table-cell table:style-name="ce1" office:value-type="string" calcext:value-type="string">
            <text:p>Launch Web-Clusters all around to damage and Stun enemies</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1" office:value-type="string" calcext:value-type="string">
            <text:p>Mantis - Soul Resurgence, Luna Snow - Fate of Both Worlds, Mantis - Spore Slumber, Luna Snow - Ice Arts, Angela - Assassin's Charge, Phoenix - Telepathic Illusion, Phoenix - Telekinesis Burst, Ultron - Rage of Ultron, Emma Frost - Psionic Seduction, Emma Frost - Carbon Crush, The Thing - Yancy Street Charge, The Thing - Clobberin' Time, Mister Fantastic - Reflexive Rubber, Black Widow - Edge Dancer, Wolverine - Last Stand, Wolverine - Feral Leap, Cloak&amp;Dagger - Eternal Bond, Cloak&amp;Dagger - Dark Teleportation, Iron Fist - Dragon's Defense, Psylocke - Dance of the Butterfly, Hawkeye - Crescent Slash, Iron Man - Invincible Pulse Cannon, Moon Knight - Hand of Khonshu, Namor - Blessing of the Deep, Namor - Horn of Proteus, Hulk - World Breaker, Hulk - Radioactive Lockdown, Scarlet Witch - Dark Seal, Scarlet Witch - Mystic Projection, Winter Soldier - Trooper's Fist, Winter Soldier - Bionic Hook, Magik - Stepping Discs, Star-Lord - Stellar Shift, Spider-man - Get Over Here!, Hela - Soul Drainer, Storm - Omega Hurricane, Jeff the Land Shark - It's Jeff!, Jeff the Land Shark - Hide and Seek, The Punisher - Culling Turret,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Web-Swing</text:p>
          </table:table-cell>
          <table:table-cell table:style-name="ce1" office:value-type="string" calcext:value-type="string">
            <text:p><text:a xlink:href="https://r.res.easebar.com/pic/20241120/fb95e6a5-5e9d-44d7-b565-2cda190e0cb8.png" xlink:type="simple">https://r.res.easebar.com/pic/20241120/fb95e6a5-5e9d-44d7-b565-2cda190e0cb8.png</text:a></text:p>
          </table:table-cell>
          <table:table-cell table:style-name="ce1" office:value-type="string" calcext:value-type="string">
            <text:p>Shoot a strand of webbing to swing.</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1" office:value-type="string" calcext:value-type="string">
            <text:p>Blade - Daywalker Dash, Phoenix - Telekinesis Burst, Mantis - Spore Slumber, Luna Snow - Ice Arts, The Thing - Yancy Street Charge, Black Cat - Mento-Fish, The Thing - Battle Blitz, Squirrel Girl - Squirrel Blockade, Black Widow - Edge Dancer, Namor - Aquatic Dominion, Star-Lord - Galactic Legend, Scarlet Witch - Chaos Control, Scarlet Witch - Dark Seal, Winter Soldier - Trooper's Fist, Winter Soldier - Bionic Hook, Spider-man - Get Over Here!, Hela - Soul Drainer,</text:p>
          </table:table-cell>
          <table:table-cell table:style-name="ce2" table:number-columns-repeated="23"/>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Get Over Here!</text:p>
          </table:table-cell>
          <table:table-cell table:style-name="ce1" office:value-type="string" calcext:value-type="string">
            <text:p><text:a xlink:href="https://r.res.easebar.com/pic/20241120/d3b40d5d-cb78-4e6d-990c-0ec61404f8e0.png" xlink:type="simple">https://r.res.easebar.com/pic/20241120/d3b40d5d-cb78-4e6d-990c-0ec61404f8e0.png</text:a></text:p>
          </table:table-cell>
          <table:table-cell table:style-name="ce1" office:value-type="string" calcext:value-type="string">
            <text:p>Shoot webbing to reel in the hit enemy. If the enemy is tagged with a Spider-Tracer, Spider-Man will get pulled to them instead</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1" office:value-type="string" calcext:value-type="string">
            <text:p>Phoenix - Telepathic Illusion, Phoenix - Telekinesis Burst, Emma Frost - Diamond Form, Emma Frost - Carbon Crush, The Thing - Unyielding Will, The Thing - Yancy Street Charge, Invisible Woman - Force Physics, Cloak&amp;Dagger - Terror Cape, Cloak&amp;Dagger - Dark Teleportation, Iron Fist - Dragon's Defense, Hawkeye - Crescent Slash, Scarlet Witch - Mystic Projection, The Punisher - Culling Turret, </text:p>
          </table:table-cell>
          <table:table-cell table:style-name="ce2" table:number-columns-repeated="23"/>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Amazing Combo</text:p>
          </table:table-cell>
          <table:table-cell table:style-name="ce1" office:value-type="string" calcext:value-type="string">
            <text:p><text:a xlink:href="https://r.res.easebar.com/pic/20241120/db4cbe9c-98b6-47b2-849b-655e63c86f87.png" xlink:type="simple">https://r.res.easebar.com/pic/20241120/db4cbe9c-98b6-47b2-849b-655e63c86f87.png</text:a></text:p>
          </table:table-cell>
          <table:table-cell table:style-name="ce1" office:value-type="string" calcext:value-type="string">
            <text:p>Launch an enemy upward, dealing extra damage to the enemy with a Spider-Tracer</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1" office:value-type="string" calcext:value-type="string">
            <text:p>Phoenix - Telepathic Illusion, Phoenix - Telekinesis Burst, Emma Frost - Diamond Form, Emma Frost - Carbon Crush, The Thing - Unyielding Will, The Thing - Yancy Street Charge, Invisible Woman - Force Physics, Mister Fantastic - Distended Grip, Squirrel Girl - Tail Bounce, Squirrel Girl - Squirrel Blockade, Black Widow - Edge Dancer, Winter Soldier - Trooper's Fist, Winter Soldier - Bionic Hook, Magik - Stepping Discs, Iron Fist - Dragon's Defense, Star-Lord - Stellar Shift, Hela - Soul Drainer, Jeff the Land Shark - Hide and Seek, </text:p>
          </table:table-cell>
          <table:table-cell table:style-name="ce2" table:number-columns-repeated="23"/>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Thwip and Flip</text:p>
          </table:table-cell>
          <table:table-cell table:style-name="ce1" office:value-type="string" calcext:value-type="string">
            <text:p><text:a xlink:href="https://r.res.easebar.com/pic/20241124/82debb10-0166-41c3-914e-9dee98cd30af.png" xlink:type="simple">https://r.res.easebar.com/pic/20241124/82debb10-0166-41c3-914e-9dee98cd30af.png</text:a></text:p>
          </table:table-cell>
          <table:table-cell table:style-name="ce1" office:value-type="string" calcext:value-type="string">
            <text:p>Perform a double jump</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1" office:value-type="string" calcext:value-type="string">
            <text:p>Squirrel Girl - Squirrel Blockade, Hela - Soul Drainer,</text:p>
          </table:table-cell>
          <table:table-cell table:style-name="ce2" table:number-columns-repeated="23"/>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Spider-Sense</text:p>
          </table:table-cell>
          <table:table-cell table:style-name="ce1" office:value-type="string" calcext:value-type="string">
            <text:p><text:a xlink:href="https://r.res.easebar.com/pic/20241120/70f075d3-fdcc-4339-b537-061af16fae55.png" xlink:type="simple">https://r.res.easebar.com/pic/20241120/70f075d3-fdcc-4339-b537-061af16fae55.png</text:a></text:p>
          </table:table-cell>
          <table:table-cell table:style-name="ce1" office:value-type="string" calcext:value-type="string">
            <text:p>Give a warning of enemies that have been around</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2" table:number-columns-repeated="24"/>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Wall Crawl</text:p>
          </table:table-cell>
          <table:table-cell table:style-name="ce1" office:value-type="string" calcext:value-type="string">
            <text:p><text:a xlink:href="https://r.res.easebar.com/pic/20241120/e0ab4409-cfaa-4e13-9731-240a09a6a553.png" xlink:type="simple">https://r.res.easebar.com/pic/20241120/e0ab4409-cfaa-4e13-9731-240a09a6a553.png</text:a></text:p>
          </table:table-cell>
          <table:table-cell table:style-name="ce1" office:value-type="string" calcext:value-type="string">
            <text:p>Press Space to wall crawl, and while crawling, left-click to sprint</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1" office:value-type="string" calcext:value-type="string">
            <text:p>Mantis - Spore Slumber, Luna Snow - Ice Arts, Phoenix - Telekinesis Burst, Emma Frost - Carbon Crush, Emma Frost - Crystal Kick, The Thing - Yancy Street Charge, Invisible Woman - Force Physics, Mister Fantastic - Distended Grip, Mister Fantastic - Flexible Elongation, Squirrel Girl - Squirrel Blockade, Iron Fist - Yat Jee Chung Kuen, Winter Soldier - Trooper's Fist, Winter Soldier - Bionic Hook, Spider-man - Get Over Here!, Hela - Soul Drainer, Storm - Omega Hurricane, Angela - Assassins Charge, Blade - Daywalker Dash, Winter Soldier - Tainted Voltage, Hulk - Incredible Leap,</text:p>
          </table:table-cell>
          <table:table-cell table:style-name="ce2" table:number-columns-repeated="23"/>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Inferno Blast</text:p>
          </table:table-cell>
          <table:table-cell table:style-name="ce1" office:value-type="string" calcext:value-type="string">
            <text:p><text:a xlink:href="https://r.res.easebar.com/pic/20250712/76419110-b69d-460d-a1d3-4ccbceb7f6de.png" xlink:type="simple">https://r.res.easebar.com/pic/20250712/76419110-b69d-460d-a1d3-4ccbceb7f6de.png</text:a></text:p>
          </table:table-cell>
          <table:table-cell table:style-name="ce1" office:value-type="string" calcext:value-type="string">
            <text:p>Human Torch stores Pyrokinetic Energy in Spider-Man's suit, enabling him to unleash an Inferno Blast that sprays a fiery web while performing a backflip to create distance. The flames damage enemies and apply a Burn-Tracer. Detonating these Burn-Tracers inflicts Damage Over Time</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2" table:number-columns-repeated="24"/>
          <table:table-cell table:number-columns-repeated="16355"/>
        </table:table-row>
        <table:table-row table:style-name="ro1">
          <table:table-cell table:style-name="ce1" office:value-type="string" calcext:value-type="string">
            <text:p>SPIDER-MAN</text:p>
          </table:table-cell>
          <table:table-cell table:style-name="ce1" office:value-type="string" calcext:value-type="string">
            <text:p>Sticky Spider-Bomb</text:p>
          </table:table-cell>
          <table:table-cell table:style-name="ce1" office:value-type="string" calcext:value-type="string">
            <text:p><text:a xlink:href="https://r.res.easebar.com/pic/20260117/65af9b66-0441-49bc-aa49-9756d53c483d.png" xlink:type="simple">https://r.res.easebar.com/pic/20260117/65af9b66-0441-49bc-aa49-9756d53c483d.png</text:a></text:p>
          </table:table-cell>
          <table:table-cell table:style-name="ce1" office:value-type="string" calcext:value-type="string">
            <text:p>Cyber-Spiders Peni Parker whips up a Sticky Bomb for Spider-Man! Prime it, then toss it before the timer's up for a blast that damages nearby enemies and attaches a Spider-Tracer to them. If not thrown in time, it explodes on Spider-Man, recharging a Web-Cluster shot and granting Bonus Health</text:p>
          </table:table-cell>
          <table:table-cell table:style-name="ce1" office:value-type="string" calcext:value-type="string">
            <text:p><text:a xlink:href="https://www.marvelrivals.com/20241123/41360_1195680.html" xlink:type="simple">https://www.marvelrivals.com/20241123/41360_1195680.html</text:a></text:p>
          </table:table-cell>
          <table:table-cell table:style-name="ce2" table:number-columns-repeated="24"/>
          <table:table-cell table:number-columns-repeated="16355"/>
        </table:table-row>
        <table:table-row table:style-name="ro1">
          <table:table-cell table:style-name="ce1" office:value-type="string" calcext:value-type="string">
            <text:p>BLACK PANTHER</text:p>
          </table:table-cell>
          <table:table-cell table:style-name="ce1" office:value-type="string" calcext:value-type="string">
            <text:p>Vibranium Claws</text:p>
          </table:table-cell>
          <table:table-cell table:style-name="ce1" office:value-type="string" calcext:value-type="string">
            <text:p><text:a xlink:href="https://r.res.easebar.com/pic/20241120/095862fd-2dce-4947-8996-58741ba3e326.png" xlink:type="simple">https://r.res.easebar.com/pic/20241120/095862fd-2dce-4947-8996-58741ba3e326.png</text:a></text:p>
          </table:table-cell>
          <table:table-cell table:style-name="ce1" office:value-type="string" calcext:value-type="string">
            <text:p>Slice Vibranium Claws forward</text:p>
          </table:table-cell>
          <table:table-cell table:style-name="ce1" office:value-type="string" calcext:value-type="string">
            <text:p><text:a xlink:href="https://www.marvelrivals.com/20241123/41360_1195677.html" xlink:type="simple">https://www.marvelrivals.com/20241123/41360_1195677.html</text:a></text:p>
          </table:table-cell>
          <table:table-cell table:style-name="ce1" office:value-type="string" calcext:value-type="string">
            <text:p>Hawkeye - Piercing Arrow, Hawkeye - Blast Arrow, Hawkeye - Hypersonic Arrow, Namor - Aquatic Dominion, Scarlet Witch - Chaos Control,</text:p>
          </table:table-cell>
          <table:table-cell table:style-name="ce2" table:number-columns-repeated="23"/>
          <table:table-cell table:number-columns-repeated="16355"/>
        </table:table-row>
        <table:table-row table:style-name="ro1">
          <table:table-cell table:style-name="ce1" office:value-type="string" calcext:value-type="string">
            <text:p>BLACK PANTHER</text:p>
          </table:table-cell>
          <table:table-cell table:style-name="ce1" office:value-type="string" calcext:value-type="string">
            <text:p>Bast's Descent</text:p>
          </table:table-cell>
          <table:table-cell table:style-name="ce1" office:value-type="string" calcext:value-type="string">
            <text:p><text:a xlink:href="https://r.res.easebar.com/pic/20241120/796baaa9-278e-464f-a394-bc5869dbc473.png" xlink:type="simple">https://r.res.easebar.com/pic/20241120/796baaa9-278e-464f-a394-bc5869dbc473.png</text:a></text:p>
          </table:table-cell>
          <table:table-cell table:style-name="ce1" office:value-type="string" calcext:value-type="string">
            <text:p>Summon Bast, pouncing forward, dealing damage, and attaching a Vibranium Mark to enemies hit while refreshing Spirit Rend</text:p>
          </table:table-cell>
          <table:table-cell table:style-name="ce1" office:value-type="string" calcext:value-type="string">
            <text:p><text:a xlink:href="https://www.marvelrivals.com/20241123/41360_1195677.html" xlink:type="simple">https://www.marvelrivals.com/20241123/41360_1195677.html</text:a></text:p>
          </table:table-cell>
          <table:table-cell table:style-name="ce1" office:value-type="string" calcext:value-type="string">
            <text:p>Mantis - Soul Resurgence, Luna Snow - Fate of Both Worlds, Mantis - Spore Slumber, Luna Snow - Ice Arts, Angela - Assassin's Charge, The Thing - Clobberin' Time, The Thing - Embattled Leap, Mister Fantastic - Reflexive Rubber, Black Widow - Edge Dancer, Wolverine - Last Stand, Wolverine - Feral Leap, Wolverine - Regenerative Healing Factor, Cloak&amp;Dagger - Dark Teleportation, Iron Fist - Yat Jee Chung Kuen, Iron Fist - Dragon's Defense, Psylocke - Dance of the Butterfly, Moon Knight - Hand of Khonshu, Namor - Blessing of the Deep, Namor - Horn of Proteus, Hulk - World Breaker, Hulk - Radioactive Lockdown, Emma Frost - Carbon Crush, Star-Lord - Stellar Shift, Scarlet Witch - Mystic Projection, Scarlet Witch - Dark Seal, Winter Soldier - Trooper's Fist, Winter Soldier - Bionic Hook, Magik - Stepping Discs, Spider-man - Get Over Here!, Hela - Soul Drainer, Hulk - HULK SMASH!, Hulk - Indestructible Guard, Jeff the Land Shark - It's Jeff!,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BLACK PANTHER</text:p>
          </table:table-cell>
          <table:table-cell table:style-name="ce1" office:value-type="string" calcext:value-type="string">
            <text:p>Spirit Rend</text:p>
          </table:table-cell>
          <table:table-cell table:style-name="ce1" office:value-type="string" calcext:value-type="string">
            <text:p><text:a xlink:href="https://r.res.easebar.com/pic/20241120/5420a5ab-0ba8-4c9c-8953-7f60adf79cd2.png" xlink:type="simple">https://r.res.easebar.com/pic/20241120/5420a5ab-0ba8-4c9c-8953-7f60adf79cd2.png</text:a></text:p>
          </table:table-cell>
          <table:table-cell table:style-name="ce1" office:value-type="string" calcext:value-type="string">
            <text:p>Lunge forward and deal damage to enemies. Vibranium Mark produces Bonus Health and refreshes the ability</text:p>
          </table:table-cell>
          <table:table-cell table:style-name="ce1" office:value-type="string" calcext:value-type="string">
            <text:p><text:a xlink:href="https://www.marvelrivals.com/20241123/41360_1195677.html" xlink:type="simple">https://www.marvelrivals.com/20241123/41360_1195677.html</text:a></text:p>
          </table:table-cell>
          <table:table-cell table:style-name="ce1" office:value-type="string" calcext:value-type="string">
            <text:p>Mantis - Spore Slumber, Luna Snow - Ice Arts, Phoenix - Telepathic Illusion, Phoenix - Telekinesis Burst, Emma Frost - Carbon Crush, The Thing - Yancy Street Charge, Black Cat - Mento-Fish, Human Torch - Flaming Meteor, Invisible Woman - Veiled Step, Mister Fantastic - Distended Grip, Squirrel Girl - Tail Bounce, Squirrel Girl - Squirrel Blockade, Wolverine - Feral Leap, Cloak&amp;Dagger - Terror Cape, Cloak&amp;Dagger - Dark Teleportation, Iron Fist - Dragon's Defense, Namor - Horn of Proteus, Star-Lord - Stellar Shift, Winter Soldier - Trooper's Fist, Magik - Stepping Discs, Hela - Soul Drainer, Rogue - Fatal Attraction, Rogue - Ability Absorption, Storm - Goddess Boost, The Punisher - Scourge Grenade,</text:p>
          </table:table-cell>
          <table:table-cell table:style-name="ce2" table:number-columns-repeated="23"/>
          <table:table-cell table:number-columns-repeated="16355"/>
        </table:table-row>
        <table:table-row table:style-name="ro1">
          <table:table-cell table:style-name="ce1" office:value-type="string" calcext:value-type="string">
            <text:p>BLACK PANTHER</text:p>
          </table:table-cell>
          <table:table-cell table:style-name="ce1" office:value-type="string" calcext:value-type="string">
            <text:p>Spinning Kick</text:p>
          </table:table-cell>
          <table:table-cell table:style-name="ce1" office:value-type="string" calcext:value-type="string">
            <text:p><text:a xlink:href="https://r.res.easebar.com/pic/20241120/a56f606b-d519-49aa-9570-cc615be6f239.png" xlink:type="simple">https://r.res.easebar.com/pic/20241120/a56f606b-d519-49aa-9570-cc615be6f239.png</text:a></text:p>
          </table:table-cell>
          <table:table-cell table:style-name="ce1" office:value-type="string" calcext:value-type="string">
            <text:p>Spiral forward and attach a Vibranium Mark to enemies hit</text:p>
          </table:table-cell>
          <table:table-cell table:style-name="ce1" office:value-type="string" calcext:value-type="string">
            <text:p><text:a xlink:href="https://www.marvelrivals.com/20241123/41360_1195677.html" xlink:type="simple">https://www.marvelrivals.com/20241123/41360_1195677.html</text:a></text:p>
          </table:table-cell>
          <table:table-cell table:style-name="ce1" office:value-type="string" calcext:value-type="string">
            <text:p>Mantis - Spore Slumber, Luna Snow - Ice Arts, Phoenix - Telepathic Illusion, Phoenix - Telekinesis Burst, Emma Frost - Carbon Crush, The Thing - Yancy Street Charge, Black Cat - Mento-Fish, Human Torch - Flaming Meteor, Invisible Woman - Veiled Step, Mister Fantastic - Distended Grip, Squirrel Girl - Tail Bounce, Squirrel Girl - Squirrel Blockade, Wolverine - Feral Leap, Cloak&amp;Dagger - Terror Cape, Cloak&amp;Dagger - Dark Teleportation, Iron Fist - Dragon's Defense, Namor - Horn of Proteus, Star-Lord - Stellar Shift, Winter Soldier - Trooper's Fist, Magik - Stepping Discs, Hela - Soul Drainer, Rogue - Fatal Attraction, Rogue - Ability Absorption, Storm - Goddess Boost</text:p>
          </table:table-cell>
          <table:table-cell table:style-name="ce2" table:number-columns-repeated="23"/>
          <table:table-cell table:number-columns-repeated="16355"/>
        </table:table-row>
        <table:table-row table:style-name="ro1">
          <table:table-cell table:style-name="ce1" office:value-type="string" calcext:value-type="string">
            <text:p>BLACK PANTHER</text:p>
          </table:table-cell>
          <table:table-cell table:style-name="ce1" office:value-type="string" calcext:value-type="string">
            <text:p>Subtle Step</text:p>
          </table:table-cell>
          <table:table-cell table:style-name="ce1" office:value-type="string" calcext:value-type="string">
            <text:p><text:a xlink:href="https://r.res.easebar.com/pic/20241120/715f8f12-5bf3-4f11-a583-ee4ad606136d.png" xlink:type="simple">https://r.res.easebar.com/pic/20241120/715f8f12-5bf3-4f11-a583-ee4ad606136d.png</text:a></text:p>
          </table:table-cell>
          <table:table-cell table:style-name="ce1" office:value-type="string" calcext:value-type="string">
            <text:p>Hold Space to run on a wall, perform a jump after detaching from the wall</text:p>
          </table:table-cell>
          <table:table-cell table:style-name="ce1" office:value-type="string" calcext:value-type="string">
            <text:p><text:a xlink:href="https://www.marvelrivals.com/20241123/41360_1195677.html" xlink:type="simple">https://www.marvelrivals.com/20241123/41360_1195677.html</text:a></text:p>
          </table:table-cell>
          <table:table-cell table:style-name="ce1" office:value-type="string" calcext:value-type="string">
            <text:p>Invisible Woman - Force Physics, Winter Soldier - Trooper's Fist, Winter Soldier - Bionic Hook, Spider-man - Get Over Here!, Storm - Omega Hurricane, Hulk - Incredible Leap,</text:p>
          </table:table-cell>
          <table:table-cell table:style-name="ce2" table:number-columns-repeated="23"/>
          <table:table-cell table:number-columns-repeated="16355"/>
        </table:table-row>
        <table:table-row table:style-name="ro1">
          <table:table-cell table:style-name="ce1" office:value-type="string" calcext:value-type="string">
            <text:p>BLACK PANTHER</text:p>
          </table:table-cell>
          <table:table-cell table:style-name="ce1" office:value-type="string" calcext:value-type="string">
            <text:p>Spear Toss</text:p>
          </table:table-cell>
          <table:table-cell table:style-name="ce1" office:value-type="string" calcext:value-type="string">
            <text:p><text:a xlink:href="https://r.res.easebar.com/pic/20241120/4ccd846a-f72e-4d69-aa9f-6c459f67648c.png" xlink:type="simple">https://r.res.easebar.com/pic/20241120/4ccd846a-f72e-4d69-aa9f-6c459f67648c.png</text:a></text:p>
          </table:table-cell>
          <table:table-cell table:style-name="ce1" office:value-type="string" calcext:value-type="string">
            <text:p>Toss a Vibranium energy spear forward, creating a Vibranium Force Field and attaching a Vibranium Mark to enemies in its radius</text:p>
          </table:table-cell>
          <table:table-cell table:style-name="ce1" office:value-type="string" calcext:value-type="string">
            <text:p><text:a xlink:href="https://www.marvelrivals.com/20241123/41360_1195677.html" xlink:type="simple">https://www.marvelrivals.com/20241123/41360_1195677.html</text:a></text:p>
          </table:table-cell>
          <table:table-cell table:style-name="ce1" office:value-type="string" calcext:value-type="string">
            <text:p>Angela - Shielded Stance, Phoenix - Telepathic Illusion, Emma Frost - Mind's Aegis, Captain America - Living Legend, Magneto - Metallic Curtain, Doctor Strange - Shield of the Seraphim, Groot - Thornlash Wall, Groot - Ironwood Wall, Deadpool - Magical Unicorn Shield!, Invisible Woman - Guardian Shield, Cloak&amp;Dagger - Dark Teleportation, Magik - Stepping Discs,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BLACK PANTHER</text:p>
          </table:table-cell>
          <table:table-cell table:style-name="ce1" office:value-type="string" calcext:value-type="string">
            <text:p>Panther's Cunning</text:p>
          </table:table-cell>
          <table:table-cell table:style-name="ce1" office:value-type="string" calcext:value-type="string">
            <text:p><text:a xlink:href="https://r.res.easebar.com/pic/20241120/07bd1118-a93b-49f7-8789-696e0480ee44.png" xlink:type="simple">https://r.res.easebar.com/pic/20241120/07bd1118-a93b-49f7-8789-696e0480ee44.png</text:a></text:p>
          </table:table-cell>
          <table:table-cell table:style-name="ce1" office:value-type="string" calcext:value-type="string">
            <text:p>Deal higher damage when at low Health</text:p>
          </table:table-cell>
          <table:table-cell table:style-name="ce1" office:value-type="string" calcext:value-type="string">
            <text:p><text:a xlink:href="https://www.marvelrivals.com/20241123/41360_1195677.html" xlink:type="simple">https://www.marvelrivals.com/20241123/41360_1195677.html</text:a></text:p>
          </table:table-cell>
          <table:table-cell table:style-name="ce2" table:number-columns-repeated="24"/>
          <table:table-cell table:number-columns-repeated="16355"/>
        </table:table-row>
        <table:table-row table:style-name="ro1">
          <table:table-cell table:style-name="ce1" office:value-type="string" calcext:value-type="string">
            <text:p>BLACK PANTHER</text:p>
          </table:table-cell>
          <table:table-cell table:style-name="ce1" office:value-type="string" calcext:value-type="string">
            <text:p>GAMMA VIBRANIUM ARMOR</text:p>
          </table:table-cell>
          <table:table-cell table:style-name="ce1" office:value-type="string" calcext:value-type="string">
            <text:p><text:a xlink:href="https://r.res.easebar.com/pic/20250912/d1ab2347-3f3a-48e8-a936-506f89e78a75.png" xlink:type="simple">https://r.res.easebar.com/pic/20250912/d1ab2347-3f3a-48e8-a936-506f89e78a75.png</text:a></text:p>
          </table:table-cell>
          <table:table-cell table:style-name="ce1" office:value-type="string" calcext:value-type="string">
            <text:p>Hulk charges Namor and Black Panther with gamma radiation. Namor can summon an extra Gamma Monstro which will continuously fire gamma rays at locked-on enemies. The longer the rays hit, the higher the damage. Black Panther's Vibranium armor is enhanced; when his health is low he receives a gamma shield, blocking incoming attacks and becoming Unstoppable</text:p>
          </table:table-cell>
          <table:table-cell table:style-name="ce1" office:value-type="string" calcext:value-type="string">
            <text:p><text:a xlink:href="https://www.marvelrivals.com/20241123/41360_1195677.html" xlink:type="simple">https://www.marvelrivals.com/20241123/41360_1195677.html</text:a></text:p>
          </table:table-cell>
          <table:table-cell table:style-name="ce2" table:number-columns-repeated="24"/>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Nightsword Thorn</text:p>
          </table:table-cell>
          <table:table-cell table:style-name="ce1" office:value-type="string" calcext:value-type="string">
            <text:p><text:a xlink:href="https://r.res.easebar.com/pic/20241120/ea4b3942-f0b3-43b4-a2fc-d5b43b6a8b35.png" xlink:type="simple">https://r.res.easebar.com/pic/20241120/ea4b3942-f0b3-43b4-a2fc-d5b43b6a8b35.png</text:a></text:p>
          </table:table-cell>
          <table:table-cell table:style-name="ce1" office:value-type="string" calcext:value-type="string">
            <text:p>Throw Nightsword thorns</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Black Widow - Red Room Rifle, Iron Fist - Dragon's Defense, Hawkeye - Piercing Arrow,Hawkeye - Ronin Slash, Star-Lord - Blaster Barrage,</text:p>
          </table:table-cell>
          <table:table-cell table:style-name="ce2" table:number-columns-repeated="23"/>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Goddess of Death</text:p>
          </table:table-cell>
          <table:table-cell table:style-name="ce1" office:value-type="string" calcext:value-type="string">
            <text:p><text:a xlink:href="https://r.res.easebar.com/pic/20241120/cc37d07b-7128-47a0-8706-240fda571a47.png" xlink:type="simple">https://r.res.easebar.com/pic/20241120/cc37d07b-7128-47a0-8706-240fda571a47.png</text:a></text:p>
          </table:table-cell>
          <table:table-cell table:style-name="ce1" office:value-type="string" calcext:value-type="string">
            <text:p>Soar into the sky and unleash Nastrond Crows from each hand at will</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1" office:value-type="string" calcext:value-type="string">
            <text:p>Angela - Assassin's Charge, Emma Frost - Mind's Aegis, Captain America - Living Legend, Magneto - Metallic Curtain, Doctor Strange - Shield of the Seraphim, Groot - Thornlash Wall, Groot - Ironwood Wall, Deadpool - Magical Unicorn Shield!, Invisible Woman - Guardian Shield, Invisible Woman - Covert Advance, Invisible Woman - Invisible Boundary, Psylocke - Psychic Stealth, Loki - Deception, Cloak&amp;Dagger - Eternal Bond, Namor - Blessing of the Deep, Peni Parker - Arachno-Mine, Star-Lord - Stellar Shift, The Punisher - Culling Turret, The Punisher - Final Judgement, The Punisher - Adjudication,</text:p>
          </table:table-cell>
          <table:table-cell table:style-name="ce2" table:number-columns-repeated="23"/>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Astral Flock</text:p>
          </table:table-cell>
          <table:table-cell table:style-name="ce1" office:value-type="string" calcext:value-type="string">
            <text:p><text:a xlink:href="https://r.res.easebar.com/pic/20241120/e9a46cd0-2dcc-4835-9f4b-f18302c03eac.png" xlink:type="simple">https://r.res.easebar.com/pic/20241120/e9a46cd0-2dcc-4835-9f4b-f18302c03eac.png</text:a></text:p>
          </table:table-cell>
          <table:table-cell table:style-name="ce1" office:value-type="string" calcext:value-type="string">
            <text:p>Transform into a Nastrond Crow to glide forth, press again to undo the transformation. Gain Bonus Health when the transformation ends</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1" office:value-type="string" calcext:value-type="string">
            <text:p>The Thing - Yancy Street Charge, Black Cat - Mento-Fish, The Thing - Battle Blitz, Squirrel Girl - Squirrel Blockade,</text:p>
          </table:table-cell>
          <table:table-cell table:style-name="ce2" table:number-columns-repeated="23"/>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Soul Drainer</text:p>
          </table:table-cell>
          <table:table-cell table:style-name="ce1" office:value-type="string" calcext:value-type="string">
            <text:p><text:a xlink:href="https://r.res.easebar.com/pic/20241120/558313fc-c58a-4507-a812-18e9acf92b97.png" xlink:type="simple">https://r.res.easebar.com/pic/20241120/558313fc-c58a-4507-a812-18e9acf92b97.png</text:a></text:p>
          </table:table-cell>
          <table:table-cell table:style-name="ce1" office:value-type="string" calcext:value-type="string">
            <text:p>Project an explosive Hel sphere to Stun nearby enemies.</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Piercing Night</text:p>
          </table:table-cell>
          <table:table-cell table:style-name="ce1" office:value-type="string" calcext:value-type="string">
            <text:p><text:a xlink:href="https://r.res.easebar.com/pic/20241120/b40f4698-b5ca-4cd1-a8fd-4ff916f1a5da.png" xlink:type="simple">https://r.res.easebar.com/pic/20241120/b40f4698-b5ca-4cd1-a8fd-4ff916f1a5da.png</text:a></text:p>
          </table:table-cell>
          <table:table-cell table:style-name="ce1" office:value-type="string" calcext:value-type="string">
            <text:p>Fire multiple Nightsword thorns that detonate after a delay</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Nastrond Crowstorm</text:p>
          </table:table-cell>
          <table:table-cell table:style-name="ce1" office:value-type="string" calcext:value-type="string">
            <text:p><text:a xlink:href="https://r.res.easebar.com/pic/20241120/f7bbe4b0-932e-421b-a60e-d5fb5560c6f7.png" xlink:type="simple">https://r.res.easebar.com/pic/20241120/f7bbe4b0-932e-421b-a60e-d5fb5560c6f7.png</text:a></text:p>
          </table:table-cell>
          <table:table-cell table:style-name="ce1" office:value-type="string" calcext:value-type="string">
            <text:p>Defeating an enemy will generate a Nastrond Crow, exploding after a duration</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2" table:number-columns-repeated="24"/>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Hel's Descent</text:p>
          </table:table-cell>
          <table:table-cell table:style-name="ce1" office:value-type="string" calcext:value-type="string">
            <text:p><text:a xlink:href="https://r.res.easebar.com/pic/20241120/29f6f04d-087b-4e97-8aeb-3b505b3c2952.png" xlink:type="simple">https://r.res.easebar.com/pic/20241120/29f6f04d-087b-4e97-8aeb-3b505b3c2952.png</text:a></text:p>
          </table:table-cell>
          <table:table-cell table:style-name="ce1" office:value-type="string" calcext:value-type="string">
            <text:p>Hold Space to fall slowly</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2" table:number-columns-repeated="24"/>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Hel Tendrils</text:p>
          </table:table-cell>
          <table:table-cell table:style-name="ce1" office:value-type="string" calcext:value-type="string">
            <text:p><text:a xlink:href="https://r.res.easebar.com/pic/20250712/bf161d8e-a652-4abe-aca7-add44ac5429e.png" xlink:type="simple">https://r.res.easebar.com/pic/20250712/bf161d8e-a652-4abe-aca7-add44ac5429e.png</text:a></text:p>
          </table:table-cell>
          <table:table-cell table:style-name="ce1" office:value-type="string" calcext:value-type="string">
            <text:p>Venom shares his symbiotes with Jeff and Hela. Hela's Hel Tendrils unleash a symbiotic Hel Sphere. Upon hit, it pulls nearby enemies toward the impact point and links them, slowing enemies that try to escape.</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1" office:value-type="string" calcext:value-type="string">
            <text:p>Cloak&amp;Dagger - Dark Teleportation,</text:p>
          </table:table-cell>
          <table:table-cell table:style-name="ce2" table:number-columns-repeated="23"/>
          <table:table-cell table:number-columns-repeated="16355"/>
        </table:table-row>
        <table:table-row table:style-name="ro1">
          <table:table-cell table:style-name="ce1" office:value-type="string" calcext:value-type="string">
            <text:p>HELA</text:p>
          </table:table-cell>
          <table:table-cell table:style-name="ce1" office:value-type="string" calcext:value-type="string">
            <text:p>DEATH KNELL</text:p>
          </table:table-cell>
          <table:table-cell table:style-name="ce1" office:value-type="string" calcext:value-type="string">
            <text:p><text:a xlink:href="https://r.res.easebar.com/pic/20251011/00e05df0-3681-4908-a9f8-c14cc35bbc57.png" xlink:type="simple">https://r.res.easebar.com/pic/20251011/00e05df0-3681-4908-a9f8-c14cc35bbc57.png</text:a></text:p>
          </table:table-cell>
          <table:table-cell table:style-name="ce1" office:value-type="string" calcext:value-type="string">
            <text:p>Hela channels energy of the undead to empower Namor. When Namor strikes with his trident, a spectral water column erupts at the target area, slowing enemies hit. Whenever Hela or Namor assist in a KO, an invulnerable Undead Monstro spawns at the fallen enemy's position, automatically attacking the nearest foe for a short time before vanishing</text:p>
          </table:table-cell>
          <table:table-cell table:style-name="ce1" office:value-type="string" calcext:value-type="string">
            <text:p><text:a xlink:href="https://www.marvelrivals.com/20241123/41360_1195676.html" xlink:type="simple">https://www.marvelrivals.com/20241123/41360_1195676.html</text:a></text:p>
          </table:table-cell>
          <table:table-cell table:style-name="ce2" table:number-columns-repeated="24"/>
          <table:table-cell table:number-columns-repeated="16355"/>
        </table:table-row>
        <table:table-row table:style-name="ro1">
          <table:table-cell table:style-name="ce1" office:value-type="string" calcext:value-type="string">
            <text:p>STORM</text:p>
          </table:table-cell>
          <table:table-cell table:style-name="ce1" office:value-type="string" calcext:value-type="string">
            <text:p>Wind Blade</text:p>
          </table:table-cell>
          <table:table-cell table:style-name="ce1" office:value-type="string" calcext:value-type="string">
            <text:p><text:a xlink:href="https://r.res.easebar.com/pic/20241120/ac2de8df-0a48-4c10-b0be-090c2662d5e6.png" xlink:type="simple">https://r.res.easebar.com/pic/20241120/ac2de8df-0a48-4c10-b0be-090c2662d5e6.png</text:a></text:p>
          </table:table-cell>
          <table:table-cell table:style-name="ce1" office:value-type="string" calcext:value-type="string">
            <text:p>Launch forward-piercing Wind Blades</text:p>
          </table:table-cell>
          <table:table-cell table:style-name="ce1" office:value-type="string" calcext:value-type="string">
            <text:p><text:a xlink:href="https://www.marvelrivals.com/20241123/41360_1195675.html" xlink:type="simple">https://www.marvelrivals.com/20241123/41360_1195675.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STORM</text:p>
          </table:table-cell>
          <table:table-cell table:style-name="ce1" office:value-type="string" calcext:value-type="string">
            <text:p>Omega Hurricane</text:p>
          </table:table-cell>
          <table:table-cell table:style-name="ce1" office:value-type="string" calcext:value-type="string">
            <text:p><text:a xlink:href="https://r.res.easebar.com/pic/20241120/618d0d4a-f522-4ea9-9f11-64de62abe3ad.png" xlink:type="simple">https://r.res.easebar.com/pic/20241120/618d0d4a-f522-4ea9-9f11-64de62abe3ad.png</text:a></text:p>
          </table:table-cell>
          <table:table-cell table:style-name="ce1" office:value-type="string" calcext:value-type="string">
            <text:p>Transform into a hurricane to draw in nearby enemies and deal damage</text:p>
          </table:table-cell>
          <table:table-cell table:style-name="ce1" office:value-type="string" calcext:value-type="string">
            <text:p><text:a xlink:href="https://www.marvelrivals.com/20241123/41360_1195675.html" xlink:type="simple">https://www.marvelrivals.com/20241123/41360_1195675.html</text:a></text:p>
          </table:table-cell>
          <table:table-cell table:style-name="ce1" office:value-type="string" calcext:value-type="string">
            <text:p>Mantis - Soul Resurgence, Luna Snow - Fate of Both Worlds, Mantis - Spore Slumber, Luna Snow - Ice Arts, Phoenix - Telekinesis Burst, Phoenix - Endsong Inferno, Ultron - Rage of Ultron, Cloak&amp;Dagger - Eternal Bond, Psylocke - Dance of the Butterfly, Hawkeye - Hunter's Sight, Iron Man - Invincible Pulse Cannon, Moon Knight - Hand of Khonshu, Namor - Blessing of the Deep, Scarlet Witch - Reality Erasure, Hela - Nightsword Thorn, Hulk - Incredible Leap,</text:p>
          </table:table-cell>
          <table:table-cell table:style-name="ce2" table:number-columns-repeated="23"/>
          <table:table-cell table:number-columns-repeated="16355"/>
        </table:table-row>
        <table:table-row table:style-name="ro1">
          <table:table-cell table:style-name="ce1" office:value-type="string" calcext:value-type="string">
            <text:p>STORM</text:p>
          </table:table-cell>
          <table:table-cell table:style-name="ce1" office:value-type="string" calcext:value-type="string">
            <text:p>Weather Control</text:p>
          </table:table-cell>
          <table:table-cell table:style-name="ce1" office:value-type="string" calcext:value-type="string">
            <text:p><text:a xlink:href="https://r.res.easebar.com/pic/20241120/10b670aa-f6c6-4775-811a-5d9c4e3ae6cf.png" xlink:type="simple">https://r.res.easebar.com/pic/20241120/10b670aa-f6c6-4775-811a-5d9c4e3ae6cf.png</text:a></text:p>
          </table:table-cell>
          <table:table-cell table:style-name="ce1" office:value-type="string" calcext:value-type="string">
            <text:p>Switch the weather to empower allies: Tornado grants a Movement Boost, Thunder grants a Damage Boost</text:p>
          </table:table-cell>
          <table:table-cell table:style-name="ce1" office:value-type="string" calcext:value-type="string">
            <text:p><text:a xlink:href="https://www.marvelrivals.com/20241123/41360_1195675.html" xlink:type="simple">https://www.marvelrivals.com/20241123/41360_1195675.html</text:a></text:p>
          </table:table-cell>
          <table:table-cell table:style-name="ce1" office:value-type="string" calcext:value-type="string">
            <text:p>Black Cat - Mento-Fish, The Thing - Stone Haymaker, The Thing - Battle Blitz, Invisible Woman - Psionic Vortex, Invisible Woman - Force Physics, Invisible Woman - Covert Advance, Invisible Woman - Invisible Boundary, Psylocke - Psychic Stealth, Loki - Deception, Mister Fantastic - Distended Grip, Squirrel Girl - Squirrel Blockade, Black Widow - Red Room Rifle, Black Widow - Edge Dancer, Iron Fist - Yat Jee Chung Kuen, Hawkeye - Crescent Slash, Hawkeye - Hypersonic Arrow, Namor - Aquatic Dominion, Scarlet Witch - Chaos Control, Scarlet Witch - Dark Seal, Winter Soldier - Tainted Voltage, Winter Soldier - Bionic Hook, Spider-man - Get Over Here!, Jeff the Land Shark - Aqua Burst, The Punisher - Adjudication, Luna Snow - Light &amp; Dark Ice, Adam Warlock - Quantum Magic,</text:p>
          </table:table-cell>
          <table:table-cell table:style-name="ce1" office:value-type="string" calcext:value-type="string">
            <text:p>Weather Control will always be applying buffs to Storm's team, its best if she remains priority number one to eliminate first or the effects will compound negatively against your team.</text:p>
          </table:table-cell>
          <table:table-cell table:style-name="ce2" table:number-columns-repeated="22"/>
          <table:table-cell table:number-columns-repeated="16355"/>
        </table:table-row>
        <table:table-row table:style-name="ro1">
          <table:table-cell table:style-name="ce1" office:value-type="string" calcext:value-type="string">
            <text:p>STORM</text:p>
          </table:table-cell>
          <table:table-cell table:style-name="ce1" office:value-type="string" calcext:value-type="string">
            <text:p>Goddess Boost</text:p>
          </table:table-cell>
          <table:table-cell table:style-name="ce1" office:value-type="string" calcext:value-type="string">
            <text:p><text:a xlink:href="https://r.res.easebar.com/pic/20241120/af7bafa6-fe10-45d2-8a65-f1523f9c5223.png" xlink:type="simple">https://r.res.easebar.com/pic/20241120/af7bafa6-fe10-45d2-8a65-f1523f9c5223.png</text:a></text:p>
          </table:table-cell>
          <table:table-cell table:style-name="ce1" office:value-type="string" calcext:value-type="string">
            <text:p>Channel the power of the weather to empower Storm: Tornado grants a Movement Boost and inflicts Slow on enemies, Thunder grants a Damage Boost and summons lightning to inflict damage</text:p>
          </table:table-cell>
          <table:table-cell table:style-name="ce1" office:value-type="string" calcext:value-type="string">
            <text:p><text:a xlink:href="https://www.marvelrivals.com/20241123/41360_1195675.html" xlink:type="simple">https://www.marvelrivals.com/20241123/41360_1195675.html</text:a></text:p>
          </table:table-cell>
          <table:table-cell table:style-name="ce2"/>
          <table:table-cell table:style-name="ce1" office:value-type="string" calcext:value-type="string">
            <text:p>The best way to counter this move is to stay out of range, it will either slow you down and speed up her allies, or inflict constant damage while her team is damage amplified.</text:p>
          </table:table-cell>
          <table:table-cell table:style-name="ce2" table:number-columns-repeated="22"/>
          <table:table-cell table:number-columns-repeated="16355"/>
        </table:table-row>
        <table:table-row table:style-name="ro1">
          <table:table-cell table:style-name="ce1" office:value-type="string" calcext:value-type="string">
            <text:p>STORM</text:p>
          </table:table-cell>
          <table:table-cell table:style-name="ce1" office:value-type="string" calcext:value-type="string">
            <text:p>Bolt Rush</text:p>
          </table:table-cell>
          <table:table-cell table:style-name="ce1" office:value-type="string" calcext:value-type="string">
            <text:p><text:a xlink:href="https://r.res.easebar.com/pic/20241120/644cd425-b90f-41dd-b750-8d11c36e04d1.png" xlink:type="simple">https://r.res.easebar.com/pic/20241120/644cd425-b90f-41dd-b750-8d11c36e04d1.png</text:a></text:p>
          </table:table-cell>
          <table:table-cell table:style-name="ce1" office:value-type="string" calcext:value-type="string">
            <text:p>Unleash a lightning bolt forward</text:p>
          </table:table-cell>
          <table:table-cell table:style-name="ce1" office:value-type="string" calcext:value-type="string">
            <text:p><text:a xlink:href="https://www.marvelrivals.com/20241123/41360_1195675.html" xlink:type="simple">https://www.marvelrivals.com/20241123/41360_1195675.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STORM</text:p>
          </table:table-cell>
          <table:table-cell table:style-name="ce1" office:value-type="string" calcext:value-type="string">
            <text:p>ETERNAL WEATHER WITCH</text:p>
          </table:table-cell>
          <table:table-cell table:style-name="ce1" office:value-type="string" calcext:value-type="string">
            <text:p><text:a xlink:href="https://r.res.easebar.com/pic/20260320/65f6fbec-1e61-459b-b559-80d192045108.png" xlink:type="simple">https://r.res.easebar.com/pic/20260320/65f6fbec-1e61-459b-b559-80d192045108.png</text:a></text:p>
          </table:table-cell>
          <table:table-cell table:style-name="ce1" office:value-type="string" calcext:value-type="string">
            <text:p>Storm channels her elemental power into Adam Warlock. When Adam uses Soaring Surge, his movement speed is increased. While flying, Adam leaves behind a storm-charged trail that heals and speeds up allies within it</text:p>
          </table:table-cell>
          <table:table-cell table:style-name="ce1" office:value-type="string" calcext:value-type="string">
            <text:p><text:a xlink:href="https://www.marvelrivals.com/20241123/41360_1195675.html" xlink:type="simple">https://www.marvelrivals.com/20241123/41360_1195675.html</text:a></text:p>
          </table:table-cell>
          <table:table-cell table:style-name="ce2" table:number-columns-repeated="24"/>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Gamma Ray Gun</text:p>
          </table:table-cell>
          <table:table-cell table:style-name="ce1" office:value-type="string" calcext:value-type="string">
            <text:p><text:a xlink:href="https://r.res.easebar.com/pic/20241120/8cb6a38e-5f26-483e-8b6c-92ff443084d1.png" xlink:type="simple">https://r.res.easebar.com/pic/20241120/8cb6a38e-5f26-483e-8b6c-92ff443084d1.png</text:a></text:p>
          </table:table-cell>
          <table:table-cell table:style-name="ce1" office:value-type="string" calcext:value-type="string">
            <text:p>Fire with a Gamma Ray Gun</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 Hawkeye - Ronin Slash,</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Puny Banner</text:p>
          </table:table-cell>
          <table:table-cell table:style-name="ce1" office:value-type="string" calcext:value-type="string">
            <text:p><text:a xlink:href="https://r.res.easebar.com/pic/20241120/9a3b272b-318b-45e2-a863-274aa7bcf288.png" xlink:type="simple">https://r.res.easebar.com/pic/20241120/9a3b272b-318b-45e2-a863-274aa7bcf288.png</text:a></text:p>
          </table:table-cell>
          <table:table-cell table:style-name="ce1" office:value-type="string" calcext:value-type="string">
            <text:p>Transform from Bruce Banner into Hero Hulk</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2" table:number-columns-repeated="24"/>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Gamma Grenade</text:p>
          </table:table-cell>
          <table:table-cell table:style-name="ce1" office:value-type="string" calcext:value-type="string">
            <text:p><text:a xlink:href="https://r.res.easebar.com/pic/20241120/3187b7a0-06b5-4e1c-babe-796554bc2430.png" xlink:type="simple">https://r.res.easebar.com/pic/20241120/3187b7a0-06b5-4e1c-babe-796554bc2430.png</text:a></text:p>
          </table:table-cell>
          <table:table-cell table:style-name="ce1" office:value-type="string" calcext:value-type="string">
            <text:p>Launch a Gamma Grenade to inflict damage and Launch Up enemies</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Gamma Boost</text:p>
          </table:table-cell>
          <table:table-cell table:style-name="ce1" office:value-type="string" calcext:value-type="string">
            <text:p><text:a xlink:href="https://r.res.easebar.com/pic/20241120/101d8739-0c74-4e34-bbbc-207cfef95ce0.png" xlink:type="simple">https://r.res.easebar.com/pic/20241120/101d8739-0c74-4e34-bbbc-207cfef95ce0.png</text:a></text:p>
          </table:table-cell>
          <table:table-cell table:style-name="ce1" office:value-type="string" calcext:value-type="string">
            <text:p>Hulk charges Iron Man and Namor with gamma radiation. When Iron Man uses Armor Overdrive, he will initiate a gamma upgrade. When Namor receives the radiation, he will summon an extra Gamma Monstro which will continuously fire gamma rays at locked-on enemies. The longer the rays hit, the higher the damage</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2" table:number-columns-repeated="24"/>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Heavy Blow</text:p>
          </table:table-cell>
          <table:table-cell table:style-name="ce1" office:value-type="string" calcext:value-type="string">
            <text:p><text:a xlink:href="https://r.res.easebar.com/pic/20241120/cc774c86-d162-462f-95d0-1b11d36eed83.png" xlink:type="simple">https://r.res.easebar.com/pic/20241120/cc774c86-d162-462f-95d0-1b11d36eed83.png</text:a></text:p>
          </table:table-cell>
          <table:table-cell table:style-name="ce1" office:value-type="string" calcext:value-type="string">
            <text:p>Swing fists forward to punch enemies</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Squirrel Girl - Unbeatable Squirrel Tsunami, Iron Fist - Dragon's Defense, Hawkeye - Piercing Arrow,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HULK SMASH!</text:p>
          </table:table-cell>
          <table:table-cell table:style-name="ce1" office:value-type="string" calcext:value-type="string">
            <text:p><text:a xlink:href="https://r.res.easebar.com/pic/20241120/a3a3990b-5005-4616-abc2-96e48a971420.png" xlink:type="simple">https://r.res.easebar.com/pic/20241120/a3a3990b-5005-4616-abc2-96e48a971420.png</text:a></text:p>
          </table:table-cell>
          <table:table-cell table:style-name="ce1" office:value-type="string" calcext:value-type="string">
            <text:p>Unleash stored gamma energy, transforming from Hero Hulk into Monster Hulk for a limited time period</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Jeff the Land Shark - It's Jeff!,</text:p>
          </table:table-cell>
          <table:table-cell table:style-name="ce1" office:value-type="string" calcext:value-type="string">
            <text:p>Player Reaction Time. Hulk players like to wait for the last moment to use this ability, if you can interrupt him with CC or burst damage when his health is below 40% before he can react, then you can ruin his plans to restore all his health and keep fighting. The best way to do this is with a coordinated team effort, if everyone notices he has not jumped away after losing half his health then it's a battle on the team's reaction time or the Hulk's reaction time on how close to zero his health can get to.</text:p>
          </table:table-cell>
          <table:table-cell table:style-name="ce2" table:number-columns-repeated="22"/>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Indestructible Guard</text:p>
          </table:table-cell>
          <table:table-cell table:style-name="ce1" office:value-type="string" calcext:value-type="string">
            <text:p><text:a xlink:href="https://r.res.easebar.com/pic/20241120/4879fdb5-3227-4af4-9264-dd04c12941b4.png" xlink:type="simple">https://r.res.easebar.com/pic/20241120/4879fdb5-3227-4af4-9264-dd04c12941b4.png</text:a></text:p>
          </table:table-cell>
          <table:table-cell table:style-name="ce1" office:value-type="string" calcext:value-type="string">
            <text:p>Generate gamma shields for Hero Hulk and nearby allies, absorbing and converting damage into energy for HULK SMASH</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Phoenix - Telekinesis Burst,Ultron - Imperative: Patch,</text:p>
          </table:table-cell>
          <table:table-cell table:style-name="ce1" office:value-type="string" calcext:value-type="string">
            <text:p>It is best not to pop the bubbles on the teammates he applies them to as they will give Hulk significant ultamite charge, it's best to let those enemies get away and retry after the bubbles are estenquished, but the bubble applied to Hulk himself, the faster you break that the less free time he gets to heal and charge up an Incredible Leap.</text:p>
          </table:table-cell>
          <table:table-cell table:style-name="ce2" table:number-columns-repeated="22"/>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Radioactive Lockdown</text:p>
          </table:table-cell>
          <table:table-cell table:style-name="ce1" office:value-type="string" calcext:value-type="string">
            <text:p><text:a xlink:href="https://r.res.easebar.com/pic/20241120/172254e3-9768-4dec-9157-76b456d5383d.png" xlink:type="simple">https://r.res.easebar.com/pic/20241120/172254e3-9768-4dec-9157-76b456d5383d.png</text:a></text:p>
          </table:table-cell>
          <table:table-cell table:style-name="ce1" office:value-type="string" calcext:value-type="string">
            <text:p>Emit gamma energy to irradiate enemies and render them immobilize and immune to all ability effects. Using Heavy Blow or Gamma Burst will prematurely remove this status</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Magik - Stepping Discs, Iron Fist - Dragon's Defense,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Incredible Leap</text:p>
          </table:table-cell>
          <table:table-cell table:style-name="ce1" office:value-type="string" calcext:value-type="string">
            <text:p><text:a xlink:href="https://r.res.easebar.com/pic/20241120/b74339de-5816-4639-ba7f-d32d39f620cd.png" xlink:type="simple">https://r.res.easebar.com/pic/20241120/b74339de-5816-4639-ba7f-d32d39f620cd.png</text:a></text:p>
          </table:table-cell>
          <table:table-cell table:style-name="ce1" office:value-type="string" calcext:value-type="string">
            <text:p>HOLD Space to perform a charged leap that allows Hero Hulk to Knock a flying enemy to the ground</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Angela - Assassin's Charge, Blade - Daywalker Dash, Phoenix - Telekinesis Burst, Emma Frost - Carbon Crush, Emma Frost - Crystal Kick, The Thing - Yancy Street Charge, Black Cat - Mento-Fish, Invisible Woman - Force Physics, Mister Fantastic - Distended Grip, Squirrel Girl - Squirrel Blockade, Black Widow - Edge Dancer, Wolverine - Last Stand, Wolverine - Feral Leap, Iron Fist - Yat Jee Chung Kuen, Scarlet Witch - Dark Seal, Winter Soldier - Trooper's Fist, Winter Soldier - Bionic Hook, Spider-man - Get Over Here!, Hela - Soul Drainer, Jeff the Land Shark - Aqua Burst,</text:p>
          </table:table-cell>
          <table:table-cell table:style-name="ce1" office:value-type="string" calcext:value-type="string">
            <text:p>This move lets Hulk be everywhere and anywhere safely. If you can control his jumps Hulk will not be a threat to anyone or a help to his team.</text:p>
          </table:table-cell>
          <table:table-cell table:style-name="ce2" table:number-columns-repeated="22"/>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Gamma Burst</text:p>
          </table:table-cell>
          <table:table-cell table:style-name="ce1" office:value-type="string" calcext:value-type="string">
            <text:p><text:a xlink:href="https://r.res.easebar.com/pic/20241120/c55bb9d3-8b8b-44ad-ac43-4fb9bcf02130.png" xlink:type="simple">https://r.res.easebar.com/pic/20241120/c55bb9d3-8b8b-44ad-ac43-4fb9bcf02130.png</text:a></text:p>
          </table:table-cell>
          <table:table-cell table:style-name="ce1" office:value-type="string" calcext:value-type="string">
            <text:p>Emit gamma-ray bursts to inflict damage. Reduce Indestructible Guard cooldown upon hit</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Gamma Fastball</text:p>
          </table:table-cell>
          <table:table-cell table:style-name="ce1" office:value-type="string" calcext:value-type="string">
            <text:p><text:a xlink:href="https://r.res.easebar.com/pic/20241205/cb438e5d-7e3c-47ff-af80-0b776f860874.png" xlink:type="simple">https://r.res.easebar.com/pic/20241205/cb438e5d-7e3c-47ff-af80-0b776f860874.png</text:a></text:p>
          </table:table-cell>
          <table:table-cell table:style-name="ce1" office:value-type="string" calcext:value-type="string">
            <text:p>Wolverine, Hulk can interact with each other. Once both parties confirm, Hulk can lift Wolverine and press the key to hurl him forward</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2" table:number-columns-repeated="24"/>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Heavy Blow</text:p>
          </table:table-cell>
          <table:table-cell table:style-name="ce1" office:value-type="string" calcext:value-type="string">
            <text:p><text:a xlink:href="https://r.res.easebar.com/pic/20241120/cc774c86-d162-462f-95d0-1b11d36eed83.png" xlink:type="simple">https://r.res.easebar.com/pic/20241120/cc774c86-d162-462f-95d0-1b11d36eed83.png</text:a></text:p>
          </table:table-cell>
          <table:table-cell table:style-name="ce1" office:value-type="string" calcext:value-type="string">
            <text:p>Swing fists forward to punch and launch up enemies</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The Thing - Unyielding Will, </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World Breaker</text:p>
          </table:table-cell>
          <table:table-cell table:style-name="ce1" office:value-type="string" calcext:value-type="string">
            <text:p><text:a xlink:href="https://r.res.easebar.com/pic/20241120/e2c65ff1-2180-4f19-b7b0-1cf08ad1b1c4.png" xlink:type="simple">https://r.res.easebar.com/pic/20241120/e2c65ff1-2180-4f19-b7b0-1cf08ad1b1c4.png</text:a></text:p>
          </table:table-cell>
          <table:table-cell table:style-name="ce1" office:value-type="string" calcext:value-type="string">
            <text:p>Grab and smash the enemy in front</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Mantis - Soul Resurgence, Luna Snow - Fate of Both Worlds, Mantis - Spore Slumber, Luna Snow - Ice Arts, The Thing - Yancy Street Charge, Moon Knight - Hand of Khonshu,</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Radioactive Lockdown</text:p>
          </table:table-cell>
          <table:table-cell table:style-name="ce1" office:value-type="string" calcext:value-type="string">
            <text:p><text:a xlink:href="https://r.res.easebar.com/pic/20241120/5965d229-691b-42be-859e-bc83191b3d1d.png" xlink:type="simple">https://r.res.easebar.com/pic/20241120/5965d229-691b-42be-859e-bc83191b3d1d.png</text:a></text:p>
          </table:table-cell>
          <table:table-cell table:style-name="ce1" office:value-type="string" calcext:value-type="string">
            <text:p>Emit gamma energy to irradiate enemies and render them immobilize and immune to all ability effects. Using Heavy Blow or Gamma Burst will prematurely remove this status</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The Thing - Yancy Street Charge, Hulk - HULK SMASH!, Hulk - Indestructible Guard, Hulk - World Breaker,</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Incredible Leap</text:p>
          </table:table-cell>
          <table:table-cell table:style-name="ce1" office:value-type="string" calcext:value-type="string">
            <text:p><text:a xlink:href="https://r.res.easebar.com/pic/20241120/b74339de-5816-4639-ba7f-d32d39f620cd.png" xlink:type="simple">https://r.res.easebar.com/pic/20241120/b74339de-5816-4639-ba7f-d32d39f620cd.png</text:a></text:p>
          </table:table-cell>
          <table:table-cell table:style-name="ce1" office:value-type="string" calcext:value-type="string">
            <text:p>HOLD Space to perform a charged leap that allows Monster Hulk to Knock a flying enemy to the ground</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Phoenix - Telekinesis Burst, Emma Frost - Carbon Crush, The Thing - Yancy Street Charge, Black Cat - Mento-Fish, Squirrel Girl - Squirrel Blockade, Black Widow - Edge Dancer, Wolverine - Last Stand, Wolverine - Feral Leap, Iron Fist - Yat Jee Chung Kuen, Hela - Soul Drainer,</text:p>
          </table:table-cell>
          <table:table-cell table:style-name="ce2" table:number-columns-repeated="23"/>
          <table:table-cell table:number-columns-repeated="16355"/>
        </table:table-row>
        <table:table-row table:style-name="ro1">
          <table:table-cell table:style-name="ce1" office:value-type="string" calcext:value-type="string">
            <text:p>HULK</text:p>
          </table:table-cell>
          <table:table-cell table:style-name="ce1" office:value-type="string" calcext:value-type="string">
            <text:p>Gamma Burst</text:p>
          </table:table-cell>
          <table:table-cell table:style-name="ce1" office:value-type="string" calcext:value-type="string">
            <text:p><text:a xlink:href="https://r.res.easebar.com/pic/20241120/0ac60cf3-6b01-485b-b205-900f7ac674a4.png" xlink:type="simple">https://r.res.easebar.com/pic/20241120/0ac60cf3-6b01-485b-b205-900f7ac674a4.png</text:a></text:p>
          </table:table-cell>
          <table:table-cell table:style-name="ce1" office:value-type="string" calcext:value-type="string">
            <text:p>Emit gamma-ray bursts to inflict damage</text:p>
          </table:table-cell>
          <table:table-cell table:style-name="ce1" office:value-type="string" calcext:value-type="string">
            <text:p><text:a xlink:href="https://www.marvelrivals.com/20241123/41360_1195678.html" xlink:type="simple">https://www.marvelrivals.com/20241123/41360_1195678.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Joyful Splash</text:p>
          </table:table-cell>
          <table:table-cell table:style-name="ce1" office:value-type="string" calcext:value-type="string">
            <text:p><text:a xlink:href="https://r.res.easebar.com/pic/20241120/404c171f-9a95-4341-8313-b2f6d16fd6f1.png" xlink:type="simple">https://r.res.easebar.com/pic/20241120/404c171f-9a95-4341-8313-b2f6d16fd6f1.png</text:a></text:p>
          </table:table-cell>
          <table:table-cell table:style-name="ce1" office:value-type="string" calcext:value-type="string">
            <text:p>Unleash a healing splash</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Aqua Burst</text:p>
          </table:table-cell>
          <table:table-cell table:style-name="ce1" office:value-type="string" calcext:value-type="string">
            <text:p><text:a xlink:href="https://r.res.easebar.com/pic/20241120/247fc32e-57f7-4bc3-a52a-ed9e9a46e49e.png" xlink:type="simple">https://r.res.easebar.com/pic/20241120/247fc32e-57f7-4bc3-a52a-ed9e9a46e49e.png</text:a></text:p>
          </table:table-cell>
          <table:table-cell table:style-name="ce1" office:value-type="string" calcext:value-type="string">
            <text:p>Launch a high-speed water sphere that bursts upon impact, dealing damage to enemies within range</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2" table:number-columns-repeated="24"/>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It's Jeff!</text:p>
          </table:table-cell>
          <table:table-cell table:style-name="ce1" office:value-type="string" calcext:value-type="string">
            <text:p><text:a xlink:href="https://r.res.easebar.com/pic/20241120/25d707ba-9f22-4b05-bb8e-d2eb22a8f1f5.png" xlink:type="simple">https://r.res.easebar.com/pic/20241120/25d707ba-9f22-4b05-bb8e-d2eb22a8f1f5.png</text:a></text:p>
          </table:table-cell>
          <table:table-cell table:style-name="ce1" office:value-type="string" calcext:value-type="string">
            <text:p>Deep dive into the scene and resurface to swallow both enemies and allies within range, activating Hide and Seek for a brief duration before ejecting the swallowed heroes forward</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1" office:value-type="string" calcext:value-type="string">
            <text:p>Mantis - Healing Flower, Mantis - Spore Slumber, Luna Snow - Ice Arts, Blade - Scarlet Shroud, Ultron - Rage of Ultron, The Thing - Yancy Street Charge, Mister Fantastic - Reflexive Rubber, Wolverine - Last Stand, Cloak&amp;Dagger - Dark Teleportation, Iron Fist - Dragon's Defense, Psylocke - Dance of the Butterfly, Iron Man - Invincible Pulse Cannon, Moon Knight - Hand of Khonshu, Namor - Blessing of the Deep, Namor - Horn of Proteus, Star-Lord - Galactic Legend, Star-Lord - Stellar Shift, Magik - Stepping Discs, Hela - Goddess of Death, Storm - Omega Hurricane, Storm - Goddess Boost, Hulk - HULK SMASH!, Hulk - Indestructible Guard, Hulk - World Breaker, The Punisher - Deliverance, The Punisher - Culling Turret, The Punisher - Final Judgement, Adam Warlock - Karmic Revival,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Hide and Seek</text:p>
          </table:table-cell>
          <table:table-cell table:style-name="ce1" office:value-type="string" calcext:value-type="string">
            <text:p><text:a xlink:href="https://r.res.easebar.com/pic/20241120/ef573d4e-d703-4015-982f-e171765bc65f.png" xlink:type="simple">https://r.res.easebar.com/pic/20241120/ef573d4e-d703-4015-982f-e171765bc65f.png</text:a></text:p>
          </table:table-cell>
          <table:table-cell table:style-name="ce1" office:value-type="string" calcext:value-type="string">
            <text:p>Dive into the scene with only his dorsal fin exposed, granting himself a Movement Boost. Jeff can heal while submerged and gains the wall-crawl ability</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1" office:value-type="string" calcext:value-type="string">
            <text:p>Phoenix - Telekinesis Burst, The Thing - Yancy Street Charge, Black Cat - Mento-Fish, Iron Fist - Yat Jee Chung Kuen,</text:p>
          </table:table-cell>
          <table:table-cell table:style-name="ce2" table:number-columns-repeated="23"/>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Healing Bubble</text:p>
          </table:table-cell>
          <table:table-cell table:style-name="ce1" office:value-type="string" calcext:value-type="string">
            <text:p><text:a xlink:href="https://r.res.easebar.com/pic/20241120/4d341032-2db5-4cb1-84eb-2ecaa167bd2f.png" xlink:type="simple">https://r.res.easebar.com/pic/20241120/4d341032-2db5-4cb1-84eb-2ecaa167bd2f.png</text:a></text:p>
          </table:table-cell>
          <table:table-cell table:style-name="ce1" office:value-type="string" calcext:value-type="string">
            <text:p>Spit a bubble that heals the ally who collects it, granting them Healing Boost and Movement Boost while also launching up nearby enemies</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1" office:value-type="string" calcext:value-type="string">
            <text:p>Blade - Daywalker Dash,</text:p>
          </table:table-cell>
          <table:table-cell table:style-name="ce2" table:number-columns-repeated="23"/>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Oblivious Cuteness</text:p>
          </table:table-cell>
          <table:table-cell table:style-name="ce1" office:value-type="string" calcext:value-type="string">
            <text:p><text:a xlink:href="https://r.res.easebar.com/pic/20241120/d976ea1f-f15a-4b12-8a47-edbb88304548.png" xlink:type="simple">https://r.res.easebar.com/pic/20241120/d976ea1f-f15a-4b12-8a47-edbb88304548.png</text:a></text:p>
          </table:table-cell>
          <table:table-cell table:style-name="ce1" office:value-type="string" calcext:value-type="string">
            <text:p>Reduce damage taken from critical hits</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1" office:value-type="string" calcext:value-type="string">
            <text:p>Hawkeye - Archer's Focus, Hela - Nightsword Thorn,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IT'S JEFF-NADO!</text:p>
          </table:table-cell>
          <table:table-cell table:style-name="ce1" office:value-type="string" calcext:value-type="string">
            <text:p><text:a xlink:href="https://r.res.easebar.com/pic/20250531/50deaa25-2f90-439c-a1fb-15c9597ff6ab.png" xlink:type="simple">https://r.res.easebar.com/pic/20250531/50deaa25-2f90-439c-a1fb-15c9597ff6ab.png</text:a></text:p>
          </table:table-cell>
          <table:table-cell table:style-name="ce1" office:value-type="string" calcext:value-type="string">
            <text:p>When Storm activates Omega Hurricane and Jeff the Land Shark's It's Jeff is ready, they can unleash a powerful Team-Up Ability. During this period, Storm's Omega Hurricane merges with Jeff to form a Jeff-nado</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2" table:number-columns-repeated="24"/>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GUARDIAN OF THE DEEP</text:p>
          </table:table-cell>
          <table:table-cell table:style-name="ce1" office:value-type="string" calcext:value-type="string">
            <text:p><text:a xlink:href="https://r.res.easebar.com/pic/20250531/e2e11f8b-69d4-4412-adec-b3ad76c55446.png" xlink:type="simple">https://r.res.easebar.com/pic/20250531/e2e11f8b-69d4-4412-adec-b3ad76c55446.png</text:a></text:p>
          </table:table-cell>
          <table:table-cell table:style-name="ce1" office:value-type="string" calcext:value-type="string">
            <text:p>Venom shares his symbiotes with Jeff and Hela. Jeff's Guardian of the Deep links with nearby allies, providing continuous healing. When the effect ends, it releases a powerful healing burst, converting any excess into Bonus Health.</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1" office:value-type="string" calcext:value-type="string">
            <text:p>Phoenix - Endsong Inferno,</text:p>
          </table:table-cell>
          <table:table-cell table:style-name="ce2" table:number-columns-repeated="23"/>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New Friends</text:p>
          </table:table-cell>
          <table:table-cell table:style-name="ce1" office:value-type="string" calcext:value-type="string">
            <text:p><text:a xlink:href="https://r.res.easebar.com/pic/20241123/87222dcb-ebbb-4edc-a8f0-f7123ee5f61b.png" xlink:type="simple">https://r.res.easebar.com/pic/20241123/87222dcb-ebbb-4edc-a8f0-f7123ee5f61b.png</text:a></text:p>
          </table:table-cell>
          <table:table-cell table:style-name="ce1" office:value-type="string" calcext:value-type="string">
            <text:p>Jeff the Land Shark and Rocket Raccoon can ride on Groot's shoulders, receiving Damage Reduction</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1" office:value-type="string" calcext:value-type="string">
            <text:p>Phoenix - Telekinesis Burst, Mantis - Spore Slumber, Luna Snow - Ice Arts, Winter Soldier - Trooper's Fist, Winter Soldier - Bionic Hook,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JEFF THE LAND SHARK</text:p>
          </table:table-cell>
          <table:table-cell table:style-name="ce1" office:value-type="string" calcext:value-type="string">
            <text:p>Jeff's Cuddle Buddy</text:p>
          </table:table-cell>
          <table:table-cell table:style-name="ce1" office:value-type="string" calcext:value-type="string">
            <text:p><text:a xlink:href="https://r.res.easebar.com/pic/20260117/8d44e8d8-40a4-4d9f-9647-8450a01bb368.png" xlink:type="simple">https://r.res.easebar.com/pic/20260117/8d44e8d8-40a4-4d9f-9647-8450a01bb368.png</text:a></text:p>
          </table:table-cell>
          <table:table-cell table:style-name="ce1" office:value-type="string" calcext:value-type="string">
            <text:p>Jeff the Land Shark and Rocket Raccoon can ride on Groot's shoulders, receiving Damage Reduction</text:p>
          </table:table-cell>
          <table:table-cell table:style-name="ce1" office:value-type="string" calcext:value-type="string">
            <text:p><text:a xlink:href="https://www.marvelrivals.com/20241123/41360_1195674.html" xlink:type="simple">https://www.marvelrivals.com/20241123/41360_1195674.html</text:a></text:p>
          </table:table-cell>
          <table:table-cell table:style-name="ce2" table:number-columns-repeated="24"/>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Adjudication</text:p>
          </table:table-cell>
          <table:table-cell table:style-name="ce1" office:value-type="string" calcext:value-type="string">
            <text:p><text:a xlink:href="https://r.res.easebar.com/pic/20241120/e755fe97-976b-43f7-90d8-e791ca310df1.png" xlink:type="simple">https://r.res.easebar.com/pic/20241120/e755fe97-976b-43f7-90d8-e791ca310df1.png</text:a></text:p>
          </table:table-cell>
          <table:table-cell table:style-name="ce1" office:value-type="string" calcext:value-type="string">
            <text:p>Fire at enemies with Adjudication, his Automatic Rifle</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Hawkeye - Ronin Slash, Star-Lord - Blaster Barrage,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Deliverance</text:p>
          </table:table-cell>
          <table:table-cell table:style-name="ce1" office:value-type="string" calcext:value-type="string">
            <text:p><text:a xlink:href="https://r.res.easebar.com/pic/20241120/b420c662-6d55-438d-932a-d2947005b6de.png" xlink:type="simple">https://r.res.easebar.com/pic/20241120/b420c662-6d55-438d-932a-d2947005b6de.png</text:a></text:p>
          </table:table-cell>
          <table:table-cell table:style-name="ce1" office:value-type="string" calcext:value-type="string">
            <text:p>Fire at enemies with Deliverance, his Shotgun</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Piercing Arrow,Hawkeye - Ronin Slash,</text:p>
          </table:table-cell>
          <table:table-cell table:style-name="ce2" table:number-columns-repeated="23"/>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Final Judgement</text:p>
          </table:table-cell>
          <table:table-cell table:style-name="ce1" office:value-type="string" calcext:value-type="string">
            <text:p><text:a xlink:href="https://r.res.easebar.com/pic/20241120/6695cf9f-352c-4bf3-aab1-1824ecf39c95.png" xlink:type="simple">https://r.res.easebar.com/pic/20241120/6695cf9f-352c-4bf3-aab1-1824ecf39c95.png</text:a></text:p>
          </table:table-cell>
          <table:table-cell table:style-name="ce1" office:value-type="string" calcext:value-type="string">
            <text:p>Unleash two Gatling guns and missiles to attack enemies</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1" office:value-type="string" calcext:value-type="string">
            <text:p>Mister Fantastic - Reflexive Rubber, Iron Fist - Dragon's Defense, Psylocke - Dance of the Butterfly, Iron Man - Invincible Pulse Cannon, Moon Knight - Hand of Khonshu, Namor - Blessing of the Deep, Namor - Horn of Proteus, Storm - Omega Hurricane,</text:p>
          </table:table-cell>
          <table:table-cell table:style-name="ce2" table:number-columns-repeated="23"/>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Vantage Connection</text:p>
          </table:table-cell>
          <table:table-cell table:style-name="ce1" office:value-type="string" calcext:value-type="string">
            <text:p><text:a xlink:href="https://r.res.easebar.com/pic/20241120/e39565ca-3dfd-4794-bb51-23ec19256130.png" xlink:type="simple">https://r.res.easebar.com/pic/20241120/e39565ca-3dfd-4794-bb51-23ec19256130.png</text:a></text:p>
          </table:table-cell>
          <table:table-cell table:style-name="ce1" office:value-type="string" calcext:value-type="string">
            <text:p>Launch a hook to generate a cable that enables the Punisher to move rapidly by pressing F</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1" office:value-type="string" calcext:value-type="string">
            <text:p>Mister Fantastic - Distended Grip,</text:p>
          </table:table-cell>
          <table:table-cell table:style-name="ce2" table:number-columns-repeated="23"/>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Culling Turret</text:p>
          </table:table-cell>
          <table:table-cell table:style-name="ce1" office:value-type="string" calcext:value-type="string">
            <text:p><text:a xlink:href="https://r.res.easebar.com/pic/20241120/3806a440-7ae1-4a86-8b75-09c34be080fd.png" xlink:type="simple">https://r.res.easebar.com/pic/20241120/3806a440-7ae1-4a86-8b75-09c34be080fd.png</text:a></text:p>
          </table:table-cell>
          <table:table-cell table:style-name="ce1" office:value-type="string" calcext:value-type="string">
            <text:p>Deploy a Culling Turret that grounds Punisher and blocks damage from the front while dealing massive damage</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1" office:value-type="string" calcext:value-type="string">
            <text:p>Phoenix - Endsong Inferno, Emma Frost - Mind's Aegis, Captain America - Living Legend, Magneto - Metallic Curtain, Doctor Strange - Shield of the Seraphim, Groot - Thornlash Wall, Groot - Ironwood Wall, Deadpool - Magical Unicorn Shield!, Invisible Woman - Guardian Shield, Iron Fist - Dragon's Defense,</text:p>
          </table:table-cell>
          <table:table-cell table:style-name="ce2" table:number-columns-repeated="23"/>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Scourge Grenade</text:p>
          </table:table-cell>
          <table:table-cell table:style-name="ce1" office:value-type="string" calcext:value-type="string">
            <text:p><text:a xlink:href="https://r.res.easebar.com/pic/20241120/d9b61f83-54c3-42e7-9ac1-aadb46562237.png" xlink:type="simple">https://r.res.easebar.com/pic/20241120/d9b61f83-54c3-42e7-9ac1-aadb46562237.png</text:a></text:p>
          </table:table-cell>
          <table:table-cell table:style-name="ce1" office:value-type="string" calcext:value-type="string">
            <text:p>Throw a smoke grenade forward to obscure enemy vision and leap backward</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2" table:number-columns-repeated="24"/>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Warrior's Gaze</text:p>
          </table:table-cell>
          <table:table-cell table:style-name="ce1" office:value-type="string" calcext:value-type="string">
            <text:p><text:a xlink:href="https://r.res.easebar.com/pic/20241120/c121a9dc-8597-45f7-8495-4dea1b7c043b.png" xlink:type="simple">https://r.res.easebar.com/pic/20241120/c121a9dc-8597-45f7-8495-4dea1b7c043b.png</text:a></text:p>
          </table:table-cell>
          <table:table-cell table:style-name="ce1" office:value-type="string" calcext:value-type="string">
            <text:p>Retain vision of enemies that disappear from view for a short duration</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2" table:number-columns-repeated="24"/>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CUTTING-EDGE TECH</text:p>
          </table:table-cell>
          <table:table-cell table:style-name="ce1" office:value-type="string" calcext:value-type="string">
            <text:p><text:a xlink:href="https://r.res.easebar.com/pic/20250530/91bfb861-f201-4aa4-b40e-88860849e6a5.png" xlink:type="simple">https://r.res.easebar.com/pic/20250530/91bfb861-f201-4aa4-b40e-88860849e6a5.png</text:a></text:p>
          </table:table-cell>
          <table:table-cell table:style-name="ce1" office:value-type="string" calcext:value-type="string">
            <text:p>The Punisher upgrades Black Widow's arsenal, adding a Pulse Mode to her Red Room Rifle. While the ability is active, using Straight Shooter fires a pulse beam that deals piercing damage</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2" table:number-columns-repeated="24"/>
          <table:table-cell table:number-columns-repeated="16355"/>
        </table:table-row>
        <table:table-row table:style-name="ro1">
          <table:table-cell table:style-name="ce1" office:value-type="string" calcext:value-type="string">
            <text:p>THE PUNISHER</text:p>
          </table:table-cell>
          <table:table-cell table:style-name="ce1" office:value-type="string" calcext:value-type="string">
            <text:p>JUSTICE SENSE</text:p>
          </table:table-cell>
          <table:table-cell table:style-name="ce1" office:value-type="string" calcext:value-type="string">
            <text:p><text:a xlink:href="https://r.res.easebar.com/pic/20251011/6d08d915-d30d-4aad-9203-9055f7efab8c.png" xlink:type="simple">https://r.res.easebar.com/pic/20251011/6d08d915-d30d-4aad-9203-9055f7efab8c.png</text:a></text:p>
          </table:table-cell>
          <table:table-cell table:style-name="ce1" office:value-type="string" calcext:value-type="string">
            <text:p>Daredevil shares the location of his Sonic Pursuit target with The Punisher. At the same time, The Punisher can launch a devil-infused shock grenade to damage and blind enemies</text:p>
          </table:table-cell>
          <table:table-cell table:style-name="ce1" office:value-type="string" calcext:value-type="string">
            <text:p><text:a xlink:href="https://www.marvelrivals.com/20241123/41360_1195673.html" xlink:type="simple">https://www.marvelrivals.com/20241123/41360_1195673.html</text:a></text:p>
          </table:table-cell>
          <table:table-cell table:style-name="ce2" table:number-columns-repeated="24"/>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Light &amp; Dark Ice</text:p>
          </table:table-cell>
          <table:table-cell table:style-name="ce1" office:value-type="string" calcext:value-type="string">
            <text:p><text:a xlink:href="https://r.res.easebar.com/pic/20241120/9b9358c8-4975-450c-8f88-5e18d637d0c4.png" xlink:type="simple">https://r.res.easebar.com/pic/20241120/9b9358c8-4975-450c-8f88-5e18d637d0c4.png</text:a></text:p>
          </table:table-cell>
          <table:table-cell table:style-name="ce1" office:value-type="string" calcext:value-type="string">
            <text:p>Fire ice shots that damage enemies or heal allies</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Star-Lord - Blaster Barrage,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Fate of Both Worlds</text:p>
          </table:table-cell>
          <table:table-cell table:style-name="ce1" office:value-type="string" calcext:value-type="string">
            <text:p><text:a xlink:href="https://r.res.easebar.com/pic/20241120/47cd68fc-feb1-45d8-b204-69e09294dc80.png" xlink:type="simple">https://r.res.easebar.com/pic/20241120/47cd68fc-feb1-45d8-b204-69e09294dc80.png</text:a></text:p>
          </table:table-cell>
          <table:table-cell table:style-name="ce1" office:value-type="string" calcext:value-type="string">
            <text:p>Take center stage and start dancing! Press to toggle between two performances: Heal allies or grant them Damage Boost</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Moon Knight - Hand of Khonshu, Iron Man - Invincible Pulse Cannon, Scarlet Witch - Reality Erasure,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Ice Arts</text:p>
          </table:table-cell>
          <table:table-cell table:style-name="ce1" office:value-type="string" calcext:value-type="string">
            <text:p><text:a xlink:href="https://r.res.easebar.com/pic/20241120/db8d7bd7-8433-4b9c-b79a-4893df673815.png" xlink:type="simple">https://r.res.easebar.com/pic/20241120/db8d7bd7-8433-4b9c-b79a-4893df673815.png</text:a></text:p>
          </table:table-cell>
          <table:table-cell table:style-name="ce1" office:value-type="string" calcext:value-type="string">
            <text:p>Fire ice shards for a short duration, damaging enemies or healing allies while restoring her own Health</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Emma Frost - Diamond Form, The Thing - Yancy Street Charge,</text:p>
          </table:table-cell>
          <table:table-cell table:style-name="ce2" table:number-columns-repeated="23"/>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Share the Stage</text:p>
          </table:table-cell>
          <table:table-cell table:style-name="ce1" office:value-type="string" calcext:value-type="string">
            <text:p><text:a xlink:href="https://r.res.easebar.com/pic/20241120/c5d05de8-094f-4003-81bc-449b5e9b65d0.png" xlink:type="simple">https://r.res.easebar.com/pic/20241120/c5d05de8-094f-4003-81bc-449b5e9b65d0.png</text:a></text:p>
          </table:table-cell>
          <table:table-cell table:style-name="ce1" office:value-type="string" calcext:value-type="string">
            <text:p>Attach Idol Aura to an ally. Allies with Idol Aura also restore Health when Luna Snow is healing others</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2" table:number-columns-repeated="24"/>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Absolute Zero</text:p>
          </table:table-cell>
          <table:table-cell table:style-name="ce1" office:value-type="string" calcext:value-type="string">
            <text:p><text:a xlink:href="https://r.res.easebar.com/pic/20241120/3bbafdb7-d05d-4040-ac35-ba3ef0e021ba.png" xlink:type="simple">https://r.res.easebar.com/pic/20241120/3bbafdb7-d05d-4040-ac35-ba3ef0e021ba.png</text:a></text:p>
          </table:table-cell>
          <table:table-cell table:style-name="ce1" office:value-type="string" calcext:value-type="string">
            <text:p>Cast a clump of ice to Freeze the hit enemy and restore Health</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Star-Lord - Stellar Shift, Magik - Stepping Discs, Iron Fist - Dragon's Defense, Jeff the Land Shark - Hide and Seek, The Punisher - Culling Turret, The Punisher - Final Judgement,</text:p>
          </table:table-cell>
          <table:table-cell table:style-name="ce2" table:number-columns-repeated="23"/>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Cryo Heart</text:p>
          </table:table-cell>
          <table:table-cell table:style-name="ce1" office:value-type="string" calcext:value-type="string">
            <text:p><text:a xlink:href="https://r.res.easebar.com/pic/20241120/1e2f39fb-fb72-4b78-923d-09ba6b076e4f.png" xlink:type="simple">https://r.res.easebar.com/pic/20241120/1e2f39fb-fb72-4b78-923d-09ba6b076e4f.png</text:a></text:p>
          </table:table-cell>
          <table:table-cell table:style-name="ce1" office:value-type="string" calcext:value-type="string">
            <text:p>Automatically restore Health when casting Ice Arts or Absolute Zero</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2" table:number-columns-repeated="24"/>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Smooth Skate</text:p>
          </table:table-cell>
          <table:table-cell table:style-name="ce1" office:value-type="string" calcext:value-type="string">
            <text:p><text:a xlink:href="https://r.res.easebar.com/pic/20241120/c672e9c6-8368-4a9b-88b5-d78fefe000ba.png" xlink:type="simple">https://r.res.easebar.com/pic/20241120/c672e9c6-8368-4a9b-88b5-d78fefe000ba.png</text:a></text:p>
          </table:table-cell>
          <table:table-cell table:style-name="ce1" office:value-type="string" calcext:value-type="string">
            <text:p>Keep moving forward to start ice skating and enable higher jumps</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1" office:value-type="string" calcext:value-type="string">
            <text:p>Mantis - Spore Slumber, Luna Snow - Ice Arts, Phoenix - Telekinesis Burst, Squirrel Girl - Squirrel Blockade, Black Widow - Electro-Plasma Explosion, Black Widow - Edge Dancer, Iron Fist - Yat Jee Chung Kuen, Winter Soldier - Trooper's Fist, Winter Soldier - Bionic Hook, Winter Soldier - Tainted Voltage,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Number One Idol</text:p>
          </table:table-cell>
          <table:table-cell table:style-name="ce1" office:value-type="string" calcext:value-type="string">
            <text:p><text:a xlink:href="https://r.res.easebar.com/pic/20251222/b4210d02-0f6e-4b2b-9550-dd23e58547fa.png" xlink:type="simple">https://r.res.easebar.com/pic/20251222/b4210d02-0f6e-4b2b-9550-dd23e58547fa.png</text:a></text:p>
          </table:table-cell>
          <table:table-cell table:style-name="ce1" office:value-type="string" calcext:value-type="string">
            <text:p>Boost Damage and Healing. Gain extra healing when healing others</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2" table:number-columns-repeated="24"/>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ICED OUT DIAMOND</text:p>
          </table:table-cell>
          <table:table-cell table:style-name="ce1" office:value-type="string" calcext:value-type="string">
            <text:p><text:a xlink:href="https://r.res.easebar.com/pic/20260107/0241d1da-8792-47ed-bff4-ba336a1d8f8c.png" xlink:type="simple">https://r.res.easebar.com/pic/20260107/0241d1da-8792-47ed-bff4-ba336a1d8f8c.png</text:a></text:p>
          </table:table-cell>
          <table:table-cell table:style-name="ce1" office:value-type="string" calcext:value-type="string">
            <text:p>Luna Snow grants Winter's Chill to Iron Fist and Emma Frost. When Iron Fist activates Harmony Recovery, he can heal nearby allies with Lunar Chi. Emma Frost can project ice energy forward, dealing damage and slowing enemies. She can also enhance her diamond form, condensing frost into an Absolute Zero Diamond barrier that blocks enemy attacks and movement</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2" table:number-columns-repeated="24"/>
          <table:table-cell table:number-columns-repeated="16355"/>
        </table:table-row>
        <table:table-row table:style-name="ro1">
          <table:table-cell table:style-name="ce1" office:value-type="string" calcext:value-type="string">
            <text:p>LUNA SNOW</text:p>
          </table:table-cell>
          <table:table-cell table:style-name="ce1" office:value-type="string" calcext:value-type="string">
            <text:p>SPIRIT FOX ACCORD</text:p>
          </table:table-cell>
          <table:table-cell table:style-name="ce1" office:value-type="string" calcext:value-type="string">
            <text:p><text:a xlink:href="https://r.res.easebar.com/pic/20260320/ebe9992a-a9bc-4840-9e3b-7b37ed9cdba3.png" xlink:type="simple">https://r.res.easebar.com/pic/20260320/ebe9992a-a9bc-4840-9e3b-7b37ed9cdba3.png</text:a></text:p>
          </table:table-cell>
          <table:table-cell table:style-name="ce1" office:value-type="string" calcext:value-type="string">
            <text:p>White Fox grants Luna Snow a spirit fox for protection. Luna can activate it for a burst of speed and fire it forward, healing allies in its path while applying Charm to enemies</text:p>
          </table:table-cell>
          <table:table-cell table:style-name="ce1" office:value-type="string" calcext:value-type="string">
            <text:p><text:a xlink:href="https://www.marvelrivals.com/20241123/41360_1195671.html" xlink:type="simple">https://www.marvelrivals.com/20241123/41360_1195671.html</text:a></text:p>
          </table:table-cell>
          <table:table-cell table:style-name="ce2" table:number-columns-repeated="24"/>
          <table:table-cell table:number-columns-repeated="16355"/>
        </table:table-row>
        <table:table-row table:style-name="ro1">
          <table:table-cell table:style-name="ce1" office:value-type="string" calcext:value-type="string">
            <text:p>ADAM WARLOCK</text:p>
          </table:table-cell>
          <table:table-cell table:style-name="ce1" office:value-type="string" calcext:value-type="string">
            <text:p>Quantum Magic</text:p>
          </table:table-cell>
          <table:table-cell table:style-name="ce1" office:value-type="string" calcext:value-type="string">
            <text:p><text:a xlink:href="https://r.res.easebar.com/pic/20241120/996e6c76-b2b8-42c6-9e17-c74f25768123.png" xlink:type="simple">https://r.res.easebar.com/pic/20241120/996e6c76-b2b8-42c6-9e17-c74f25768123.png</text:a></text:p>
          </table:table-cell>
          <table:table-cell table:style-name="ce1" office:value-type="string" calcext:value-type="string">
            <text:p>Launch quantum energy to deal damage</text:p>
          </table:table-cell>
          <table:table-cell table:style-name="ce1" office:value-type="string" calcext:value-type="string">
            <text:p><text:a xlink:href="https://www.marvelrivals.com/20241123/41360_1195670.html" xlink:type="simple">https://www.marvelrivals.com/20241123/41360_1195670.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Star-Lord - Blaster Barrage,</text:p>
          </table:table-cell>
          <table:table-cell table:style-name="ce2" table:number-columns-repeated="23"/>
          <table:table-cell table:number-columns-repeated="16355"/>
        </table:table-row>
        <table:table-row table:style-name="ro1">
          <table:table-cell table:style-name="ce1" office:value-type="string" calcext:value-type="string">
            <text:p>ADAM WARLOCK</text:p>
          </table:table-cell>
          <table:table-cell table:style-name="ce1" office:value-type="string" calcext:value-type="string">
            <text:p>Karmic Revival</text:p>
          </table:table-cell>
          <table:table-cell table:style-name="ce1" office:value-type="string" calcext:value-type="string">
            <text:p><text:a xlink:href="https://r.res.easebar.com/pic/20260311/6c4e7eed-03e0-472a-a3a5-8f81cbd9cf4a.png" xlink:type="simple">https://r.res.easebar.com/pic/20260311/6c4e7eed-03e0-472a-a3a5-8f81cbd9cf4a.png</text:a></text:p>
          </table:table-cell>
          <table:table-cell table:style-name="ce1" office:value-type="string" calcext:value-type="string">
            <text:p>Take to the skies, entering a flying state and swiftly surge forward</text:p>
          </table:table-cell>
          <table:table-cell table:style-name="ce1" office:value-type="string" calcext:value-type="string">
            <text:p><text:a xlink:href="https://www.marvelrivals.com/20241123/41360_1195670.html" xlink:type="simple">https://www.marvelrivals.com/20241123/41360_1195670.html</text:a></text:p>
          </table:table-cell>
          <table:table-cell table:style-name="ce1" office:value-type="string" calcext:value-type="string">
            <text:p>Mantis - Spore Slumber, Luna Snow - Ice Arts, Phoenix - Telekinesis Burst, Squirrel Girl - Squirrel Blockade, Black Widow - Electro-Plasma Explosion, Iron Fist - Yat Jee Chung Kuen, Hela - Soul Drainer, Hulk - Incredible Leap, The Punisher - Deliverance, The Punisher - Adjudication, Luna Snow - Light &amp; Dark Ice,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ADAM WARLOCK</text:p>
          </table:table-cell>
          <table:table-cell table:style-name="ce1" office:value-type="string" calcext:value-type="string">
            <text:p>Karmic Revival</text:p>
          </table:table-cell>
          <table:table-cell table:style-name="ce1" office:value-type="string" calcext:value-type="string">
            <text:p><text:a xlink:href="https://r.res.easebar.com/pic/20241120/bedb33ea-a7d7-482f-a3ba-695afc84d7df.png" xlink:type="simple">https://r.res.easebar.com/pic/20241120/bedb33ea-a7d7-482f-a3ba-695afc84d7df.png</text:a></text:p>
          </table:table-cell>
          <table:table-cell table:style-name="ce1" office:value-type="string" calcext:value-type="string">
            <text:p>Awaken the karma of allies to revive them. Allies revived have lower health but enjoy a brief period of Invincibility</text:p>
          </table:table-cell>
          <table:table-cell table:style-name="ce1" office:value-type="string" calcext:value-type="string">
            <text:p><text:a xlink:href="https://www.marvelrivals.com/20241123/41360_1195670.html" xlink:type="simple">https://www.marvelrivals.com/20241123/41360_1195670.html</text:a></text:p>
          </table:table-cell>
          <table:table-cell table:style-name="ce1" office:value-type="string" calcext:value-type="string">
            <text:p>Angela - Heven's Retribution, Blade - Daywalker Dash, Blade - Thousand-Fold Slash, Human Torch - Supernova, Black Widow - Edge Dancer, Iron Man - Invincible Pulse Cannon, Moon Knight - Hand of Khonshu, Moon Knight - Ancient Ankh, Moon Knight - Crescent Dart, Moon Knight - Moon Blade, Namor - Horn of Proteus, Winter Soldier - Kraken Impact, Magik - Darkchild, Human Torch - Pyro-Prison, Spider-man - Spectacular Spin, Storm - Omega Hurricane, Jeff the Land Shark - It's Jeff!, </text:p>
          </table:table-cell>
          <table:table-cell table:style-name="ce2" table:number-columns-repeated="23"/>
          <table:table-cell table:number-columns-repeated="16355"/>
        </table:table-row>
        <table:table-row table:style-name="ro1">
          <table:table-cell table:style-name="ce1" office:value-type="string" calcext:value-type="string">
            <text:p>ADAM WARLOCK</text:p>
          </table:table-cell>
          <table:table-cell table:style-name="ce1" office:value-type="string" calcext:value-type="string">
            <text:p>Soul Bond</text:p>
          </table:table-cell>
          <table:table-cell table:style-name="ce1" office:value-type="string" calcext:value-type="string">
            <text:p><text:a xlink:href="https://r.res.easebar.com/pic/20241120/6d9c5f2f-ad6d-4f5e-9a1d-bf039b2d6fdc.png" xlink:type="simple">https://r.res.easebar.com/pic/20241120/6d9c5f2f-ad6d-4f5e-9a1d-bf039b2d6fdc.png</text:a></text:p>
          </table:table-cell>
          <table:table-cell table:style-name="ce1" office:value-type="string" calcext:value-type="string">
            <text:p>Forge a soul bond with allies, granting Healing Over Time and distributing damage taken across the bond</text:p>
          </table:table-cell>
          <table:table-cell table:style-name="ce1" office:value-type="string" calcext:value-type="string">
            <text:p><text:a xlink:href="https://www.marvelrivals.com/20241123/41360_1195670.html" xlink:type="simple">https://www.marvelrivals.com/20241123/41360_1195670.html</text:a></text:p>
          </table:table-cell>
          <table:table-cell table:style-name="ce1" office:value-type="string" calcext:value-type="string">
            <text:p>Blade - Thousand-Fold Slash</text:p>
          </table:table-cell>
          <table:table-cell table:style-name="ce2" table:number-columns-repeated="23"/>
          <table:table-cell table:number-columns-repeated="16355"/>
        </table:table-row>
        <table:table-row table:style-name="ro1">
          <table:table-cell table:style-name="ce1" office:value-type="string" calcext:value-type="string">
            <text:p>ADAM WARLOCK</text:p>
          </table:table-cell>
          <table:table-cell table:style-name="ce1" office:value-type="string" calcext:value-type="string">
            <text:p>Avatar Life Stream</text:p>
          </table:table-cell>
          <table:table-cell table:style-name="ce1" office:value-type="string" calcext:value-type="string">
            <text:p><text:a xlink:href="https://r.res.easebar.com/pic/20241120/00ceedf0-0fab-45f5-bcb6-009797271b65.png" xlink:type="simple">https://r.res.easebar.com/pic/20241120/00ceedf0-0fab-45f5-bcb6-009797271b65.png</text:a></text:p>
          </table:table-cell>
          <table:table-cell table:style-name="ce1" office:value-type="string" calcext:value-type="string">
            <text:p>Target an ally for a bouncing stream of healing energy, which also heals himself upon casting; self-targets if no ally is selected</text:p>
          </table:table-cell>
          <table:table-cell table:style-name="ce1" office:value-type="string" calcext:value-type="string">
            <text:p><text:a xlink:href="https://www.marvelrivals.com/20241123/41360_1195670.html" xlink:type="simple">https://www.marvelrivals.com/20241123/41360_1195670.html</text:a></text:p>
          </table:table-cell>
          <table:table-cell table:style-name="ce2" table:number-columns-repeated="24"/>
          <table:table-cell table:number-columns-repeated="16355"/>
        </table:table-row>
        <table:table-row table:style-name="ro1">
          <table:table-cell table:style-name="ce1" office:value-type="string" calcext:value-type="string">
            <text:p>ADAM WARLOCK</text:p>
          </table:table-cell>
          <table:table-cell table:style-name="ce1" office:value-type="string" calcext:value-type="string">
            <text:p>Cosmic Cluster</text:p>
          </table:table-cell>
          <table:table-cell table:style-name="ce1" office:value-type="string" calcext:value-type="string">
            <text:p><text:a xlink:href="https://r.res.easebar.com/pic/20241120/cac2ca73-29e2-4ea4-87f9-1f1c0c24f382.png" xlink:type="simple">https://r.res.easebar.com/pic/20241120/cac2ca73-29e2-4ea4-87f9-1f1c0c24f382.png</text:a></text:p>
          </table:table-cell>
          <table:table-cell table:style-name="ce1" office:value-type="string" calcext:value-type="string">
            <text:p>Gather quantum energy into a cluster and then swiftly launch it at the enemy</text:p>
          </table:table-cell>
          <table:table-cell table:style-name="ce1" office:value-type="string" calcext:value-type="string">
            <text:p><text:a xlink:href="https://www.marvelrivals.com/20241123/41360_1195670.html" xlink:type="simple">https://www.marvelrivals.com/20241123/41360_1195670.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ADAM WARLOCK</text:p>
          </table:table-cell>
          <table:table-cell table:style-name="ce1" office:value-type="string" calcext:value-type="string">
            <text:p>Regenerative Cocoon</text:p>
          </table:table-cell>
          <table:table-cell table:style-name="ce1" office:value-type="string" calcext:value-type="string">
            <text:p><text:a xlink:href="https://r.res.easebar.com/pic/20241120/b85e229f-e718-4402-9c78-3ce82b3b5ee0.png" xlink:type="simple">https://r.res.easebar.com/pic/20241120/b85e229f-e718-4402-9c78-3ce82b3b5ee0.png</text:a></text:p>
          </table:table-cell>
          <table:table-cell table:style-name="ce1" office:value-type="string" calcext:value-type="string">
            <text:p>Once his body perishes, Adam Warlock can freely move as a soul and reforge his body at a chosen spot</text:p>
          </table:table-cell>
          <table:table-cell table:style-name="ce1" office:value-type="string" calcext:value-type="string">
            <text:p><text:a xlink:href="https://www.marvelrivals.com/20241123/41360_1195670.html" xlink:type="simple">https://www.marvelrivals.com/20241123/41360_1195670.html</text:a></text:p>
          </table:table-cell>
          <table:table-cell table:style-name="ce2" table:number-columns-repeated="24"/>
          <table:table-cell table:number-columns-repeated="16355"/>
        </table:table-row>
        <table:table-row table:style-name="ro1">
          <table:table-cell table:style-name="ce1" office:value-type="string" calcext:value-type="string">
            <text:p>ADAM WARLOCK</text:p>
          </table:table-cell>
          <table:table-cell table:style-name="ce1" office:value-type="string" calcext:value-type="string">
            <text:p>HEAVENLY HARMONY</text:p>
          </table:table-cell>
          <table:table-cell table:style-name="ce1" office:value-type="string" calcext:value-type="string">
            <text:p><text:a xlink:href="https://r.res.easebar.com/pic/20260323/aba481e1-c898-43e5-be33-be8393bae864.png" xlink:type="simple">https://r.res.easebar.com/pic/20260323/aba481e1-c898-43e5-be33-be8393bae864.png</text:a></text:p>
          </table:table-cell>
          <table:table-cell table:style-name="ce1" office:value-type="string" calcext:value-type="string">
            <text:p>Storm channels her elemental power into Adam Warlock. When Adam uses Soaring Surge, his movement speed is increased. While flying, Adam leaves behind a storm-charged trail that heals and speeds up allies within it</text:p>
          </table:table-cell>
          <table:table-cell table:style-name="ce1" office:value-type="string" calcext:value-type="string">
            <text:p><text:a xlink:href="https://www.marvelrivals.com/20241123/41360_1195670.html" xlink:type="simple">https://www.marvelrivals.com/20241123/41360_1195670.html</text:a></text:p>
          </table:table-cell>
          <table:table-cell table:style-name="ce2" table:number-columns-repeated="24"/>
          <table:table-cell table:number-columns-repeated="16355"/>
        </table:table-row>
        <table:table-row table:style-name="ro1">
          <table:table-cell table:style-name="ce1" office:value-type="string" calcext:value-type="string">
            <text:p>ROCKET RACCOON</text:p>
          </table:table-cell>
          <table:table-cell table:style-name="ce1" office:value-type="string" calcext:value-type="string">
            <text:p>Bombard Mode</text:p>
          </table:table-cell>
          <table:table-cell table:style-name="ce1" office:value-type="string" calcext:value-type="string">
            <text:p><text:a xlink:href="https://r.res.easebar.com/pic/20241120/6d5fc9e6-f194-494f-bcb9-a0eea60e7f60.png" xlink:type="simple">https://r.res.easebar.com/pic/20241120/6d5fc9e6-f194-494f-bcb9-a0eea60e7f60.png</text:a></text:p>
          </table:table-cell>
          <table:table-cell table:style-name="ce1" office:value-type="string" calcext:value-type="string">
            <text:p>Fire energy projectiles that deal damage</text:p>
          </table:table-cell>
          <table:table-cell table:style-name="ce1" office:value-type="string" calcext:value-type="string">
            <text:p><text:a xlink:href="https://www.marvelrivals.com/20241123/41360_1195663.html" xlink:type="simple">https://www.marvelrivals.com/20241123/41360_119566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ROCKET RACCOON</text:p>
          </table:table-cell>
          <table:table-cell table:style-name="ce1" office:value-type="string" calcext:value-type="string">
            <text:p>Repair Mode</text:p>
          </table:table-cell>
          <table:table-cell table:style-name="ce1" office:value-type="string" calcext:value-type="string">
            <text:p><text:a xlink:href="https://r.res.easebar.com/pic/20241120/8e83a73c-dbc6-4d8b-bf0e-2f6fbffe20a4.png" xlink:type="simple">https://r.res.easebar.com/pic/20241120/8e83a73c-dbc6-4d8b-bf0e-2f6fbffe20a4.png</text:a></text:p>
          </table:table-cell>
          <table:table-cell table:style-name="ce1" office:value-type="string" calcext:value-type="string">
            <text:p>Shoot bouncing spheres to heal allies</text:p>
          </table:table-cell>
          <table:table-cell table:style-name="ce1" office:value-type="string" calcext:value-type="string">
            <text:p><text:a xlink:href="https://www.marvelrivals.com/20241123/41360_1195663.html" xlink:type="simple">https://www.marvelrivals.com/20241123/41360_119566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ROCKET RACCOON</text:p>
          </table:table-cell>
          <table:table-cell table:style-name="ce1" office:value-type="string" calcext:value-type="string">
            <text:p>C.Y.A.</text:p>
          </table:table-cell>
          <table:table-cell table:style-name="ce1" office:value-type="string" calcext:value-type="string">
            <text:p><text:a xlink:href="https://r.res.easebar.com/pic/20241120/8fa6c871-fb91-4115-bf94-a1ccf6f12d2c.png" xlink:type="simple">https://r.res.easebar.com/pic/20241120/8fa6c871-fb91-4115-bf94-a1ccf6f12d2c.png</text:a></text:p>
          </table:table-cell>
          <table:table-cell table:style-name="ce1" office:value-type="string" calcext:value-type="string">
            <text:p>Deploy a Cosmic Yarn Amplifier that grants allies a Damage Boost</text:p>
          </table:table-cell>
          <table:table-cell table:style-name="ce1" office:value-type="string" calcext:value-type="string">
            <text:p><text:a xlink:href="https://www.marvelrivals.com/20241123/41360_1195663.html" xlink:type="simple">https://www.marvelrivals.com/20241123/41360_1195663.html</text:a></text:p>
          </table:table-cell>
          <table:table-cell table:style-name="ce1" office:value-type="string" calcext:value-type="string">
            <text:p>Blade - Thousand-Fold Slash, Phoenix - Endsong Inferno, Moon Knight - Hand of Khonshu, Human Torch - Supernova, Moon Knight - Hand of Khonshu, Invisible Woman - Psionic Vortex, Scarlet Witch - Reality Erasure,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ROCKET RACCOON</text:p>
          </table:table-cell>
          <table:table-cell table:style-name="ce1" office:value-type="string" calcext:value-type="string">
            <text:p>Jetpack Dash</text:p>
          </table:table-cell>
          <table:table-cell table:style-name="ce1" office:value-type="string" calcext:value-type="string">
            <text:p><text:a xlink:href="https://r.res.easebar.com/pic/20241120/66c6ccca-0e2b-4c87-87c3-29fddfa3b4c1.png" xlink:type="simple">https://r.res.easebar.com/pic/20241120/66c6ccca-0e2b-4c87-87c3-29fddfa3b4c1.png</text:a></text:p>
          </table:table-cell>
          <table:table-cell table:style-name="ce1" office:value-type="string" calcext:value-type="string">
            <text:p>Dash forward</text:p>
          </table:table-cell>
          <table:table-cell table:style-name="ce1" office:value-type="string" calcext:value-type="string">
            <text:p><text:a xlink:href="https://www.marvelrivals.com/20241123/41360_1195663.html" xlink:type="simple">https://www.marvelrivals.com/20241123/41360_1195663.html</text:a></text:p>
          </table:table-cell>
          <table:table-cell table:style-name="ce1" office:value-type="string" calcext:value-type="string">
            <text:p>Mantis - Spore Slumber, Luna Snow - Ice Arts, Phoenix - Telekinesis Burst, The Thing - Battle Blitz, Mister Fantastic - Distended Grip, Mister Fantastic - Flexible Elongation, Squirrel Girl - Squirrel Blockade, Black Widow - Edge Dancer, Iron Fist - Yat Jee Chung Kuen, Winter Soldier - Trooper's Fist, Winter Soldier - Bionic Hook, Spider-man - Get Over Here!, Hela - Soul Drainer,</text:p>
          </table:table-cell>
          <table:table-cell table:style-name="ce2" table:number-columns-repeated="23"/>
          <table:table-cell table:number-columns-repeated="16355"/>
        </table:table-row>
        <table:table-row table:style-name="ro1">
          <table:table-cell table:style-name="ce1" office:value-type="string" calcext:value-type="string">
            <text:p>ROCKET RACCOON</text:p>
          </table:table-cell>
          <table:table-cell table:style-name="ce1" office:value-type="string" calcext:value-type="string">
            <text:p>B.R.B.</text:p>
          </table:table-cell>
          <table:table-cell table:style-name="ce1" office:value-type="string" calcext:value-type="string">
            <text:p><text:a xlink:href="https://r.res.easebar.com/pic/20241120/f5f99d54-aeaa-4dc8-bad1-7c0e390434cf.png" xlink:type="simple">https://r.res.easebar.com/pic/20241120/f5f99d54-aeaa-4dc8-bad1-7c0e390434cf.png</text:a></text:p>
          </table:table-cell>
          <table:table-cell table:style-name="ce1" office:value-type="string" calcext:value-type="string">
            <text:p>Deploy a Battle Rebirth Beacon that revives a fallen ally and periodically produces armor packs and rocket jet packs</text:p>
          </table:table-cell>
          <table:table-cell table:style-name="ce1" office:value-type="string" calcext:value-type="string">
            <text:p><text:a xlink:href="https://www.marvelrivals.com/20241123/41360_1195663.html" xlink:type="simple">https://www.marvelrivals.com/20241123/41360_1195663.html</text:a></text:p>
          </table:table-cell>
          <table:table-cell table:style-name="ce1" office:value-type="string" calcext:value-type="string">
            <text:p>Phoenix - Endsong Inferno, </text:p>
          </table:table-cell>
          <table:table-cell table:style-name="ce2" table:number-columns-repeated="23"/>
          <table:table-cell table:number-columns-repeated="16355"/>
        </table:table-row>
        <table:table-row table:style-name="ro1">
          <table:table-cell table:style-name="ce1" office:value-type="string" calcext:value-type="string">
            <text:p>ROCKET RACCOON</text:p>
          </table:table-cell>
          <table:table-cell table:style-name="ce1" office:value-type="string" calcext:value-type="string">
            <text:p>Wild Crawl</text:p>
          </table:table-cell>
          <table:table-cell table:style-name="ce1" office:value-type="string" calcext:value-type="string">
            <text:p><text:a xlink:href="https://r.res.easebar.com/pic/20241120/2bf79c26-d564-4a9e-8148-85e5b44add4f.png" xlink:type="simple">https://r.res.easebar.com/pic/20241120/2bf79c26-d564-4a9e-8148-85e5b44add4f.png</text:a></text:p>
          </table:table-cell>
          <table:table-cell table:style-name="ce1" office:value-type="string" calcext:value-type="string">
            <text:p>Hold Space to run on a wall</text:p>
          </table:table-cell>
          <table:table-cell table:style-name="ce1" office:value-type="string" calcext:value-type="string">
            <text:p><text:a xlink:href="https://www.marvelrivals.com/20241123/41360_1195663.html" xlink:type="simple">https://www.marvelrivals.com/20241123/41360_1195663.html</text:a></text:p>
          </table:table-cell>
          <table:table-cell table:style-name="ce1" office:value-type="string" calcext:value-type="string">
            <text:p>Mantis - Spore Slumber, Luna Snow - Ice Arts, Phoenix - Telekinesis Burst, Emma Frost - Carbon Crush, Emma Frost - Crystal Kick, The Thing - Yancy Street Charge, Invisible Woman - Force Physics, Mister Fantastic - Distended Grip, Mister Fantastic - Flexible Elongation, Squirrel Girl - Squirrel Blockade, Iron Fist - Yat Jee Chung Kuen, Winter Soldier - Trooper's Fist, Winter Soldier - Bionic Hook, Spider-man - Get Over Here!, Hela - Soul Drainer, Storm - Omega Hurricane, Angela - Assassins Charge, Blade - Daywalker Dash, Winter Soldier - Tainted Voltage,</text:p>
          </table:table-cell>
          <table:table-cell table:style-name="ce2" table:number-columns-repeated="23"/>
          <table:table-cell table:number-columns-repeated="16355"/>
        </table:table-row>
        <table:table-row table:style-name="ro1">
          <table:table-cell table:style-name="ce1" office:value-type="string" calcext:value-type="string">
            <text:p>ROCKET RACCOON</text:p>
          </table:table-cell>
          <table:table-cell table:style-name="ce1" office:value-type="string" calcext:value-type="string">
            <text:p>Flying Ace</text:p>
          </table:table-cell>
          <table:table-cell table:style-name="ce1" office:value-type="string" calcext:value-type="string">
            <text:p><text:a xlink:href="https://r.res.easebar.com/pic/20241120/75456c26-a53f-4d7e-955f-b663d7dd337a.png" xlink:type="simple">https://r.res.easebar.com/pic/20241120/75456c26-a53f-4d7e-955f-b663d7dd337a.png</text:a></text:p>
          </table:table-cell>
          <table:table-cell table:style-name="ce1" office:value-type="string" calcext:value-type="string">
            <text:p>Hold Space to fall slowly</text:p>
          </table:table-cell>
          <table:table-cell table:style-name="ce1" office:value-type="string" calcext:value-type="string">
            <text:p><text:a xlink:href="https://www.marvelrivals.com/20241123/41360_1195663.html" xlink:type="simple">https://www.marvelrivals.com/20241123/41360_1195663.html</text:a></text:p>
          </table:table-cell>
          <table:table-cell table:style-name="ce1" office:value-type="string" calcext:value-type="string">
            <text:p>Winter Soldier - Trooper's Fist, Winter Soldier - Bionic Hook, Winter Soldier - Tainted Voltage, Spider-man - Get Over Here!, Hela - Nightsword Thorn, Hulk - Incredible Leap,</text:p>
          </table:table-cell>
          <table:table-cell table:style-name="ce2" table:number-columns-repeated="23"/>
          <table:table-cell table:number-columns-repeated="16355"/>
        </table:table-row>
        <table:table-row table:style-name="ro1">
          <table:table-cell table:style-name="ce1" office:value-type="string" calcext:value-type="string">
            <text:p>ROCKET RACCOON</text:p>
          </table:table-cell>
          <table:table-cell table:style-name="ce1" office:value-type="string" calcext:value-type="string">
            <text:p>Old Friends</text:p>
          </table:table-cell>
          <table:table-cell table:style-name="ce1" office:value-type="string" calcext:value-type="string">
            <text:p><text:a xlink:href="https://r.res.easebar.com/pic/20241120/8f92cf82-a9bb-4c40-bb3c-2aa6aebc9c6d.png" xlink:type="simple">https://r.res.easebar.com/pic/20241120/8f92cf82-a9bb-4c40-bb3c-2aa6aebc9c6d.png</text:a></text:p>
          </table:table-cell>
          <table:table-cell table:style-name="ce1" office:value-type="string" calcext:value-type="string">
            <text:p>Jeff the Land Shark and Rocket Raccoon can ride on Groot's shoulders, receiving Damage Reduction</text:p>
          </table:table-cell>
          <table:table-cell table:style-name="ce1" office:value-type="string" calcext:value-type="string">
            <text:p><text:a xlink:href="https://www.marvelrivals.com/20241123/41360_1195663.html" xlink:type="simple">https://www.marvelrivals.com/20241123/41360_1195663.html</text:a></text:p>
          </table:table-cell>
          <table:table-cell table:style-name="ce1" office:value-type="string" calcext:value-type="string">
            <text:p>Hela - Soul Drainer, Winter Soldier - Trooper's Fist, Winter Soldier - Bionic Hook, Spider-man - Get Over Here!,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LOKI</text:p>
          </table:table-cell>
          <table:table-cell table:style-name="ce1" office:value-type="string" calcext:value-type="string">
            <text:p>Mystical Missile</text:p>
          </table:table-cell>
          <table:table-cell table:style-name="ce1" office:value-type="string" calcext:value-type="string">
            <text:p><text:a xlink:href="https://r.res.easebar.com/pic/20241120/ed396f47-c71d-47d9-b81b-3345b8dc9622.png" xlink:type="simple">https://r.res.easebar.com/pic/20241120/ed396f47-c71d-47d9-b81b-3345b8dc9622.png</text:a></text:p>
          </table:table-cell>
          <table:table-cell table:style-name="ce1" office:value-type="string" calcext:value-type="string">
            <text:p>Fire Mystical Missiles to heal allies or deal damage to enemies. Direct hits on allies provide extra healing</text:p>
          </table:table-cell>
          <table:table-cell table:style-name="ce1" office:value-type="string" calcext:value-type="string">
            <text:p><text:a xlink:href="https://www.marvelrivals.com/20241123/41360_1195662.html" xlink:type="simple">https://www.marvelrivals.com/20241123/41360_1195662.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ulk - Indestructible Guard,</text:p>
          </table:table-cell>
          <table:table-cell table:style-name="ce2" table:number-columns-repeated="23"/>
          <table:table-cell table:number-columns-repeated="16355"/>
        </table:table-row>
        <table:table-row table:style-name="ro1">
          <table:table-cell table:style-name="ce1" office:value-type="string" calcext:value-type="string">
            <text:p>LOKI</text:p>
          </table:table-cell>
          <table:table-cell table:style-name="ce1" office:value-type="string" calcext:value-type="string">
            <text:p>God of Mischief</text:p>
          </table:table-cell>
          <table:table-cell table:style-name="ce1" office:value-type="string" calcext:value-type="string">
            <text:p><text:a xlink:href="https://r.res.easebar.com/pic/20241120/8348514b-e03f-442b-9aa2-ab90fcd2186a.png" xlink:type="simple">https://r.res.easebar.com/pic/20241120/8348514b-e03f-442b-9aa2-ab90fcd2186a.png</text:a></text:p>
          </table:table-cell>
          <table:table-cell table:style-name="ce1" office:value-type="string" calcext:value-type="string">
            <text:p>Shapeshift into a targeted ally or enemy hero and use all their abilities except any of their Team-Up Abilities</text:p>
          </table:table-cell>
          <table:table-cell table:style-name="ce1" office:value-type="string" calcext:value-type="string">
            <text:p><text:a xlink:href="https://www.marvelrivals.com/20241123/41360_1195662.html" xlink:type="simple">https://www.marvelrivals.com/20241123/41360_1195662.html</text:a></text:p>
          </table:table-cell>
          <table:table-cell table:style-name="ce1" office:value-type="string" calcext:value-type="string">
            <text:p>Mantis - Spore Slumber, Luna Snow - Ice Arts, Phoenix - Telekinesis Burst, Scarlet Witch - Dark Seal,</text:p>
          </table:table-cell>
          <table:table-cell table:style-name="ce2" table:number-columns-repeated="23"/>
          <table:table-cell table:number-columns-repeated="16355"/>
        </table:table-row>
        <table:table-row table:style-name="ro1">
          <table:table-cell table:style-name="ce1" office:value-type="string" calcext:value-type="string">
            <text:p>LOKI</text:p>
          </table:table-cell>
          <table:table-cell table:style-name="ce1" office:value-type="string" calcext:value-type="string">
            <text:p>Regeneration Domain</text:p>
          </table:table-cell>
          <table:table-cell table:style-name="ce1" office:value-type="string" calcext:value-type="string">
            <text:p><text:a xlink:href="https://r.res.easebar.com/pic/20241120/e7dd8ace-749c-49a0-bc71-bb9c59a8ba2f.png" xlink:type="simple">https://r.res.easebar.com/pic/20241120/e7dd8ace-749c-49a0-bc71-bb9c59a8ba2f.png</text:a></text:p>
          </table:table-cell>
          <table:table-cell table:style-name="ce1" office:value-type="string" calcext:value-type="string">
            <text:p>Use Rune Stones to create a magical field that provides allies Healing and converts incoming damage into further healing</text:p>
          </table:table-cell>
          <table:table-cell table:style-name="ce1" office:value-type="string" calcext:value-type="string">
            <text:p><text:a xlink:href="https://www.marvelrivals.com/20241123/41360_1195662.html" xlink:type="simple">https://www.marvelrivals.com/20241123/41360_1195662.html</text:a></text:p>
          </table:table-cell>
          <table:table-cell table:style-name="ce1" office:value-type="string" calcext:value-type="string">
            <text:p>Blade - Thousand-Fold Slash, Phoenix - Endsong Inferno, Wolverine - Last Stand, Wolverine - Feral Leap, Moon Knight - Hand of Khonshu,</text:p>
          </table:table-cell>
          <table:table-cell table:style-name="ce2" table:number-columns-repeated="23"/>
          <table:table-cell table:number-columns-repeated="16355"/>
        </table:table-row>
        <table:table-row table:style-name="ro1">
          <table:table-cell table:style-name="ce1" office:value-type="string" calcext:value-type="string">
            <text:p>LOKI</text:p>
          </table:table-cell>
          <table:table-cell table:style-name="ce1" office:value-type="string" calcext:value-type="string">
            <text:p>Doppelganger</text:p>
          </table:table-cell>
          <table:table-cell table:style-name="ce1" office:value-type="string" calcext:value-type="string">
            <text:p><text:a xlink:href="https://r.res.easebar.com/pic/20241120/ef9f3e86-7ad9-4ad4-8ca5-490d580e567b.png" xlink:type="simple">https://r.res.easebar.com/pic/20241120/ef9f3e86-7ad9-4ad4-8ca5-490d580e567b.png</text:a></text:p>
          </table:table-cell>
          <table:table-cell table:style-name="ce1" office:value-type="string" calcext:value-type="string">
            <text:p>Project an Illusion that can cast some of Loki's abilities</text:p>
          </table:table-cell>
          <table:table-cell table:style-name="ce1" office:value-type="string" calcext:value-type="string">
            <text:p><text:a xlink:href="https://www.marvelrivals.com/20241123/41360_1195662.html" xlink:type="simple">https://www.marvelrivals.com/20241123/41360_1195662.html</text:a></text:p>
          </table:table-cell>
          <table:table-cell table:style-name="ce1" office:value-type="string" calcext:value-type="string">
            <text:p>Phoenix - Endsong Inferno, The Thing - Battle Blitz, Moon Knight - Ancient Ankh, Moon Knight - Crescent Dart, Moon Knight - Moon Blade, Hela - Soul Drainer,</text:p>
          </table:table-cell>
          <table:table-cell table:style-name="ce2" table:number-columns-repeated="23"/>
          <table:table-cell table:number-columns-repeated="16355"/>
        </table:table-row>
        <table:table-row table:style-name="ro1">
          <table:table-cell table:style-name="ce1" office:value-type="string" calcext:value-type="string">
            <text:p>LOKI</text:p>
          </table:table-cell>
          <table:table-cell table:style-name="ce1" office:value-type="string" calcext:value-type="string">
            <text:p>Devious Exchange</text:p>
          </table:table-cell>
          <table:table-cell table:style-name="ce1" office:value-type="string" calcext:value-type="string">
            <text:p><text:a xlink:href="https://r.res.easebar.com/pic/20241120/ac0da903-c22d-4471-bff9-d7df0a2a6ba6.png" xlink:type="simple">https://r.res.easebar.com/pic/20241120/ac0da903-c22d-4471-bff9-d7df0a2a6ba6.png</text:a></text:p>
          </table:table-cell>
          <table:table-cell table:style-name="ce1" office:value-type="string" calcext:value-type="string">
            <text:p>Swap with the selected Illusion</text:p>
          </table:table-cell>
          <table:table-cell table:style-name="ce1" office:value-type="string" calcext:value-type="string">
            <text:p><text:a xlink:href="https://www.marvelrivals.com/20241123/41360_1195662.html" xlink:type="simple">https://www.marvelrivals.com/20241123/41360_1195662.html</text:a></text:p>
          </table:table-cell>
          <table:table-cell table:style-name="ce1" office:value-type="string" calcext:value-type="string">
            <text:p>The Thing - Battle Blitz, The Thing - Yancy Street Charge, Black Cat - Mento-Fish, Moon Knight - Ancient Ankh, Moon Knight - Crescent Dart, Moon Knight - Moon Blade,</text:p>
          </table:table-cell>
          <table:table-cell table:style-name="ce2" table:number-columns-repeated="23"/>
          <table:table-cell table:number-columns-repeated="16355"/>
        </table:table-row>
        <table:table-row table:style-name="ro1">
          <table:table-cell table:style-name="ce1" office:value-type="string" calcext:value-type="string">
            <text:p>LOKI</text:p>
          </table:table-cell>
          <table:table-cell table:style-name="ce1" office:value-type="string" calcext:value-type="string">
            <text:p>Backstab</text:p>
          </table:table-cell>
          <table:table-cell table:style-name="ce1" office:value-type="string" calcext:value-type="string">
            <text:p><text:a xlink:href="https://r.res.easebar.com/pic/20241120/fe10c19c-0649-4c4d-a406-4e7ea9ada27a.png" xlink:type="simple">https://r.res.easebar.com/pic/20241120/fe10c19c-0649-4c4d-a406-4e7ea9ada27a.png</text:a></text:p>
          </table:table-cell>
          <table:table-cell table:style-name="ce1" office:value-type="string" calcext:value-type="string">
            <text:p>Pull out a dagger to stab enemies, dealing extra damage when attacking an enemy from behind</text:p>
          </table:table-cell>
          <table:table-cell table:style-name="ce1" office:value-type="string" calcext:value-type="string">
            <text:p><text:a xlink:href="https://www.marvelrivals.com/20241123/41360_1195662.html" xlink:type="simple">https://www.marvelrivals.com/20241123/41360_1195662.html</text:a></text:p>
          </table:table-cell>
          <table:table-cell table:style-name="ce2" table:number-columns-repeated="24"/>
          <table:table-cell table:number-columns-repeated="16355"/>
        </table:table-row>
        <table:table-row table:style-name="ro1">
          <table:table-cell table:style-name="ce1" office:value-type="string" calcext:value-type="string">
            <text:p>LOKI</text:p>
          </table:table-cell>
          <table:table-cell table:style-name="ce1" office:value-type="string" calcext:value-type="string">
            <text:p>Deception</text:p>
          </table:table-cell>
          <table:table-cell table:style-name="ce1" office:value-type="string" calcext:value-type="string">
            <text:p><text:a xlink:href="https://r.res.easebar.com/pic/20241120/ed974a34-cbea-4529-b613-028bb481b125.png" xlink:type="simple">https://r.res.easebar.com/pic/20241120/ed974a34-cbea-4529-b613-028bb481b125.png</text:a></text:p>
          </table:table-cell>
          <table:table-cell table:style-name="ce1" office:value-type="string" calcext:value-type="string">
            <text:p>Become Invisible and conjure an Illusion to deceive enemies</text:p>
          </table:table-cell>
          <table:table-cell table:style-name="ce1" office:value-type="string" calcext:value-type="string">
            <text:p><text:a xlink:href="https://www.marvelrivals.com/20241123/41360_1195662.html" xlink:type="simple">https://www.marvelrivals.com/20241123/41360_1195662.html</text:a></text:p>
          </table:table-cell>
          <table:table-cell table:style-name="ce1" office:value-type="string" calcext:value-type="string">
            <text:p>Phoenix - Endsong Inferno, Invisible Woman - Psionic Vortex, Squirrel Girl - Unbeatable Squirrel Tsunami, Black Widow- Edge Dancer, Moon Knight - Ancient Ankh, Moon Knight - Crescent Dart, Moon Knight - Moon Blade, Namor - Aquatic Dominion, Deadpool - Deadpool in Your Area, Star-Lord - Blaster Barrage, Thor - Lightning Realm, Winter Soldier - Trooper's Fist, Winter Soldier - Bionic Hook, Magik - Eldritch Whirl, Rogue - Fatal Attraction, Spider-man - Spider-Sense, Spider-man - Spectacular Spin, Jeff the Land Shark - Joyful Splash,</text:p>
          </table:table-cell>
          <table:table-cell table:style-name="ce2" table:number-columns-repeated="23"/>
          <table:table-cell table:number-columns-repeated="16355"/>
        </table:table-row>
        <table:table-row table:style-name="ro1">
          <table:table-cell table:style-name="ce1" office:value-type="string" calcext:value-type="string">
            <text:p>LOKI</text:p>
          </table:table-cell>
          <table:table-cell table:style-name="ce1" office:value-type="string" calcext:value-type="string">
            <text:p>Deific Blessing</text:p>
          </table:table-cell>
          <table:table-cell table:style-name="ce1" office:value-type="string" calcext:value-type="string">
            <text:p><text:a xlink:href="https://r.res.easebar.com/pic/20250808/bc864d9a-7a8e-4700-84aa-324d7227de88.png" xlink:type="simple">https://r.res.easebar.com/pic/20250808/bc864d9a-7a8e-4700-84aa-324d7227de88.png</text:a></text:p>
          </table:table-cell>
          <table:table-cell table:style-name="ce1" office:value-type="string" calcext:value-type="string">
            <text:p>Mantis enhances Groot's wooden walls and Loki's Rune Stones with life energy. Groot can additionally unleash a Flower Wall, which, when in Flora Colossus state, restores health to random nearby allies and grants them Damage Reduction. Loki's Rune Stones grant allies within Regeneration Domain a Damage Boost</text:p>
          </table:table-cell>
          <table:table-cell table:style-name="ce1" office:value-type="string" calcext:value-type="string">
            <text:p><text:a xlink:href="https://www.marvelrivals.com/20241123/41360_1195662.html" xlink:type="simple">https://www.marvelrivals.com/20241123/41360_1195662.html</text:a></text:p>
          </table:table-cell>
          <table:table-cell table:style-name="ce2" table:number-columns-repeated="24"/>
          <table:table-cell table:number-columns-repeated="16355"/>
        </table:table-row>
        <table:table-row table:style-name="ro1">
          <table:table-cell table:style-name="ce1" office:value-type="string" calcext:value-type="string">
            <text:p>MANTIS</text:p>
          </table:table-cell>
          <table:table-cell table:style-name="ce1" office:value-type="string" calcext:value-type="string">
            <text:p>Life Energy Blast</text:p>
          </table:table-cell>
          <table:table-cell table:style-name="ce1" office:value-type="string" calcext:value-type="string">
            <text:p><text:a xlink:href="https://r.res.easebar.com/pic/20241120/53a8b0e2-f33b-4630-a318-b11feeb63da7.png" xlink:type="simple">https://r.res.easebar.com/pic/20241120/53a8b0e2-f33b-4630-a318-b11feeb63da7.png</text:a></text:p>
          </table:table-cell>
          <table:table-cell table:style-name="ce1" office:value-type="string" calcext:value-type="string">
            <text:p>Fire an energy thorn and regain one Life Orb after a critical hit.</text:p>
          </table:table-cell>
          <table:table-cell table:style-name="ce1" office:value-type="string" calcext:value-type="string">
            <text:p><text:a xlink:href="https://www.marvelrivals.com/20241123/41360_1195661.html" xlink:type="simple">https://www.marvelrivals.com/20241123/41360_1195661.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Hawkeye - Ronin Slash, Star-Lord - Blaster Barrage,</text:p>
          </table:table-cell>
          <table:table-cell table:style-name="ce2" table:number-columns-repeated="23"/>
          <table:table-cell table:number-columns-repeated="16355"/>
        </table:table-row>
        <table:table-row table:style-name="ro1">
          <table:table-cell table:style-name="ce1" office:value-type="string" calcext:value-type="string">
            <text:p>MANTIS</text:p>
          </table:table-cell>
          <table:table-cell table:style-name="ce1" office:value-type="string" calcext:value-type="string">
            <text:p>Soul Resurgence</text:p>
          </table:table-cell>
          <table:table-cell table:style-name="ce1" office:value-type="string" calcext:value-type="string">
            <text:p><text:a xlink:href="https://r.res.easebar.com/pic/20241120/6185722d-c92f-4eab-8a8c-106168ad6e1a.png" xlink:type="simple">https://r.res.easebar.com/pic/20241120/6185722d-c92f-4eab-8a8c-106168ad6e1a.png</text:a></text:p>
          </table:table-cell>
          <table:table-cell table:style-name="ce1" office:value-type="string" calcext:value-type="string">
            <text:p>Release energy around her while moving, providing Healing Over Time and Movement Boosts for surrounding allies. Excess healing converts to Bonus Health</text:p>
          </table:table-cell>
          <table:table-cell table:style-name="ce1" office:value-type="string" calcext:value-type="string">
            <text:p><text:a xlink:href="https://www.marvelrivals.com/20241123/41360_1195661.html" xlink:type="simple">https://www.marvelrivals.com/20241123/41360_1195661.html</text:a></text:p>
          </table:table-cell>
          <table:table-cell table:style-name="ce1" office:value-type="string" calcext:value-type="string">
            <text:p>Angela - Assassin's Charge, Blade - Thousand-Fold Slash, Phoenix - Endsong Inferno, Black Widow - Electro-Plasma Explosion, Psylocke - Dance of the Butterfly, Iron Man - Invincible Pulse Cannon, Namor - Horn of Proteus, Scarlet Witch - Reality Erasure, Jeff the Land Shark - It's Jeff!,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MANTIS</text:p>
          </table:table-cell>
          <table:table-cell table:style-name="ce1" office:value-type="string" calcext:value-type="string">
            <text:p>Spore Slumber</text:p>
          </table:table-cell>
          <table:table-cell table:style-name="ce1" office:value-type="string" calcext:value-type="string">
            <text:p><text:a xlink:href="https://r.res.easebar.com/pic/20241120/297739c8-b9b1-4d0c-9578-0ba4d2cede4e.png" xlink:type="simple">https://r.res.easebar.com/pic/20241120/297739c8-b9b1-4d0c-9578-0ba4d2cede4e.png</text:a></text:p>
          </table:table-cell>
          <table:table-cell table:style-name="ce1" office:value-type="string" calcext:value-type="string">
            <text:p>Throw a spore to Sedate the nearest enemy</text:p>
          </table:table-cell>
          <table:table-cell table:style-name="ce1" office:value-type="string" calcext:value-type="string">
            <text:p><text:a xlink:href="https://www.marvelrivals.com/20241123/41360_1195661.html" xlink:type="simple">https://www.marvelrivals.com/20241123/41360_1195661.html</text:a></text:p>
          </table:table-cell>
          <table:table-cell table:style-name="ce1" office:value-type="string" calcext:value-type="string">
            <text:p>Blade - Scarlet Shroud, Angela - Shielded Stance, Emma Frost - Diamond Form, The Thing - Yancy Street Charge, Cloak&amp;Dagger - Dark Teleportation, Iron Fist - Dragon's Defense, Star-Lord - Stellar Shift, Magik - Stepping Discs, Hulk - HULK SMASH!, Hulk - Indestructible Guard, Hulk - World Breaker, Jeff the Land Shark - Hide and Seek, The Punisher - Culling Turret, The Punisher - Final Judgement, </text:p>
          </table:table-cell>
          <table:table-cell table:style-name="ce2" table:number-columns-repeated="23"/>
          <table:table-cell table:number-columns-repeated="16355"/>
        </table:table-row>
        <table:table-row table:style-name="ro1">
          <table:table-cell table:style-name="ce1" office:value-type="string" calcext:value-type="string">
            <text:p>MANTIS</text:p>
          </table:table-cell>
          <table:table-cell table:style-name="ce1" office:value-type="string" calcext:value-type="string">
            <text:p>Allied Inspiration</text:p>
          </table:table-cell>
          <table:table-cell table:style-name="ce1" office:value-type="string" calcext:value-type="string">
            <text:p><text:a xlink:href="https://r.res.easebar.com/pic/20241120/c43c7aff-d641-4b43-829b-ddf53bf2b3e7.png" xlink:type="simple">https://r.res.easebar.com/pic/20241120/c43c7aff-d641-4b43-829b-ddf53bf2b3e7.png</text:a></text:p>
          </table:table-cell>
          <table:table-cell table:style-name="ce1" office:value-type="string" calcext:value-type="string">
            <text:p>Consume Life Orbs to grant allies a Damage Boost</text:p>
          </table:table-cell>
          <table:table-cell table:style-name="ce1" office:value-type="string" calcext:value-type="string">
            <text:p><text:a xlink:href="https://www.marvelrivals.com/20241123/41360_1195661.html" xlink:type="simple">https://www.marvelrivals.com/20241123/41360_1195661.html</text:a></text:p>
          </table:table-cell>
          <table:table-cell table:style-name="ce2" table:number-columns-repeated="24"/>
          <table:table-cell table:number-columns-repeated="16355"/>
        </table:table-row>
        <table:table-row table:style-name="ro1">
          <table:table-cell table:style-name="ce1" office:value-type="string" calcext:value-type="string">
            <text:p>MANTIS</text:p>
          </table:table-cell>
          <table:table-cell table:style-name="ce1" office:value-type="string" calcext:value-type="string">
            <text:p>Natural Anger</text:p>
          </table:table-cell>
          <table:table-cell table:style-name="ce1" office:value-type="string" calcext:value-type="string">
            <text:p><text:a xlink:href="https://r.res.easebar.com/pic/20241120/a414ebec-b637-44c3-83dd-4db27749575b.png" xlink:type="simple">https://r.res.easebar.com/pic/20241120/a414ebec-b637-44c3-83dd-4db27749575b.png</text:a></text:p>
          </table:table-cell>
          <table:table-cell table:style-name="ce1" office:value-type="string" calcext:value-type="string">
            <text:p>Consume Life Orbs to grant herself a Damage Boost</text:p>
          </table:table-cell>
          <table:table-cell table:style-name="ce1" office:value-type="string" calcext:value-type="string">
            <text:p><text:a xlink:href="https://www.marvelrivals.com/20241123/41360_1195661.html" xlink:type="simple">https://www.marvelrivals.com/20241123/41360_1195661.html</text:a></text:p>
          </table:table-cell>
          <table:table-cell table:style-name="ce2" table:number-columns-repeated="24"/>
          <table:table-cell table:number-columns-repeated="16355"/>
        </table:table-row>
        <table:table-row table:style-name="ro1">
          <table:table-cell table:style-name="ce1" office:value-type="string" calcext:value-type="string">
            <text:p>MANTIS</text:p>
          </table:table-cell>
          <table:table-cell table:style-name="ce1" office:value-type="string" calcext:value-type="string">
            <text:p>Healing Flower</text:p>
          </table:table-cell>
          <table:table-cell table:style-name="ce1" office:value-type="string" calcext:value-type="string">
            <text:p><text:a xlink:href="https://r.res.easebar.com/pic/20241120/cd2771ec-d276-4a64-91fd-faa67a121da6.png" xlink:type="simple">https://r.res.easebar.com/pic/20241120/cd2771ec-d276-4a64-91fd-faa67a121da6.png</text:a></text:p>
          </table:table-cell>
          <table:table-cell table:style-name="ce1" office:value-type="string" calcext:value-type="string">
            <text:p>Consume Life Orbs to grant allies Healing Over Time</text:p>
          </table:table-cell>
          <table:table-cell table:style-name="ce1" office:value-type="string" calcext:value-type="string">
            <text:p><text:a xlink:href="https://www.marvelrivals.com/20241123/41360_1195661.html" xlink:type="simple">https://www.marvelrivals.com/20241123/41360_1195661.html</text:a></text:p>
          </table:table-cell>
          <table:table-cell table:style-name="ce2" table:number-columns-repeated="24"/>
          <table:table-cell table:number-columns-repeated="16355"/>
        </table:table-row>
        <table:table-row table:style-name="ro1">
          <table:table-cell table:style-name="ce1" office:value-type="string" calcext:value-type="string">
            <text:p>MANTIS</text:p>
          </table:table-cell>
          <table:table-cell table:style-name="ce1" office:value-type="string" calcext:value-type="string">
            <text:p>Nature's Favor</text:p>
          </table:table-cell>
          <table:table-cell table:style-name="ce1" office:value-type="string" calcext:value-type="string">
            <text:p><text:a xlink:href="https://r.res.easebar.com/pic/20241120/b921470f-e723-4129-847e-be24fd974552.png" xlink:type="simple">https://r.res.easebar.com/pic/20241120/b921470f-e723-4129-847e-be24fd974552.png</text:a></text:p>
          </table:table-cell>
          <table:table-cell table:style-name="ce1" office:value-type="string" calcext:value-type="string">
            <text:p>Receive a Movement Boost when not injured and Healing Over Time when consuming Life Orbs</text:p>
          </table:table-cell>
          <table:table-cell table:style-name="ce1" office:value-type="string" calcext:value-type="string">
            <text:p><text:a xlink:href="https://www.marvelrivals.com/20241123/41360_1195661.html" xlink:type="simple">https://www.marvelrivals.com/20241123/41360_1195661.html</text:a></text:p>
          </table:table-cell>
          <table:table-cell table:style-name="ce1" office:value-type="string" calcext:value-type="string">
            <text:p>Squirrel Girl - Squirrel Blockade, Black Widow - Electro-Plasma Explosion, Black Widow - Edge Dancer, Hawkeye - Hypersonic Arrow, Moon Knight - Ancient Ankh, Winter Soldier - Tainted Voltage, Winter Soldier - Bionic Hook, Spider-man - Get Over Here!, Hela - Soul Drainer, Storm - Omega Hurricane, Storm - Goddess Boost,</text:p>
          </table:table-cell>
          <table:table-cell table:style-name="ce2" table:number-columns-repeated="23"/>
          <table:table-cell table:number-columns-repeated="16355"/>
        </table:table-row>
        <table:table-row table:style-name="ro1">
          <table:table-cell table:style-name="ce1" office:value-type="string" calcext:value-type="string">
            <text:p>MANTIS</text:p>
          </table:table-cell>
          <table:table-cell table:style-name="ce1" office:value-type="string" calcext:value-type="string">
            <text:p>Heavenly Guardian</text:p>
          </table:table-cell>
          <table:table-cell table:style-name="ce1" office:value-type="string" calcext:value-type="string">
            <text:p><text:a xlink:href="https://r.res.easebar.com/pic/20250808/d0ee6b57-7475-4e57-a5c1-f02c357545d4.png" xlink:type="simple">https://r.res.easebar.com/pic/20250808/d0ee6b57-7475-4e57-a5c1-f02c357545d4.png</text:a></text:p>
          </table:table-cell>
          <table:table-cell table:style-name="ce1" office:value-type="string" calcext:value-type="string">
            <text:p>Mantis enhances Groot's wooden walls and Loki's Rune Stones with life energy. Groot can additionally unleash a Flower Wall, which, when in Flora Colossus state, restores health to random nearby allies and grants them Damage Reduction. Loki's Rune Stones grant allies within Regeneration Domain a Damage Boost</text:p>
          </table:table-cell>
          <table:table-cell table:style-name="ce1" office:value-type="string" calcext:value-type="string">
            <text:p><text:a xlink:href="https://www.marvelrivals.com/20241123/41360_1195661.html" xlink:type="simple">https://www.marvelrivals.com/20241123/41360_1195661.html</text:a></text:p>
          </table:table-cell>
          <table:table-cell table:style-name="ce2" table:number-columns-repeated="24"/>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Cyber-Web Cluster</text:p>
          </table:table-cell>
          <table:table-cell table:style-name="ce1" office:value-type="string" calcext:value-type="string">
            <text:p><text:a xlink:href="https://r.res.easebar.com/pic/20241120/2b24b421-99cf-4e20-b584-8f8e755911af.png" xlink:type="simple">https://r.res.easebar.com/pic/20241120/2b24b421-99cf-4e20-b584-8f8e755911af.png</text:a></text:p>
          </table:table-cell>
          <table:table-cell table:style-name="ce1" office:value-type="string" calcext:value-type="string">
            <text:p>Launch forward a Cyber-Web Cluster</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Spider-Sweeper</text:p>
          </table:table-cell>
          <table:table-cell table:style-name="ce1" office:value-type="string" calcext:value-type="string">
            <text:p><text:a xlink:href="https://r.res.easebar.com/pic/20241120/bcccc074-f210-4239-a6e1-05ae478859a6.png" xlink:type="simple">https://r.res.easebar.com/pic/20241120/bcccc074-f210-4239-a6e1-05ae478859a6.png</text:a></text:p>
          </table:table-cell>
          <table:table-cell table:style-name="ce1" office:value-type="string" calcext:value-type="string">
            <text:p>Enhance the SP//dr suit, launching up enemies in its path and deploying Arachno-Mines, Spider-Drones, and Cyber-Webs repeatedly</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Mantis - Soul Resurgence, Luna Snow - Fate of Both Worlds, Mantis - Spore Slumber, Luna Snow - Ice Arts, Angela - Assassin's Charge, Phoenix - Endsong Inferno, Phoenix - Telekinesis Burst, The Thing - Clobberin' Time, Namor - Horn of Proteus, Scarlet Witch - Reality Erasure, Scarlet Witch - Dark Seal, Spider-man - Spectacular Spin,</text:p>
          </table:table-cell>
          <table:table-cell table:style-name="ce2" table:number-columns-repeated="23"/>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Bionic Spider-Nest</text:p>
          </table:table-cell>
          <table:table-cell table:style-name="ce1" office:value-type="string" calcext:value-type="string">
            <text:p><text:a xlink:href="https://r.res.easebar.com/pic/20241120/b0a9458d-2a87-483c-a165-c362bf34d179.png" xlink:type="simple">https://r.res.easebar.com/pic/20241120/b0a9458d-2a87-483c-a165-c362bf34d179.png</text:a></text:p>
          </table:table-cell>
          <table:table-cell table:style-name="ce1" office:value-type="string" calcext:value-type="string">
            <text:p>Generate a Bionic Spider-Nest at a targeted area, periodically spawning Spider-Drones and creating Cyber-Webs. While in the Cyber-Web, Peni and allies gain Healing Over Time and a Movement Boost. Excess healing converts into Bonus Health. Spider-Drones inflict a Slow effect on hit, which can stack and refresh its effect period with multiple hits</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Phoenix - Endsong Inferno, Human Torch - Blazing Blast, Black Widow - Electro-Plasma Explosion, Iron Fist - Dragon's Defense, Hawkeye - Blast Arrow, Hawkeye - Hypersonic Arrow, Moon Knight - Hand of Khonshu, Namor - Horn of Proteus, Winter Soldier - Bionic Hook, Magik - Stepping Discs, Magik - Demon's Rage, Spider-man - Get Over Here!, Storm - Omega Hurricane,</text:p>
          </table:table-cell>
          <table:table-cell table:style-name="ce2" table:number-columns-repeated="23"/>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Arachno-Mine</text:p>
          </table:table-cell>
          <table:table-cell table:style-name="ce1" office:value-type="string" calcext:value-type="string">
            <text:p><text:a xlink:href="https://r.res.easebar.com/pic/20241120/a0c17f1d-4984-4961-af7a-515078b751a4.png" xlink:type="simple">https://r.res.easebar.com/pic/20241120/a0c17f1d-4984-4961-af7a-515078b751a4.png</text:a></text:p>
          </table:table-cell>
          <table:table-cell table:style-name="ce1" office:value-type="string" calcext:value-type="string">
            <text:p>Deploy Arachno-Mines that can be concealed within the confines of a Cyber-Web</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Iron Fist - Dragon's Defense, Namor - Aquatic Dominion, Invisible Woman -Psionic Vortex, Phoenix - Endsong Inferno, Star-Lord - Stellar Shift, Magik - Stepping Discs, Namor Storm - Omega Hurricane,</text:p>
          </table:table-cell>
          <table:table-cell table:style-name="ce1" office:value-type="string" calcext:value-type="string">
            <text:p>Peni Parker's Cyeber-Bond is extremely useful as a mobility tool that they rely on too heavily, it also will snap at the slightest inconvenience. When Peni has to use this ability they are already in a stressed position, so they can mess up by shooting the web too short which means it won't trigger the pullback, or geometry or an enemy stands in between the web and Peni it will snap leaving here vulnerable for at least 4 seconds (3 seconds for the cooldown if she is not still connected, and one second to shoot another Cyber-Bond. Either stun her, or Body Block her.</text:p>
          </table:table-cell>
          <table:table-cell table:style-name="ce2" table:number-columns-repeated="22"/>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Cyber-Bond</text:p>
          </table:table-cell>
          <table:table-cell table:style-name="ce1" office:value-type="string" calcext:value-type="string">
            <text:p><text:a xlink:href="https://r.res.easebar.com/pic/20241120/6146023c-4c46-4135-aba6-79eff6014d3b.png" xlink:type="simple">https://r.res.easebar.com/pic/20241120/6146023c-4c46-4135-aba6-79eff6014d3b.png</text:a></text:p>
          </table:table-cell>
          <table:table-cell table:style-name="ce1" office:value-type="string" calcext:value-type="string">
            <text:p>Shoot a web strand that links to the targeted area or Cyber-Web. If stretched too far, it will trigger a pullback</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Mantis - Spore Slumber, Luna Snow - Ice Arts, Phoenix - Telekinesis Burst, Emma Frost - Carbon Crush, Emma Frost - Crystal Kick, The Thing - Yancy Street Charge, Invisible Woman - Force Physics, Mister Fantastic - Distended Grip, Mister Fantastic - Flexible Elongation, Squirrel Girl - Squirrel Blockade,Wolverine - Last Stand, Wolverine - Feral Leap, Moon Knight - Ancient Ankh, Namor - Horn of Proteus, Winter Soldier - Trooper's Fist, Winter Soldier - Bionic Hook, Hela - Soul Drainer, Storm - Omega Hurricane,</text:p>
          </table:table-cell>
          <table:table-cell table:style-name="ce2" table:number-columns-repeated="23"/>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Wall Crawl</text:p>
          </table:table-cell>
          <table:table-cell table:style-name="ce1" office:value-type="string" calcext:value-type="string">
            <text:p><text:a xlink:href="https://r.res.easebar.com/pic/20241120/a812a9bf-dcaa-443a-870f-79586813d558.png" xlink:type="simple">https://r.res.easebar.com/pic/20241120/a812a9bf-dcaa-443a-870f-79586813d558.png</text:a></text:p>
          </table:table-cell>
          <table:table-cell table:style-name="ce1" office:value-type="string" calcext:value-type="string">
            <text:p>HOLD Jump to crawl on vertical surfaces</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Mantis - Spore Slumber, Luna Snow - Ice Arts, Phoenix - Telekinesis Burst, Emma Frost - Carbon Crush, Emma Frost - Crystal Kick, The Thing - Yancy Street Charge, Invisible Woman - Force Physics, Mister Fantastic - Distended Grip, Mister Fantastic - Flexible Elongation, Squirrel Girl - Squirrel Blockade, Iron Fist - Yat Jee Chung Kuen, Winter Soldier - Trooper's Fist, Winter Soldier - Bionic Hook, Spider-man - Get Over Here!, Hela - Soul Drainer, Storm - Omega Hurricane, Angela - Assassins Charge, Blade - Daywalker Dash, Mantis - Spore Slumber, Luna Snow - Ice Arts, Phoenix - Telekinesis Burst, Iron Fist - Yat Jee Chung Kuen, Winter Soldier - Trooper's Fist, Winter Soldier - Bionic Hook, Winter Soldier - Tainted Voltage, Spider-man - Get Over Here!, Hela - Soul Drainer, Storm - Omega Hurricane, Hulk - Incredible Leap,</text:p>
          </table:table-cell>
          <table:table-cell table:style-name="ce2" table:number-columns-repeated="23"/>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Cyber-Web Snare</text:p>
          </table:table-cell>
          <table:table-cell table:style-name="ce1" office:value-type="string" calcext:value-type="string">
            <text:p><text:a xlink:href="https://r.res.easebar.com/pic/20241120/036e9648-779e-48a7-ab8b-0e60bc0c5bd1.png" xlink:type="simple">https://r.res.easebar.com/pic/20241120/036e9648-779e-48a7-ab8b-0e60bc0c5bd1.png</text:a></text:p>
          </table:table-cell>
          <table:table-cell table:style-name="ce1" office:value-type="string" calcext:value-type="string">
            <text:p>Cast futuristic webbing that Immobilizes enemies or creates a Cyber-Web. While in the Cyber-Web, Peni and allies gain Healing Over Time and a Movement Boost. Excess healing converts into Bonus Health</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Emma Frost - Diamond Form, The Thing - Yancy Street Charge, Black Widow - Edge Dancer, Iron Fist - Dragon's Defense,</text:p>
          </table:table-cell>
          <table:table-cell table:style-name="ce2" table:number-columns-repeated="23"/>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ARMORIZED SPIDER-NEST</text:p>
          </table:table-cell>
          <table:table-cell table:style-name="ce1" office:value-type="string" calcext:value-type="string">
            <text:p><text:a xlink:href="https://r.res.easebar.com/pic/20250531/b2250054-6ee6-4b3e-8062-57ef69717686.png" xlink:type="simple">https://r.res.easebar.com/pic/20250531/b2250054-6ee6-4b3e-8062-57ef69717686.png</text:a></text:p>
          </table:table-cell>
          <table:table-cell table:style-name="ce1" office:value-type="string" calcext:value-type="string">
            <text:p>Enhanced by Rocket Raccoon, Peni Parkerâs Bionic Spider-Nest regularly generates strengthened armor packs. Each armor pack grants bonus health to the hero who picks up the pack. Peni Parker can deploy Bionic Spider-Nest and Armored Spider-Nest at the same time</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Phoenix - Endsong Inferno,</text:p>
          </table:table-cell>
          <table:table-cell table:style-name="ce2" table:number-columns-repeated="23"/>
          <table:table-cell table:number-columns-repeated="16355"/>
        </table:table-row>
        <table:table-row table:style-name="ro1">
          <table:table-cell table:style-name="ce1" office:value-type="string" calcext:value-type="string">
            <text:p>PENI PARKER</text:p>
          </table:table-cell>
          <table:table-cell table:style-name="ce1" office:value-type="string" calcext:value-type="string">
            <text:p>Cyber-Spiders</text:p>
          </table:table-cell>
          <table:table-cell table:style-name="ce1" office:value-type="string" calcext:value-type="string">
            <text:p><text:a xlink:href="https://r.res.easebar.com/pic/20260117/99aa4398-a29a-4cac-8935-2542feff88f6.png" xlink:type="simple">https://r.res.easebar.com/pic/20260117/99aa4398-a29a-4cac-8935-2542feff88f6.png</text:a></text:p>
          </table:table-cell>
          <table:table-cell table:style-name="ce1" office:value-type="string" calcext:value-type="string">
            <text:p>Peni Parker whips up a Sticky Bomb for Spider-Man! Prime it, then toss it before the timer's up for a blast that damages nearby enemies and attaches a Spider-Tracer to them. If not thrown in time, it explodes on Spider-Man, recharging a Web-Cluster shot and granting Bonus Health</text:p>
          </table:table-cell>
          <table:table-cell table:style-name="ce1" office:value-type="string" calcext:value-type="string">
            <text:p><text:a xlink:href="https://www.marvelrivals.com/20241123/41360_1195656.html" xlink:type="simple">https://www.marvelrivals.com/20241123/41360_1195656.html</text:a></text:p>
          </table:table-cell>
          <table:table-cell table:style-name="ce1" office:value-type="string" calcext:value-type="string">
            <text:p>Phoenix - Endsong Inferno,</text:p>
          </table:table-cell>
          <table:table-cell table:style-name="ce2" table:number-columns-repeated="23"/>
          <table:table-cell table:number-columns-repeated="16355"/>
        </table:table-row>
        <table:table-row table:style-name="ro1">
          <table:table-cell table:style-name="ce1" office:value-type="string" calcext:value-type="string">
            <text:p>THOR</text:p>
          </table:table-cell>
          <table:table-cell table:style-name="ce1" office:value-type="string" calcext:value-type="string">
            <text:p>Mjolnir Bash</text:p>
          </table:table-cell>
          <table:table-cell table:style-name="ce1" office:value-type="string" calcext:value-type="string">
            <text:p><text:a xlink:href="https://r.res.easebar.com/pic/20241120/5767ff16-bdb0-4e38-be05-f86ae73aef7e.png" xlink:type="simple">https://r.res.easebar.com/pic/20241120/5767ff16-bdb0-4e38-be05-f86ae73aef7e.png</text:a></text:p>
          </table:table-cell>
          <table:table-cell table:style-name="ce1" office:value-type="string" calcext:value-type="string">
            <text:p>Wield Mjolnir to strike enemies. When Awakened, Thor can launch lightning arc waves to deal damage</text:p>
          </table:table-cell>
          <table:table-cell table:style-name="ce1" office:value-type="string" calcext:value-type="string">
            <text:p><text:a xlink:href="https://www.marvelrivals.com/20241123/41360_1195657.html" xlink:type="simple">https://www.marvelrivals.com/20241123/41360_1195657.html</text:a></text:p>
          </table:table-cell>
          <table:table-cell table:style-name="ce1" office:value-type="string" calcext:value-type="string">
            <text:p>Hawkeye - Piercing Arrow, Hela - NightSword Thorn,</text:p>
          </table:table-cell>
          <table:table-cell table:style-name="ce2" table:number-columns-repeated="23"/>
          <table:table-cell table:number-columns-repeated="16355"/>
        </table:table-row>
        <table:table-row table:style-name="ro1">
          <table:table-cell table:style-name="ce1" office:value-type="string" calcext:value-type="string">
            <text:p>THOR</text:p>
          </table:table-cell>
          <table:table-cell table:style-name="ce1" office:value-type="string" calcext:value-type="string">
            <text:p>God of Thunder</text:p>
          </table:table-cell>
          <table:table-cell table:style-name="ce1" office:value-type="string" calcext:value-type="string">
            <text:p><text:a xlink:href="https://r.res.easebar.com/pic/20241120/68c2df37-4e4b-48be-af36-22a545b1cb8d.png" xlink:type="simple">https://r.res.easebar.com/pic/20241120/68c2df37-4e4b-48be-af36-22a545b1cb8d.png</text:a></text:p>
          </table:table-cell>
          <table:table-cell table:style-name="ce1" office:value-type="string" calcext:value-type="string">
            <text:p>Soar upwards and smite the ground after charging for a duration, inflicting damage on enemies within range</text:p>
          </table:table-cell>
          <table:table-cell table:style-name="ce1" office:value-type="string" calcext:value-type="string">
            <text:p><text:a xlink:href="https://www.marvelrivals.com/20241123/41360_1195657.html" xlink:type="simple">https://www.marvelrivals.com/20241123/41360_1195657.html</text:a></text:p>
          </table:table-cell>
          <table:table-cell table:style-name="ce1" office:value-type="string" calcext:value-type="string">
            <text:p>Mantis - Soul Resurgence, Luna Snow - Fate of Both Worlds, Angela - Shielded Stance, Blade - Scarlet Shroud, Mantis - Spore Slumber, Luna Snow - Ice Arts, Phoenix - Telekinesis Burst, Emma Frost - Mind's Aegis, Captain America - Living Legend, Magneto - Metallic Curtain, Doctor Strange - Shield of the Seraphim, Groot - Thornlash Wall, Groot - Ironwood Wall, Deadpool - Magical Unicorn Shield!, Invisible Woman - Guardian Shield, The Thing - Yancy Street Charge, Mister Fantastic - Reflexive Rubber,Wolverine - Regenerative Healing Factor, Cloak&amp;Dagger - Eternal Bond, Cloak&amp;Dagger - Dark Teleportation,Iron Fist - Dragon's Defense, Namor - Blessing of the Deep, Star-Lord - Stellar Shift, Scarlet Witch - Dark Seal, Magik - Stepping Discs, Hulk - HULK SMASH!, Hulk - Indestructible Guard, Hulk - World Breaker, Jeff the Land Shark - It's Jeff!, The Punisher - Culling Turret,</text:p>
          </table:table-cell>
          <table:table-cell table:style-name="ce2" table:number-columns-repeated="23"/>
          <table:table-cell table:number-columns-repeated="16355"/>
        </table:table-row>
        <table:table-row table:style-name="ro1">
          <table:table-cell table:style-name="ce1" office:value-type="string" calcext:value-type="string">
            <text:p>THOR</text:p>
          </table:table-cell>
          <table:table-cell table:style-name="ce1" office:value-type="string" calcext:value-type="string">
            <text:p>Storm Surge</text:p>
          </table:table-cell>
          <table:table-cell table:style-name="ce1" office:value-type="string" calcext:value-type="string">
            <text:p><text:a xlink:href="https://r.res.easebar.com/pic/20241120/b18044b4-d344-4400-95aa-1db27f994c9c.png" xlink:type="simple">https://r.res.easebar.com/pic/20241120/b18044b4-d344-4400-95aa-1db27f994c9c.png</text:a></text:p>
          </table:table-cell>
          <table:table-cell table:style-name="ce1" office:value-type="string" calcext:value-type="string">
            <text:p>Hold to spin Mjolnir before dashing forward and knocking back enemies</text:p>
          </table:table-cell>
          <table:table-cell table:style-name="ce1" office:value-type="string" calcext:value-type="string">
            <text:p><text:a xlink:href="https://www.marvelrivals.com/20241123/41360_1195657.html" xlink:type="simple">https://www.marvelrivals.com/20241123/41360_1195657.html</text:a></text:p>
          </table:table-cell>
          <table:table-cell table:style-name="ce1" office:value-type="string" calcext:value-type="string">
            <text:p>Mantis - Spore Slumber, Luna Snow - Ice Arts, Phoenix - Telekinesis Burst, Emma Frost - Carbon Crush, Emma Frost - Crystal Kick, Emma Frost - Diamond Form, The Thing - Yancy Street Charge, Black Cat - Mento-Fish, The Thing - Unyielding Will, Invisible Woman - Force Physics, Mister Fantastic - Distended Grip, Squirrel Girl - Squirrel Blockade, Black Widow - Edge Dancer, Wolverine - Last Stand, Wolverine - Feral Leap, Wolverine - Vicous Rampage, Iron Fist - Yat Jee Chung Kuen, Iron Fist - Dragon's Defense, Winter Soldier - Trooper's Fist, Winter Soldier - Bionic Hook, Spider-man - Get Over Here!, Hela - Soul Drainer, Storm - Omega Hurricane,</text:p>
          </table:table-cell>
          <table:table-cell table:style-name="ce2" table:number-columns-repeated="23"/>
          <table:table-cell table:number-columns-repeated="16355"/>
        </table:table-row>
        <table:table-row table:style-name="ro1">
          <table:table-cell table:style-name="ce1" office:value-type="string" calcext:value-type="string">
            <text:p>THOR</text:p>
          </table:table-cell>
          <table:table-cell table:style-name="ce1" office:value-type="string" calcext:value-type="string">
            <text:p>Lightning Realm</text:p>
          </table:table-cell>
          <table:table-cell table:style-name="ce1" office:value-type="string" calcext:value-type="string">
            <text:p><text:a xlink:href="https://r.res.easebar.com/pic/20241120/37d0dc4d-ca68-48f0-8e5a-d7511b05b02e.png" xlink:type="simple">https://r.res.easebar.com/pic/20241120/37d0dc4d-ca68-48f0-8e5a-d7511b05b02e.png</text:a></text:p>
          </table:table-cell>
          <table:table-cell table:style-name="ce1" office:value-type="string" calcext:value-type="string">
            <text:p>Summon lightning that restores Thorforce based on the number of hit enemies</text:p>
          </table:table-cell>
          <table:table-cell table:style-name="ce1" office:value-type="string" calcext:value-type="string">
            <text:p><text:a xlink:href="https://www.marvelrivals.com/20241123/41360_1195657.html" xlink:type="simple">https://www.marvelrivals.com/20241123/41360_1195657.html</text:a></text:p>
          </table:table-cell>
          <table:table-cell table:style-name="ce1" office:value-type="string" calcext:value-type="string">
            <text:p>Winter Soldier - Bionic Hook, Magik - Stepping Discs, Star-Lord - Stellar Shift, Spider-man - Get Over Here!, </text:p>
          </table:table-cell>
          <table:table-cell table:style-name="ce2" table:number-columns-repeated="23"/>
          <table:table-cell table:number-columns-repeated="16355"/>
        </table:table-row>
        <table:table-row table:style-name="ro1">
          <table:table-cell table:style-name="ce1" office:value-type="string" calcext:value-type="string">
            <text:p>THOR</text:p>
          </table:table-cell>
          <table:table-cell table:style-name="ce1" office:value-type="string" calcext:value-type="string">
            <text:p>Awakening Rune</text:p>
          </table:table-cell>
          <table:table-cell table:style-name="ce1" office:value-type="string" calcext:value-type="string">
            <text:p><text:a xlink:href="https://r.res.easebar.com/pic/20241120/77bc01c1-2967-4660-a899-87a8b6c3efe5.png" xlink:type="simple">https://r.res.easebar.com/pic/20241120/77bc01c1-2967-4660-a899-87a8b6c3efe5.png</text:a></text:p>
          </table:table-cell>
          <table:table-cell table:style-name="ce1" office:value-type="string" calcext:value-type="string">
            <text:p>Consume Thorforce to enter the Awakened state, granting Bonus Health and enhancing Mjolnir Bash</text:p>
          </table:table-cell>
          <table:table-cell table:style-name="ce1" office:value-type="string" calcext:value-type="string">
            <text:p><text:a xlink:href="https://www.marvelrivals.com/20241123/41360_1195657.html" xlink:type="simple">https://www.marvelrivals.com/20241123/41360_1195657.html</text:a></text:p>
          </table:table-cell>
          <table:table-cell table:style-name="ce1" office:value-type="string" calcext:value-type="string">
            <text:p>Phoenix - Endsong Inferno, 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THOR</text:p>
          </table:table-cell>
          <table:table-cell table:style-name="ce1" office:value-type="string" calcext:value-type="string">
            <text:p>Hammer Throw</text:p>
          </table:table-cell>
          <table:table-cell table:style-name="ce1" office:value-type="string" calcext:value-type="string">
            <text:p><text:a xlink:href="https://r.res.easebar.com/pic/20241120/06301e2b-a041-47cb-bf81-009ef24c3a3d.png" xlink:type="simple">https://r.res.easebar.com/pic/20241120/06301e2b-a041-47cb-bf81-009ef24c3a3d.png</text:a></text:p>
          </table:table-cell>
          <table:table-cell table:style-name="ce1" office:value-type="string" calcext:value-type="string">
            <text:p>Throw Mjolnir forward which then returns</text:p>
          </table:table-cell>
          <table:table-cell table:style-name="ce1" office:value-type="string" calcext:value-type="string">
            <text:p><text:a xlink:href="https://www.marvelrivals.com/20241123/41360_1195657.html" xlink:type="simple">https://www.marvelrivals.com/20241123/41360_1195657.html</text:a></text:p>
          </table:table-cell>
          <table:table-cell table:style-name="ce2" table:number-columns-repeated="24"/>
          <table:table-cell table:number-columns-repeated="16355"/>
        </table:table-row>
        <table:table-row table:style-name="ro1">
          <table:table-cell table:style-name="ce1" office:value-type="string" calcext:value-type="string">
            <text:p>THOR</text:p>
          </table:table-cell>
          <table:table-cell table:style-name="ce1" office:value-type="string" calcext:value-type="string">
            <text:p>Thorforce</text:p>
          </table:table-cell>
          <table:table-cell table:style-name="ce1" office:value-type="string" calcext:value-type="string">
            <text:p><text:a xlink:href="https://r.res.easebar.com/pic/20241120/78caf91d-ecd4-431c-9e43-31558f4e5fa9.png" xlink:type="simple">https://r.res.easebar.com/pic/20241120/78caf91d-ecd4-431c-9e43-31558f4e5fa9.png</text:a></text:p>
          </table:table-cell>
          <table:table-cell table:style-name="ce1" office:value-type="string" calcext:value-type="string">
            <text:p>Consume Thorforce to gain Bonus Health. Landing Mjolnir Bash on an enemy instantly recharges Thorforce</text:p>
          </table:table-cell>
          <table:table-cell table:style-name="ce1" office:value-type="string" calcext:value-type="string">
            <text:p><text:a xlink:href="https://www.marvelrivals.com/20241123/41360_1195657.html" xlink:type="simple">https://www.marvelrivals.com/20241123/41360_1195657.html</text:a></text:p>
          </table:table-cell>
          <table:table-cell table:style-name="ce2" table:number-columns-repeated="24"/>
          <table:table-cell table:number-columns-repeated="16355"/>
        </table:table-row>
        <table:table-row table:style-name="ro1">
          <table:table-cell table:style-name="ce1" office:value-type="string" calcext:value-type="string">
            <text:p>THOR</text:p>
          </table:table-cell>
          <table:table-cell table:style-name="ce1" office:value-type="string" calcext:value-type="string">
            <text:p>THUNDERSTRIKE PIKE</text:p>
          </table:table-cell>
          <table:table-cell table:style-name="ce1" office:value-type="string" calcext:value-type="string">
            <text:p><text:a xlink:href="https://r.res.easebar.com/pic/20250912/f3f25383-cb85-43c1-9479-e4d60a8dfcb7.png" xlink:type="simple">https://r.res.easebar.com/pic/20250912/f3f25383-cb85-43c1-9479-e4d60a8dfcb7.png</text:a></text:p>
          </table:table-cell>
          <table:table-cell table:style-name="ce1" office:value-type="string" calcext:value-type="string">
            <text:p>Angela shares fragments of her Ichors with Thor, empowering him to hurl a Thunder Spear that restores Thorforce for each enemy struck. Afterward, Thor can leap to the spear's explosion point, dealing a second wave of damage to all enemies within range</text:p>
          </table:table-cell>
          <table:table-cell table:style-name="ce1" office:value-type="string" calcext:value-type="string">
            <text:p><text:a xlink:href="https://www.marvelrivals.com/20241123/41360_1195657.html" xlink:type="simple">https://www.marvelrivals.com/20241123/41360_1195657.html</text:a></text:p>
          </table:table-cell>
          <table:table-cell table:style-name="ce2" table:number-columns-repeated="24"/>
          <table:table-cell table:number-columns-repeated="16355"/>
        </table:table-row>
        <table:table-row table:style-name="ro1">
          <table:table-cell table:style-name="ce1" office:value-type="string" calcext:value-type="string">
            <text:p>MAGNETO</text:p>
          </table:table-cell>
          <table:table-cell table:style-name="ce1" office:value-type="string" calcext:value-type="string">
            <text:p>Iron Volley</text:p>
          </table:table-cell>
          <table:table-cell table:style-name="ce1" office:value-type="string" calcext:value-type="string">
            <text:p><text:a xlink:href="https://r.res.easebar.com/pic/20241120/3401f142-e87e-40ad-8ff2-3a749a6f4984.png" xlink:type="simple">https://r.res.easebar.com/pic/20241120/3401f142-e87e-40ad-8ff2-3a749a6f4984.png</text:a></text:p>
          </table:table-cell>
          <table:table-cell table:style-name="ce1" office:value-type="string" calcext:value-type="string">
            <text:p>Fire a volley of magnetic orbs forward. The range of the resulting explosion increases based on distance flown</text:p>
          </table:table-cell>
          <table:table-cell table:style-name="ce1" office:value-type="string" calcext:value-type="string">
            <text:p><text:a xlink:href="https://www.marvelrivals.com/20241123/41360_1195655.html" xlink:type="simple">https://www.marvelrivals.com/20241123/41360_1195655.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MAGNETO</text:p>
          </table:table-cell>
          <table:table-cell table:style-name="ce1" office:value-type="string" calcext:value-type="string">
            <text:p>Meteor M</text:p>
          </table:table-cell>
          <table:table-cell table:style-name="ce1" office:value-type="string" calcext:value-type="string">
            <text:p><text:a xlink:href="https://r.res.easebar.com/pic/20241120/9cd870bb-e876-438b-9416-b230d990d3e8.png" xlink:type="simple">https://r.res.easebar.com/pic/20241120/9cd870bb-e876-438b-9416-b230d990d3e8.png</text:a></text:p>
          </table:table-cell>
          <table:table-cell table:style-name="ce1" office:value-type="string" calcext:value-type="string">
            <text:p>Draw in all materials around to forge an iron meteor that deals massive damage upon impact. Absorbing enemy projectiles can enhance the meteor's power, yet overloading will cause it to self-destruct</text:p>
          </table:table-cell>
          <table:table-cell table:style-name="ce1" office:value-type="string" calcext:value-type="string">
            <text:p><text:a xlink:href="https://www.marvelrivals.com/20241123/41360_1195655.html" xlink:type="simple">https://www.marvelrivals.com/20241123/41360_1195655.html</text:a></text:p>
          </table:table-cell>
          <table:table-cell table:style-name="ce1" office:value-type="string" calcext:value-type="string">
            <text:p>Angela - Shielded Stance, Blade - Scarlet Shroud, Mister Fantastic - Reflexive Rubber, Wolverine - Regenerative Healing Factor, Cloak&amp;Dagger - Dark Teleportation, Iron Fist - Yat Jee Chung Kuen, Iron Fist - Dragon's Defense, Namor - Blessing of the Deep, Namor - Aquatic Dominion?, Star-Lord - Stellar Shift, Scarlet Witch - Chaos Control, Scarlet Witch - Mystic Projection, Ultron - Encephalo-Ray, Invisible Woman - Orb Projection, Mister Fantastic - Stretch Punch, Black Widow - Red Room Rifle, Cloak&amp;Dagger - Darkforce Cloak, Iron Man - Unibeam, Iron Man - Unibeam (Armor OverDrive), Groot - Vine Strike, Magik - Stepping Discs, Hulk - HULK SMASH!, Hulk - Indestructible Guard, Hulk - World Breaker,</text:p>
          </table:table-cell>
          <table:table-cell table:style-name="ce2" table:number-columns-repeated="23"/>
          <table:table-cell table:number-columns-repeated="16355"/>
        </table:table-row>
        <table:table-row table:style-name="ro1">
          <table:table-cell table:style-name="ce1" office:value-type="string" calcext:value-type="string">
            <text:p>MAGNETO</text:p>
          </table:table-cell>
          <table:table-cell table:style-name="ce1" office:value-type="string" calcext:value-type="string">
            <text:p>Metallic Curtain</text:p>
          </table:table-cell>
          <table:table-cell table:style-name="ce1" office:value-type="string" calcext:value-type="string">
            <text:p><text:a xlink:href="https://r.res.easebar.com/pic/20241120/e834f5cc-ab25-4c64-8c84-4fc1e19f4f7c.png" xlink:type="simple">https://r.res.easebar.com/pic/20241120/e834f5cc-ab25-4c64-8c84-4fc1e19f4f7c.png</text:a></text:p>
          </table:table-cell>
          <table:table-cell table:style-name="ce1" office:value-type="string" calcext:value-type="string">
            <text:p>Change the magnetic field around to form a metallic curtain, blocking all incoming projectiles</text:p>
          </table:table-cell>
          <table:table-cell table:style-name="ce1" office:value-type="string" calcext:value-type="string">
            <text:p><text:a xlink:href="https://www.marvelrivals.com/20241123/41360_1195655.html" xlink:type="simple">https://www.marvelrivals.com/20241123/41360_1195655.html</text:a></text:p>
          </table:table-cell>
          <table:table-cell table:style-name="ce1" office:value-type="string" calcext:value-type="string">
            <text:p>Phoenix - Endsong Inferno, Ultron - Imperative: Patch, The Thing - Stone Haymaker, Mister Fantastic - Elastic Strength, Wolverine - Savage Claw, Iron Fist - Jeet Kune Do, Winter Soldier - Trooper's Fist, Magik - Soulsword, Magik - Eldritch Whirl, Magik - Demon's Rage,</text:p>
          </table:table-cell>
          <table:table-cell table:style-name="ce2" table:number-columns-repeated="23"/>
          <table:table-cell table:number-columns-repeated="16355"/>
        </table:table-row>
        <table:table-row table:style-name="ro1">
          <table:table-cell table:style-name="ce1" office:value-type="string" calcext:value-type="string">
            <text:p>MAGNETO</text:p>
          </table:table-cell>
          <table:table-cell table:style-name="ce1" office:value-type="string" calcext:value-type="string">
            <text:p>Metal Bulwark</text:p>
          </table:table-cell>
          <table:table-cell table:style-name="ce1" office:value-type="string" calcext:value-type="string">
            <text:p><text:a xlink:href="https://r.res.easebar.com/pic/20241120/3b28340a-e0b8-4801-98b5-32ca9934bb01.png" xlink:type="simple">https://r.res.easebar.com/pic/20241120/3b28340a-e0b8-4801-98b5-32ca9934bb01.png</text:a></text:p>
          </table:table-cell>
          <table:table-cell table:style-name="ce1" office:value-type="string" calcext:value-type="string">
            <text:p>Conjure a metal shield around a chosen ally. Damage taken will transform into rings on Magneto's back</text:p>
          </table:table-cell>
          <table:table-cell table:style-name="ce1" office:value-type="string" calcext:value-type="string">
            <text:p><text:a xlink:href="https://www.marvelrivals.com/20241123/41360_1195655.html" xlink:type="simple">https://www.marvelrivals.com/20241123/41360_1195655.html</text:a></text:p>
          </table:table-cell>
          <table:table-cell table:style-name="ce2" table:number-columns-repeated="24"/>
          <table:table-cell table:number-columns-repeated="16355"/>
        </table:table-row>
        <table:table-row table:style-name="ro1">
          <table:table-cell table:style-name="ce1" office:value-type="string" calcext:value-type="string">
            <text:p>MAGNETO</text:p>
          </table:table-cell>
          <table:table-cell table:style-name="ce1" office:value-type="string" calcext:value-type="string">
            <text:p>Iron Bulwark</text:p>
          </table:table-cell>
          <table:table-cell table:style-name="ce1" office:value-type="string" calcext:value-type="string">
            <text:p><text:a xlink:href="https://r.res.easebar.com/pic/20241120/02e7eb06-6242-43ba-bd8d-3ae7e124f774.png" xlink:type="simple">https://r.res.easebar.com/pic/20241120/02e7eb06-6242-43ba-bd8d-3ae7e124f774.png</text:a></text:p>
          </table:table-cell>
          <table:table-cell table:style-name="ce1" office:value-type="string" calcext:value-type="string">
            <text:p>Conjure an iron shield around himself. Damage taken will transform into rings on Magneto's back</text:p>
          </table:table-cell>
          <table:table-cell table:style-name="ce1" office:value-type="string" calcext:value-type="string">
            <text:p><text:a xlink:href="https://www.marvelrivals.com/20241123/41360_1195655.html" xlink:type="simple">https://www.marvelrivals.com/20241123/41360_1195655.html</text:a></text:p>
          </table:table-cell>
          <table:table-cell table:style-name="ce2" table:number-columns-repeated="24"/>
          <table:table-cell table:number-columns-repeated="16355"/>
        </table:table-row>
        <table:table-row table:style-name="ro1">
          <table:table-cell table:style-name="ce1" office:value-type="string" calcext:value-type="string">
            <text:p>MAGNETO</text:p>
          </table:table-cell>
          <table:table-cell table:style-name="ce1" office:value-type="string" calcext:value-type="string">
            <text:p>Mag-Cannon</text:p>
          </table:table-cell>
          <table:table-cell table:style-name="ce1" office:value-type="string" calcext:value-type="string">
            <text:p><text:a xlink:href="https://r.res.easebar.com/pic/20241120/fa0cf0a3-32cc-4104-8c74-4fe98a7b8628.png" xlink:type="simple">https://r.res.easebar.com/pic/20241120/fa0cf0a3-32cc-4104-8c74-4fe98a7b8628.png</text:a></text:p>
          </table:table-cell>
          <table:table-cell table:style-name="ce1" office:value-type="string" calcext:value-type="string">
            <text:p>Convert the iron rings on Magneto's back into a Mag-Cannon and launch a metallic mass forward. Higher stacks of rings increase damage, and full stacks knock back enemies</text:p>
          </table:table-cell>
          <table:table-cell table:style-name="ce1" office:value-type="string" calcext:value-type="string">
            <text:p><text:a xlink:href="https://www.marvelrivals.com/20241123/41360_1195655.html" xlink:type="simple">https://www.marvelrivals.com/20241123/41360_1195655.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The Thing - Unyielding Will, </text:p>
          </table:table-cell>
          <table:table-cell table:style-name="ce2" table:number-columns-repeated="23"/>
          <table:table-cell table:number-columns-repeated="16355"/>
        </table:table-row>
        <table:table-row table:style-name="ro1">
          <table:table-cell table:style-name="ce1" office:value-type="string" calcext:value-type="string">
            <text:p>MAGNETO</text:p>
          </table:table-cell>
          <table:table-cell table:style-name="ce1" office:value-type="string" calcext:value-type="string">
            <text:p>Magnetic Descent</text:p>
          </table:table-cell>
          <table:table-cell table:style-name="ce1" office:value-type="string" calcext:value-type="string">
            <text:p><text:a xlink:href="https://r.res.easebar.com/pic/20241120/d59de34f-22d9-459b-9469-8a2bb8ce714c.png" xlink:type="simple">https://r.res.easebar.com/pic/20241120/d59de34f-22d9-459b-9469-8a2bb8ce714c.png</text:a></text:p>
          </table:table-cell>
          <table:table-cell table:style-name="ce1" office:value-type="string" calcext:value-type="string">
            <text:p>Hold Space to fall slowly</text:p>
          </table:table-cell>
          <table:table-cell table:style-name="ce1" office:value-type="string" calcext:value-type="string">
            <text:p><text:a xlink:href="https://www.marvelrivals.com/20241123/41360_1195655.html" xlink:type="simple">https://www.marvelrivals.com/20241123/41360_1195655.html</text:a></text:p>
          </table:table-cell>
          <table:table-cell table:style-name="ce2" table:number-columns-repeated="24"/>
          <table:table-cell table:number-columns-repeated="16355"/>
        </table:table-row>
        <table:table-row table:style-name="ro1">
          <table:table-cell table:style-name="ce1" office:value-type="string" calcext:value-type="string">
            <text:p>MAGNETO</text:p>
          </table:table-cell>
          <table:table-cell table:style-name="ce1" office:value-type="string" calcext:value-type="string">
            <text:p>ROYAL BLADE</text:p>
          </table:table-cell>
          <table:table-cell table:style-name="ce1" office:value-type="string" calcext:value-type="string">
            <text:p><text:a xlink:href="https://r.res.easebar.com/pic/20251115/76aaa2b5-ba1a-44b7-a584-82b904800075.png" xlink:type="simple">https://r.res.easebar.com/pic/20251115/76aaa2b5-ba1a-44b7-a584-82b904800075.png</text:a></text:p>
          </table:table-cell>
          <table:table-cell table:style-name="ce1" office:value-type="string" calcext:value-type="string">
            <text:p>Gambit charges Magneto's greatsword with kinetic energy. When Magneto activates this ability, Iron Volley is replaced with Ace Greatsword, which detonates upon striking enemies. The explosion leaves residual kinetic energy within the target, inflicting secondary damage after a brief delay</text:p>
          </table:table-cell>
          <table:table-cell table:style-name="ce1" office:value-type="string" calcext:value-type="string">
            <text:p><text:a xlink:href="https://www.marvelrivals.com/20241123/41360_1195655.html" xlink:type="simple">https://www.marvelrivals.com/20241123/41360_1195655.html</text:a></text:p>
          </table:table-cell>
          <table:table-cell table:style-name="ce2" table:number-columns-repeated="24"/>
          <table:table-cell table:number-columns-repeated="16355"/>
        </table:table-row>
        <table:table-row table:style-name="ro1">
          <table:table-cell table:style-name="ce1" office:value-type="string" calcext:value-type="string">
            <text:p>VENOM</text:p>
          </table:table-cell>
          <table:table-cell table:style-name="ce1" office:value-type="string" calcext:value-type="string">
            <text:p>Dark Predation</text:p>
          </table:table-cell>
          <table:table-cell table:style-name="ce1" office:value-type="string" calcext:value-type="string">
            <text:p><text:a xlink:href="https://r.res.easebar.com/pic/20241120/bc30fb5a-7d0a-4acb-9cc7-68d9ce23471f.png" xlink:type="simple">https://r.res.easebar.com/pic/20241120/bc30fb5a-7d0a-4acb-9cc7-68d9ce23471f.png</text:a></text:p>
          </table:table-cell>
          <table:table-cell table:style-name="ce1" office:value-type="string" calcext:value-type="string">
            <text:p>Unleash tentacles forward to attack enemies</text:p>
          </table:table-cell>
          <table:table-cell table:style-name="ce1" office:value-type="string" calcext:value-type="string">
            <text:p><text:a xlink:href="https://www.marvelrivals.com/20241123/41360_1195654.html" xlink:type="simple">https://www.marvelrivals.com/20241123/41360_1195654.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VENOM</text:p>
          </table:table-cell>
          <table:table-cell table:style-name="ce1" office:value-type="string" calcext:value-type="string">
            <text:p>Feast of the Abyss</text:p>
          </table:table-cell>
          <table:table-cell table:style-name="ce1" office:value-type="string" calcext:value-type="string">
            <text:p><text:a xlink:href="https://r.res.easebar.com/pic/20241120/8d6946a4-fdcd-4260-a36b-4d6367c22910.png" xlink:type="simple">https://r.res.easebar.com/pic/20241120/8d6946a4-fdcd-4260-a36b-4d6367c22910.png</text:a></text:p>
          </table:table-cell>
          <table:table-cell table:style-name="ce1" office:value-type="string" calcext:value-type="string">
            <text:p>Burrow underground for free movement. After a duration or by left-clicking, devour enemies above to deal damage based on the enemy's current health and generate equivalent Bonus Health. Devoured enemies suffer Reduced Healing</text:p>
          </table:table-cell>
          <table:table-cell table:style-name="ce1" office:value-type="string" calcext:value-type="string">
            <text:p><text:a xlink:href="https://www.marvelrivals.com/20241123/41360_1195654.html" xlink:type="simple">https://www.marvelrivals.com/20241123/41360_1195654.html</text:a></text:p>
          </table:table-cell>
          <table:table-cell table:style-name="ce1" office:value-type="string" calcext:value-type="string">
            <text:p>Mantis - Soul Resurgence, Luna Snow - Fate of Both Worlds, Blade - Scarlet Shroud, Phoenix - Endsong Inferno, Ultron - Rage of Ultron, Mister Fantastic - Reflexive Rubber, Cloak&amp;Dagger - Eternal Bond, Cloak&amp;Dagger - Dark Teleportation, Iron Fist - Dragon's Defense, Moon Knight - Hand of Khonshu, Namor - Blessing of the Deep, Namor - Horn of Proteus, Scarlet Witch - Reality Erasure, Scarlet Witch - Dark Seal, Scarlet Witch - Mystic Projection, Magik - Stepping Discs, Star-Lord - Stellar Shift, Hulk - HULK SMASH!, Hulk - Indestructible Guard, Hulk - World Breaker, Jeff the Land Shark - It's Jeff!, The Punisher - Culling Turret?,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VENOM</text:p>
          </table:table-cell>
          <table:table-cell table:style-name="ce1" office:value-type="string" calcext:value-type="string">
            <text:p>Venom Swing</text:p>
          </table:table-cell>
          <table:table-cell table:style-name="ce1" office:value-type="string" calcext:value-type="string">
            <text:p><text:a xlink:href="https://r.res.easebar.com/pic/20241120/e3d5d3b0-9605-4bdd-8e7d-5b10a96f6fdc.png" xlink:type="simple">https://r.res.easebar.com/pic/20241120/e3d5d3b0-9605-4bdd-8e7d-5b10a96f6fdc.png</text:a></text:p>
          </table:table-cell>
          <table:table-cell table:style-name="ce1" office:value-type="string" calcext:value-type="string">
            <text:p>Launch webbing forward, allowing for a singular swing in the desired direction</text:p>
          </table:table-cell>
          <table:table-cell table:style-name="ce1" office:value-type="string" calcext:value-type="string">
            <text:p><text:a xlink:href="https://www.marvelrivals.com/20241123/41360_1195654.html" xlink:type="simple">https://www.marvelrivals.com/20241123/41360_1195654.html</text:a></text:p>
          </table:table-cell>
          <table:table-cell table:style-name="ce1" office:value-type="string" calcext:value-type="string">
            <text:p>Mantis - Spore Slumber, Luna Snow - Ice Arts, Phoenix - Telekinesis Burst, Emma Frost - Carbon Crush, The Thing - Yancy Street Charge, Black Cat - Mento-Fish, Invisible Woman - Force Physics, Mister Fantastic - Distended Grip, Squirrel Girl - Squirrel Blockade, Black Widow - Edge Dancer, Wolverine - Last Stand, Wolverine - Feral Leap, Iron Fist - Yat Jee Chung Kuen, Moon Knight - Ancient Ankh, Winter Soldier - Trooper's Fist, Winter Soldier - Bionic Hook, Hela - Soul Drainer,</text:p>
          </table:table-cell>
          <table:table-cell table:style-name="ce2" table:number-columns-repeated="23"/>
          <table:table-cell table:number-columns-repeated="16355"/>
        </table:table-row>
        <table:table-row table:style-name="ro1">
          <table:table-cell table:style-name="ce1" office:value-type="string" calcext:value-type="string">
            <text:p>VENOM</text:p>
          </table:table-cell>
          <table:table-cell table:style-name="ce1" office:value-type="string" calcext:value-type="string">
            <text:p>Symbiotic Resilience</text:p>
          </table:table-cell>
          <table:table-cell table:style-name="ce1" office:value-type="string" calcext:value-type="string">
            <text:p><text:a xlink:href="https://r.res.easebar.com/pic/20241120/6cbe943b-e6aa-46d3-9c54-bff3d7264fcc.png" xlink:type="simple">https://r.res.easebar.com/pic/20241120/6cbe943b-e6aa-46d3-9c54-bff3d7264fcc.png</text:a></text:p>
          </table:table-cell>
          <table:table-cell table:style-name="ce1" office:value-type="string" calcext:value-type="string">
            <text:p>Generate Bonus Health against damage. The lower Venom's Health, the greater the Bonus Health generated</text:p>
          </table:table-cell>
          <table:table-cell table:style-name="ce1" office:value-type="string" calcext:value-type="string">
            <text:p><text:a xlink:href="https://www.marvelrivals.com/20241123/41360_1195654.html" xlink:type="simple">https://www.marvelrivals.com/20241123/41360_1195654.html</text:a></text:p>
          </table:table-cell>
          <table:table-cell table:style-name="ce1" office:value-type="string" calcext:value-type="string">
            <text:p>Hulk - Radioactive Lockdown, Phoenix - Endsong Inferno,</text:p>
          </table:table-cell>
          <table:table-cell table:style-name="ce2" table:number-columns-repeated="23"/>
          <table:table-cell table:number-columns-repeated="16355"/>
        </table:table-row>
        <table:table-row table:style-name="ro1">
          <table:table-cell table:style-name="ce1" office:value-type="string" calcext:value-type="string">
            <text:p>VENOM</text:p>
          </table:table-cell>
          <table:table-cell table:style-name="ce1" office:value-type="string" calcext:value-type="string">
            <text:p>Frenzied Arrival</text:p>
          </table:table-cell>
          <table:table-cell table:style-name="ce1" office:value-type="string" calcext:value-type="string">
            <text:p><text:a xlink:href="https://r.res.easebar.com/pic/20241120/bd5d9e69-ca07-465d-aafa-c7225d6a6f7f.png" xlink:type="simple">https://r.res.easebar.com/pic/20241120/bd5d9e69-ca07-465d-aafa-c7225d6a6f7f.png</text:a></text:p>
          </table:table-cell>
          <table:table-cell table:style-name="ce1" office:value-type="string" calcext:value-type="string">
            <text:p>Dash to the target location from a certain height. Upon landing, damage nearby enemies, launching them up toward the landing point</text:p>
          </table:table-cell>
          <table:table-cell table:style-name="ce1" office:value-type="string" calcext:value-type="string">
            <text:p><text:a xlink:href="https://www.marvelrivals.com/20241123/41360_1195654.html" xlink:type="simple">https://www.marvelrivals.com/20241123/41360_1195654.html</text:a></text:p>
          </table:table-cell>
          <table:table-cell table:style-name="ce1" office:value-type="string" calcext:value-type="string">
            <text:p>Angela - Assassin's Charge</text:p>
          </table:table-cell>
          <table:table-cell table:style-name="ce2" table:number-columns-repeated="23"/>
          <table:table-cell table:number-columns-repeated="16355"/>
        </table:table-row>
        <table:table-row table:style-name="ro1">
          <table:table-cell table:style-name="ce1" office:value-type="string" calcext:value-type="string">
            <text:p>VENOM</text:p>
          </table:table-cell>
          <table:table-cell table:style-name="ce1" office:value-type="string" calcext:value-type="string">
            <text:p>Cellular Corrosion</text:p>
          </table:table-cell>
          <table:table-cell table:style-name="ce1" office:value-type="string" calcext:value-type="string">
            <text:p><text:a xlink:href="https://r.res.easebar.com/pic/20241120/67d47ae7-0b50-42ec-98d4-b704e68e8c0d.png" xlink:type="simple">https://r.res.easebar.com/pic/20241120/67d47ae7-0b50-42ec-98d4-b704e68e8c0d.png</text:a></text:p>
          </table:table-cell>
          <table:table-cell table:style-name="ce1" office:value-type="string" calcext:value-type="string">
            <text:p>Unleash tentacles to Slow enemies within reach. Enemies unable to break free in time will suffer damage</text:p>
          </table:table-cell>
          <table:table-cell table:style-name="ce1" office:value-type="string" calcext:value-type="string">
            <text:p><text:a xlink:href="https://www.marvelrivals.com/20241123/41360_1195654.html" xlink:type="simple">https://www.marvelrivals.com/20241123/41360_1195654.html</text:a></text:p>
          </table:table-cell>
          <table:table-cell table:style-name="ce1" office:value-type="string" calcext:value-type="string">
            <text:p>Magik - Stepping Discs, Iron Fist - Dragon's Defense,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VENOM</text:p>
          </table:table-cell>
          <table:table-cell table:style-name="ce1" office:value-type="string" calcext:value-type="string">
            <text:p>Alien Biology</text:p>
          </table:table-cell>
          <table:table-cell table:style-name="ce1" office:value-type="string" calcext:value-type="string">
            <text:p><text:a xlink:href="https://r.res.easebar.com/pic/20241120/5ac60cab-09a4-4f2a-8236-75b82ed43c39.png" xlink:type="simple">https://r.res.easebar.com/pic/20241120/5ac60cab-09a4-4f2a-8236-75b82ed43c39.png</text:a></text:p>
          </table:table-cell>
          <table:table-cell table:style-name="ce1" office:value-type="string" calcext:value-type="string">
            <text:p>Press Space to wall crawl, and while crawling, left-click to sprint</text:p>
          </table:table-cell>
          <table:table-cell table:style-name="ce1" office:value-type="string" calcext:value-type="string">
            <text:p><text:a xlink:href="https://www.marvelrivals.com/20241123/41360_1195654.html" xlink:type="simple">https://www.marvelrivals.com/20241123/41360_1195654.html</text:a></text:p>
          </table:table-cell>
          <table:table-cell table:style-name="ce1" office:value-type="string" calcext:value-type="string">
            <text:p>Mantis - Spore Slumber, Luna Snow - Ice Arts, Phoenix - Telekinesis Burst, Emma Frost - Carbon Crush, Emma Frost - Crystal Kick, The Thing - Yancy Street Charge, Invisible Woman - Force Physics, Mister Fantastic - Distended Grip, Mister Fantastic - Flexible Elongation, Squirrel Girl - Squirrel Blockade, Iron Fist - Yat Jee Chung Kuen, Winter Soldier - Trooper's Fist, Winter Soldier - Bionic Hook, Spider-man - Get Over Here!, Hela - Soul Drainer, Storm - Omega Hurricane, Angela - Assassins Charge, Blade - Daywalker Dash, Winter Soldier - Tainted Voltage,Hulk - Incredible Leap,</text:p>
          </table:table-cell>
          <table:table-cell table:style-name="ce2" table:number-columns-repeated="23"/>
          <table:table-cell table:number-columns-repeated="16355"/>
        </table:table-row>
        <table:table-row table:style-name="ro1">
          <table:table-cell table:style-name="ce1" office:value-type="string" calcext:value-type="string">
            <text:p>VENOM</text:p>
          </table:table-cell>
          <table:table-cell table:style-name="ce1" office:value-type="string" calcext:value-type="string">
            <text:p>HEALING TENDRILS</text:p>
          </table:table-cell>
          <table:table-cell table:style-name="ce1" office:value-type="string" calcext:value-type="string">
            <text:p><text:a xlink:href="https://r.res.easebar.com/pic/20250531/1ad044d0-1743-4ae9-8a7c-1cd92bef69a1.png" xlink:type="simple">https://r.res.easebar.com/pic/20250531/1ad044d0-1743-4ae9-8a7c-1cd92bef69a1.png</text:a></text:p>
          </table:table-cell>
          <table:table-cell table:style-name="ce1" office:value-type="string" calcext:value-type="string">
            <text:p>Venom shares his symbiotes with Jeff and Hela. Jeff's Guardian of the Deep links with nearby allies, providing continuous healing. When the effect ends, it releases a powerful healing burst, converting any excess into Bonus Health. Hela's Hel Tendrils unleash a symbiotic Hel Sphere. Upon hit, it pulls nearby enemies toward the impact point and links them, slowing enemies that try to escape.</text:p>
          </table:table-cell>
          <table:table-cell table:style-name="ce1" office:value-type="string" calcext:value-type="string">
            <text:p><text:a xlink:href="https://www.marvelrivals.com/20241123/41360_1195654.html" xlink:type="simple">https://www.marvelrivals.com/20241123/41360_1195654.html</text:a></text:p>
          </table:table-cell>
          <table:table-cell table:style-name="ce2" table:number-columns-repeated="24"/>
          <table:table-cell table:number-columns-repeated="16355"/>
        </table:table-row>
        <table:table-row table:style-name="ro1">
          <table:table-cell table:style-name="ce1" office:value-type="string" calcext:value-type="string">
            <text:p>GROOT</text:p>
          </table:table-cell>
          <table:table-cell table:style-name="ce1" office:value-type="string" calcext:value-type="string">
            <text:p>Vine Strike</text:p>
          </table:table-cell>
          <table:table-cell table:style-name="ce1" office:value-type="string" calcext:value-type="string">
            <text:p><text:a xlink:href="https://r.res.easebar.com/pic/20241120/b1e08b7f-2364-45cb-9ebc-6b73214d8529.png" xlink:type="simple">https://r.res.easebar.com/pic/20241120/b1e08b7f-2364-45cb-9ebc-6b73214d8529.png</text:a></text:p>
          </table:table-cell>
          <table:table-cell table:style-name="ce1" office:value-type="string" calcext:value-type="string">
            <text:p>Launch vines to attack enemies</text:p>
          </table:table-cell>
          <table:table-cell table:style-name="ce1" office:value-type="string" calcext:value-type="string">
            <text:p><text:a xlink:href="https://www.marvelrivals.com/20241123/41360_1195653.html" xlink:type="simple">https://www.marvelrivals.com/20241123/41360_1195653.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 Iron Fist - Dragon's Defense, Hawkeye - Piercing Arrow,Hawkeye - Ronin Slash,</text:p>
          </table:table-cell>
          <table:table-cell table:style-name="ce2" table:number-columns-repeated="23"/>
          <table:table-cell table:number-columns-repeated="16355"/>
        </table:table-row>
        <table:table-row table:style-name="ro1">
          <table:table-cell table:style-name="ce1" office:value-type="string" calcext:value-type="string">
            <text:p>GROOT</text:p>
          </table:table-cell>
          <table:table-cell table:style-name="ce1" office:value-type="string" calcext:value-type="string">
            <text:p>Strangling Prison</text:p>
          </table:table-cell>
          <table:table-cell table:style-name="ce1" office:value-type="string" calcext:value-type="string">
            <text:p><text:a xlink:href="https://r.res.easebar.com/pic/20241120/72a68f64-ac6b-4b4d-a6c2-a96d8ba932f2.png" xlink:type="simple">https://r.res.easebar.com/pic/20241120/72a68f64-ac6b-4b4d-a6c2-a96d8ba932f2.png</text:a></text:p>
          </table:table-cell>
          <table:table-cell table:style-name="ce1" office:value-type="string" calcext:value-type="string">
            <text:p>Fire a massive vine cluster that pulls nearby enemies to its center and Imprisons them</text:p>
          </table:table-cell>
          <table:table-cell table:style-name="ce1" office:value-type="string" calcext:value-type="string">
            <text:p><text:a xlink:href="https://www.marvelrivals.com/20241123/41360_1195653.html" xlink:type="simple">https://www.marvelrivals.com/20241123/41360_1195653.html</text:a></text:p>
          </table:table-cell>
          <table:table-cell table:style-name="ce1" office:value-type="string" calcext:value-type="string">
            <text:p>Mantis - Soul Resurgence, Luna Snow - Fate of Both Worlds, Mantis - Spore Slumber, Luna Snow - Ice Arts, Blade - Scarlet Shroud, Phoenix - Telekinesis Burst, Ultron - Rage of Ultron, The Thing - Yancy Street Charge, Emma Frost - Mind's Aegis, Captain America - Living Legend, Magneto - Metallic Curtain, Doctor Strange - Shield of the Seraphim, Groot - Thornlash Wall, Groot - Ironwood Wall, Deadpool - Magical Unicorn Shield!, Invisible Woman - Guardian Shield, Mister Fantastic - Reflexive Rubber, Black Widow - Edge Dancer, Cloak&amp;Dagger - Eternal Bond, Cloak&amp;Dagger - Dark Teleportation, Psylocke - Dance of the Butterfly, Namor - Blessing of the Deep, Star-Lord - Stellar Shift, Scarlet Witch - Reality Erasure, Scarlet Witch - Mystic Projection, Scarlet Witch - Dark Seal, Magik - Stepping Discs, Iron Fist - Dragon's Defense, Hela - Soul Drainer, Hulk - HULK SMASH!, Hulk - Indestructible Guard, Hulk - World Breaker, Jeff the Land Shark - It's Jeff!, The Punisher - Culling Turret, The Punisher - Final Judgement,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GROOT</text:p>
          </table:table-cell>
          <table:table-cell table:style-name="ce1" office:value-type="string" calcext:value-type="string">
            <text:p>Thornlash Wall</text:p>
          </table:table-cell>
          <table:table-cell table:style-name="ce1" office:value-type="string" calcext:value-type="string">
            <text:p><text:a xlink:href="https://r.res.easebar.com/pic/20241120/22175d18-5214-4a59-a1a2-b20d042ac46c.png" xlink:type="simple">https://r.res.easebar.com/pic/20241120/22175d18-5214-4a59-a1a2-b20d042ac46c.png</text:a></text:p>
          </table:table-cell>
          <table:table-cell table:style-name="ce1" office:value-type="string" calcext:value-type="string">
            <text:p>Target a location and grow a Thornlash Wall. When Awakened, it strikes nearby enemies attacked by Groot and his allies</text:p>
          </table:table-cell>
          <table:table-cell table:style-name="ce1" office:value-type="string" calcext:value-type="string">
            <text:p><text:a xlink:href="https://www.marvelrivals.com/20241123/41360_1195653.html" xlink:type="simple">https://www.marvelrivals.com/20241123/41360_1195653.html</text:a></text:p>
          </table:table-cell>
          <table:table-cell table:style-name="ce1" office:value-type="string" calcext:value-type="string">
            <text:p>Phoenix - Endsong Inferno, Ultron - Imperative: Patch, Hawkeye - Blast Arrow, Moon Knight - Hand of Khonshu, Human Torch - Pyro-Prison, Storm - Omega Hurricane,</text:p>
          </table:table-cell>
          <table:table-cell table:style-name="ce2" table:number-columns-repeated="23"/>
          <table:table-cell table:number-columns-repeated="16355"/>
        </table:table-row>
        <table:table-row table:style-name="ro1">
          <table:table-cell table:style-name="ce1" office:value-type="string" calcext:value-type="string">
            <text:p>GROOT</text:p>
          </table:table-cell>
          <table:table-cell table:style-name="ce1" office:value-type="string" calcext:value-type="string">
            <text:p>Ironwood Wall</text:p>
          </table:table-cell>
          <table:table-cell table:style-name="ce1" office:value-type="string" calcext:value-type="string">
            <text:p><text:a xlink:href="https://r.res.easebar.com/pic/20241120/6b671ac4-7312-4702-8062-5f3d93cdbcd4.png" xlink:type="simple">https://r.res.easebar.com/pic/20241120/6b671ac4-7312-4702-8062-5f3d93cdbcd4.png</text:a></text:p>
          </table:table-cell>
          <table:table-cell table:style-name="ce1" office:value-type="string" calcext:value-type="string">
            <text:p>Target a location and grow an Ironwood Wall. When the wall is Awakened, damage dealt by Groot and nearby allies grants Groot Bonus Health. Groot gains Unstoppable while near Ironwood Walls</text:p>
          </table:table-cell>
          <table:table-cell table:style-name="ce1" office:value-type="string" calcext:value-type="string">
            <text:p><text:a xlink:href="https://www.marvelrivals.com/20241123/41360_1195653.html" xlink:type="simple">https://www.marvelrivals.com/20241123/41360_1195653.html</text:a></text:p>
          </table:table-cell>
          <table:table-cell table:style-name="ce1" office:value-type="string" calcext:value-type="string">
            <text:p>Phoenix - Endsong Inferno, Ultron - Imperative: Patch, Hawkeye - Blast Arrow, Moon Knight - Hand of Khonshu, Human Torch - Pyro-Prison, Storm - Omega Hurricane,</text:p>
          </table:table-cell>
          <table:table-cell table:style-name="ce2" table:number-columns-repeated="23"/>
          <table:table-cell table:number-columns-repeated="16355"/>
        </table:table-row>
        <table:table-row table:style-name="ro1">
          <table:table-cell table:style-name="ce1" office:value-type="string" calcext:value-type="string">
            <text:p>GROOT</text:p>
          </table:table-cell>
          <table:table-cell table:style-name="ce1" office:value-type="string" calcext:value-type="string">
            <text:p>Spore Bomb</text:p>
          </table:table-cell>
          <table:table-cell table:style-name="ce1" office:value-type="string" calcext:value-type="string">
            <text:p><text:a xlink:href="https://r.res.easebar.com/pic/20241120/bba9fe65-f6c7-46de-807c-0ba36c78e505.png" xlink:type="simple">https://r.res.easebar.com/pic/20241120/bba9fe65-f6c7-46de-807c-0ba36c78e505.png</text:a></text:p>
          </table:table-cell>
          <table:table-cell table:style-name="ce1" office:value-type="string" calcext:value-type="string">
            <text:p>Throw an explosive Spore Bomb that splits into multiple small explosive spores</text:p>
          </table:table-cell>
          <table:table-cell table:style-name="ce1" office:value-type="string" calcext:value-type="string">
            <text:p><text:a xlink:href="https://www.marvelrivals.com/20241123/41360_1195653.html" xlink:type="simple">https://www.marvelrivals.com/20241123/41360_1195653.html</text:a></text:p>
          </table:table-cell>
          <table:table-cell table:style-name="ce2" table:number-columns-repeated="24"/>
          <table:table-cell table:number-columns-repeated="16355"/>
        </table:table-row>
        <table:table-row table:style-name="ro1">
          <table:table-cell table:style-name="ce1" office:value-type="string" calcext:value-type="string">
            <text:p>GROOT</text:p>
          </table:table-cell>
          <table:table-cell table:style-name="ce1" office:value-type="string" calcext:value-type="string">
            <text:p>Flora Colossus</text:p>
          </table:table-cell>
          <table:table-cell table:style-name="ce1" office:value-type="string" calcext:value-type="string">
            <text:p><text:a xlink:href="https://r.res.easebar.com/pic/20241120/9a004657-cc4f-47c9-8f81-a4d3471a03bb.png" xlink:type="simple">https://r.res.easebar.com/pic/20241120/9a004657-cc4f-47c9-8f81-a4d3471a03bb.png</text:a></text:p>
          </table:table-cell>
          <table:table-cell table:style-name="ce1" office:value-type="string" calcext:value-type="string">
            <text:p>Wooden walls near Groot will Awaken, activating an extra effect. Right-click while building a wooden wall to continue building additional walls</text:p>
          </table:table-cell>
          <table:table-cell table:style-name="ce1" office:value-type="string" calcext:value-type="string">
            <text:p><text:a xlink:href="https://www.marvelrivals.com/20241123/41360_1195653.html" xlink:type="simple">https://www.marvelrivals.com/20241123/41360_1195653.html</text:a></text:p>
          </table:table-cell>
          <table:table-cell table:style-name="ce2" table:number-columns-repeated="24"/>
          <table:table-cell table:number-columns-repeated="16355"/>
        </table:table-row>
        <table:table-row table:style-name="ro1">
          <table:table-cell table:style-name="ce1" office:value-type="string" calcext:value-type="string">
            <text:p>GROOT</text:p>
          </table:table-cell>
          <table:table-cell table:style-name="ce1" office:value-type="string" calcext:value-type="string">
            <text:p>Furious Flora</text:p>
          </table:table-cell>
          <table:table-cell table:style-name="ce1" office:value-type="string" calcext:value-type="string">
            <text:p><text:a xlink:href="https://r.res.easebar.com/pic/20241125/32653d8e-2a57-460d-af0a-72f35b84b607.png" xlink:type="simple">https://r.res.easebar.com/pic/20241125/32653d8e-2a57-460d-af0a-72f35b84b607.png</text:a></text:p>
          </table:table-cell>
          <table:table-cell table:style-name="ce1" office:value-type="string" calcext:value-type="string">
            <text:p>Perform a combo with his arms, and the third strike will slightly Launch Up the hit enemy airborne</text:p>
          </table:table-cell>
          <table:table-cell table:style-name="ce1" office:value-type="string" calcext:value-type="string">
            <text:p><text:a xlink:href="https://www.marvelrivals.com/20241123/41360_1195653.html" xlink:type="simple">https://www.marvelrivals.com/20241123/41360_1195653.html</text:a></text:p>
          </table:table-cell>
          <table:table-cell table:style-name="ce2" table:number-columns-repeated="24"/>
          <table:table-cell table:number-columns-repeated="16355"/>
        </table:table-row>
        <table:table-row table:style-name="ro1">
          <table:table-cell table:style-name="ce1" office:value-type="string" calcext:value-type="string">
            <text:p>GROOT</text:p>
          </table:table-cell>
          <table:table-cell table:style-name="ce1" office:value-type="string" calcext:value-type="string">
            <text:p>Wild Wall</text:p>
          </table:table-cell>
          <table:table-cell table:style-name="ce1" office:value-type="string" calcext:value-type="string">
            <text:p><text:a xlink:href="https://r.res.easebar.com/pic/20250808/1c89933e-1908-4b71-80d1-9074582fa726.png" xlink:type="simple">https://r.res.easebar.com/pic/20250808/1c89933e-1908-4b71-80d1-9074582fa726.png</text:a></text:p>
          </table:table-cell>
          <table:table-cell table:style-name="ce1" office:value-type="string" calcext:value-type="string">
            <text:p>Mantis enhances Groot's wooden walls and Loki's Rune Stones with life energy. Groot can additionally unleash a Flower Wall, which, when in Flora Colossus state, restores health to random nearby allies and grants them Damage Reduction. Loki's Rune Stones grant allies within Regeneration Domain a Damage Boost</text:p>
          </table:table-cell>
          <table:table-cell table:style-name="ce1" office:value-type="string" calcext:value-type="string">
            <text:p><text:a xlink:href="https://www.marvelrivals.com/20241123/41360_1195653.html" xlink:type="simple">https://www.marvelrivals.com/20241123/41360_1195653.html</text:a></text:p>
          </table:table-cell>
          <table:table-cell table:style-name="ce1" office:value-type="string" calcext:value-type="string">
            <text:p>Phoenix - Endsong Inferno, Ultron - Imperative: Patch, Hawkeye - Blast Arrow, Human Torch - Pyro-Prison, Storm - Omega Hurricane,</text:p>
          </table:table-cell>
          <table:table-cell table:style-name="ce2" table:number-columns-repeated="23"/>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Sentinel Strike</text:p>
          </table:table-cell>
          <table:table-cell table:style-name="ce1" office:value-type="string" calcext:value-type="string">
            <text:p><text:a xlink:href="https://r.res.easebar.com/pic/20241120/588f99a1-b1e0-4133-a626-35f8e6e4b158.png" xlink:type="simple">https://r.res.easebar.com/pic/20241120/588f99a1-b1e0-4133-a626-35f8e6e4b158.png</text:a></text:p>
          </table:table-cell>
          <table:table-cell table:style-name="ce1" office:value-type="string" calcext:value-type="string">
            <text:p>Get up close to strike enemies. Landing the second hit enables a shield throw that can ricochet four times</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2" table:number-columns-repeated="24"/>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Freedom Charge</text:p>
          </table:table-cell>
          <table:table-cell table:style-name="ce1" office:value-type="string" calcext:value-type="string">
            <text:p><text:a xlink:href="https://r.res.easebar.com/pic/20241120/301a3e56-eeee-47e4-b3b6-08c164b5f780.png" xlink:type="simple">https://r.res.easebar.com/pic/20241120/301a3e56-eeee-47e4-b3b6-08c164b5f780.png</text:a></text:p>
          </table:table-cell>
          <table:table-cell table:style-name="ce1" office:value-type="string" calcext:value-type="string">
            <text:p>Shield held high, carve a path forward, granting both himself and allies along the path continuous Bonus Health and Movement Boosts. Allies also gain Ultimate Ability Charge Acceleration. Using Living Legend and Leading Dash while this ability is active can Launch Up enemies</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1" office:value-type="string" calcext:value-type="string">
            <text:p>Angela - Assassin's Charge, Blade - Thousand-Fold Slash, Moon Knight - Hand of Khonshu?, Namor - Horn of Proteus, Scarlet Witch - Reality Erasure, Jeff the Land Shark - It's Jeff!, </text:p>
          </table:table-cell>
          <table:table-cell table:style-name="ce2" table:number-columns-repeated="23"/>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Leading Dash</text:p>
          </table:table-cell>
          <table:table-cell table:style-name="ce1" office:value-type="string" calcext:value-type="string">
            <text:p><text:a xlink:href="https://r.res.easebar.com/pic/20241120/dfc71932-8e4a-47e1-8eaf-3dffddf51cb4.png" xlink:type="simple">https://r.res.easebar.com/pic/20241120/dfc71932-8e4a-47e1-8eaf-3dffddf51cb4.png</text:a></text:p>
          </table:table-cell>
          <table:table-cell table:style-name="ce1" office:value-type="string" calcext:value-type="string">
            <text:p>Boost speed and enable Fearless Leap to leap into the air</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1" office:value-type="string" calcext:value-type="string">
            <text:p>Emma Frost - Carbon Crush, The Thing - Yancy Street Charge, Black Cat - Mento-Fish, Invisible Woman - Force Physics, Mister Fantastic - Distended Grip, Bblade -Daywalker Dash, Squirrel Girl - Squirrel Blockade, Black Widow - Electro-Plasma Explosion, Black Widow - Edge Dancer, Wolverine - Last Stand, Wolverine - Feral Leap, Iron Fist - Yat Jee Chung Kuen, Winter Soldier - Trooper's Fist, Winter Soldier - Bionic Hook, Winter Soldier - Tainted Voltage, Human Torch - Pyro-Prison, Spider-man - Get Over Here!, Hela - Soul Drainer, Storm - Omega Hurricane, Storm - Goddess Boost, Hulk - Incredible Leap,</text:p>
          </table:table-cell>
          <table:table-cell table:style-name="ce1" office:value-type="string" calcext:value-type="string">
            <text:p>Stopping Cap's movements is the best way to deal with him, you probably won't kill him by yourself but he will be trying to retreat if you delay what he was planning to do.</text:p>
          </table:table-cell>
          <table:table-cell table:style-name="ce2" table:number-columns-repeated="22"/>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Vibranium Energy Saw</text:p>
          </table:table-cell>
          <table:table-cell table:style-name="ce1" office:value-type="string" calcext:value-type="string">
            <text:p><text:a xlink:href="https://r.res.easebar.com/pic/20241120/ba7fc0c4-f0c7-4ce7-a792-63374163cc22.png" xlink:type="simple">https://r.res.easebar.com/pic/20241120/ba7fc0c4-f0c7-4ce7-a792-63374163cc22.png</text:a></text:p>
          </table:table-cell>
          <table:table-cell table:style-name="ce1" office:value-type="string" calcext:value-type="string">
            <text:p>Hurl the energy-charged shield to strike enemies in a path</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2" table:number-columns-repeated="24"/>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Liberty Rush</text:p>
          </table:table-cell>
          <table:table-cell table:style-name="ce1" office:value-type="string" calcext:value-type="string">
            <text:p><text:a xlink:href="https://r.res.easebar.com/pic/20241120/63eef162-7c33-46a8-8f48-aa74b29f910a.png" xlink:type="simple">https://r.res.easebar.com/pic/20241120/63eef162-7c33-46a8-8f48-aa74b29f910a.png</text:a></text:p>
          </table:table-cell>
          <table:table-cell table:style-name="ce1" office:value-type="string" calcext:value-type="string">
            <text:p>Raise the shield and charge forward</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1" office:value-type="string" calcext:value-type="string">
            <text:p>Phoenix - Endsong Inferno, Ultron - Imperative: Patch,</text:p>
          </table:table-cell>
          <table:table-cell table:style-name="ce2" table:number-columns-repeated="23"/>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Super-Soldier Slam</text:p>
          </table:table-cell>
          <table:table-cell table:style-name="ce1" office:value-type="string" calcext:value-type="string">
            <text:p><text:a xlink:href="https://r.res.easebar.com/pic/20241120/0261fd68-7164-4852-a86a-a5d02f914b2a.png" xlink:type="simple">https://r.res.easebar.com/pic/20241120/0261fd68-7164-4852-a86a-a5d02f914b2a.png</text:a></text:p>
          </table:table-cell>
          <table:table-cell table:style-name="ce1" office:value-type="string" calcext:value-type="string">
            <text:p>Slam down from the sky onto the targeted area, Launching Up enemies</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1" office:value-type="string" calcext:value-type="string">
            <text:p>Angela - Assassin's Charge</text:p>
          </table:table-cell>
          <table:table-cell table:style-name="ce2" table:number-columns-repeated="23"/>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Living Legend</text:p>
          </table:table-cell>
          <table:table-cell table:style-name="ce1" office:value-type="string" calcext:value-type="string">
            <text:p><text:a xlink:href="https://r.res.easebar.com/pic/20241120/97a1851f-7f3d-4297-a8ba-3d4650422a58.png" xlink:type="simple">https://r.res.easebar.com/pic/20241120/97a1851f-7f3d-4297-a8ba-3d4650422a58.png</text:a></text:p>
          </table:table-cell>
          <table:table-cell table:style-name="ce1" office:value-type="string" calcext:value-type="string">
            <text:p>Raise the shield to deflect incoming projectiles, sending them ricocheting in random directions</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1" office:value-type="string" calcext:value-type="string">
            <text:p>Hawkeye - Hypersonic Arrow, Scarlet Witch - Dark Seal,</text:p>
          </table:table-cell>
          <table:table-cell table:style-name="ce2" table:number-columns-repeated="23"/>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Captain's Spirit</text:p>
          </table:table-cell>
          <table:table-cell table:style-name="ce1" office:value-type="string" calcext:value-type="string">
            <text:p><text:a xlink:href="https://r.res.easebar.com/pic/20250410/c34a6f5c-8be1-4bcb-a0f0-f5572a64e6e9.png" xlink:type="simple">https://r.res.easebar.com/pic/20250410/c34a6f5c-8be1-4bcb-a0f0-f5572a64e6e9.png</text:a></text:p>
          </table:table-cell>
          <table:table-cell table:style-name="ce1" office:value-type="string" calcext:value-type="string">
            <text:p>Inspired by Captain America's resolve, Winter Soldier can leap to the aid of a designated ally, slamming the ground with his mechanical arm to deal damage to nearby foes. Additionally, Captain America and Winter Soldier can interact with each other once both parties confirm. The duo collides and unleashes a shockwave that deals damage and inflicts slow on enemies</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2" table:number-columns-repeated="24"/>
          <table:table-cell table:number-columns-repeated="16355"/>
        </table:table-row>
        <table:table-row table:style-name="ro1">
          <table:table-cell table:style-name="ce1" office:value-type="string" calcext:value-type="string">
            <text:p>CAPTAIN AMERICA</text:p>
          </table:table-cell>
          <table:table-cell table:style-name="ce1" office:value-type="string" calcext:value-type="string">
            <text:p>VIBRANIUM BASTION</text:p>
          </table:table-cell>
          <table:table-cell table:style-name="ce1" office:value-type="string" calcext:value-type="string">
            <text:p><text:a xlink:href="https://r.res.easebar.com/pic/20260416/dba9f061-232b-4cca-8797-cf61c520201e.png" xlink:type="simple">https://r.res.easebar.com/pic/20260416/dba9f061-232b-4cca-8797-cf61c520201e.png</text:a></text:p>
          </table:table-cell>
          <table:table-cell table:style-name="ce1" office:value-type="string" calcext:value-type="string">
            <text:p>Black Cat shares her luck with her allies. When White Fox embraces her newfound fortune, she unleashestracking Spirit Tails to grant Healing and Speed to allies, while damaging and Slowing foes. When Captain America enjoys his luck, his shield's block radius expands and allows him to aim deflectedProjectiles directly toward his target</text:p>
          </table:table-cell>
          <table:table-cell table:style-name="ce1" office:value-type="string" calcext:value-type="string">
            <text:p><text:a xlink:href="https://www.marvelrivals.com/20241123/41360_1195652.html" xlink:type="simple">https://www.marvelrivals.com/20241123/41360_1195652.html</text:a></text:p>
          </table:table-cell>
          <table:table-cell table:style-name="ce2" table:number-columns-repeated="24"/>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Daggers of Denak</text:p>
          </table:table-cell>
          <table:table-cell table:style-name="ce1" office:value-type="string" calcext:value-type="string">
            <text:p><text:a xlink:href="https://r.res.easebar.com/pic/20241120/005933a8-1d97-42c6-aac7-27e1bc018038.png" xlink:type="simple">https://r.res.easebar.com/pic/20241120/005933a8-1d97-42c6-aac7-27e1bc018038.png</text:a></text:p>
          </table:table-cell>
          <table:table-cell table:style-name="ce1" office:value-type="string" calcext:value-type="string">
            <text:p>Cast Daggers of Denak forward</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1" office:value-type="string" calcext:value-type="string">
            <text:p>Emma Frost - Mind's Aegis, Captain America - Living Legend, Magneto - Metallic Curtain, Doctor Strange - Shield of the Seraphim, Groot - Thornlash Wall, Groot - Ironwood Wall, Deadpool - Magical Unicorn Shield!, Invisible Woman - Guardian Shield,</text:p>
          </table:table-cell>
          <table:table-cell table:style-name="ce2" table:number-columns-repeated="23"/>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Eye of Agamotto</text:p>
          </table:table-cell>
          <table:table-cell table:style-name="ce1" office:value-type="string" calcext:value-type="string">
            <text:p><text:a xlink:href="https://r.res.easebar.com/pic/20241120/0fd358bd-cf3c-4029-9455-3693bc12cbb5.png" xlink:type="simple">https://r.res.easebar.com/pic/20241120/0fd358bd-cf3c-4029-9455-3693bc12cbb5.png</text:a></text:p>
          </table:table-cell>
          <table:table-cell table:style-name="ce1" office:value-type="string" calcext:value-type="string">
            <text:p>Separate nearby enemies' Souls from their bodies. Damage dealt to these Souls is transferred to their physical bodies</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1" office:value-type="string" calcext:value-type="string">
            <text:p>Mantis - Soul Resurgence, Luna Snow - Fate of Both Worlds, Mantis - Spore Slumber, Luna Snow - Ice Arts, Angela - Assassin's Charge, Blade - Scarlet Shroud, Phoenix - Telekinesis Burst, Ultron - Rage of Ultron, Emma Frost - Carbon Crush, The Thing - Yancy Street Charge, Invisible Woman - Force Physics, Mister Fantastic - Reflexive Rubber, Black Widow - Edge Dancer, Wolverine - Last Stand, Wolverine - Feral Leap, Wolverine - Regenerative Healing Factor, Cloak&amp;Dagger - Eternal Bond, Cloak&amp;Dagger - Dark Teleportation, Iron Fist - Dragon's Defense, Psylocke - Dance of the Butterfly, Moon Knight - Hand of Khonshu, Namor - Blessing of the Deep, Namor - Horn of Proteus, Star-Lord - Stellar Shift, Scarlet Witch - Mystic Projection, Scarlet Witch - Dark Seal, Winter Soldier - Trooper's Fist, Winter Soldier - Bionic Hook, Magik - Stepping Discs, Hela - Soul Drainer, Hulk - HULK SMASH!, Hulk - Indestructible Guard, Hulk - World Breaker, Hulk - Radioactive Lockdown, Hulk - Incredible Leap, Jeff the Land Shark - It's Jeff!, Jeff the Land Shark - Hide and Seek, The Punisher - Culling Turret, The Punisher - Final Judgement, Adam Warlock - Karmic Revival, Adam Warlock - Regenerative Cocoon,</text:p>
          </table:table-cell>
          <table:table-cell table:style-name="ce2" table:number-columns-repeated="23"/>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Cloak of Levitation</text:p>
          </table:table-cell>
          <table:table-cell table:style-name="ce1" office:value-type="string" calcext:value-type="string">
            <text:p><text:a xlink:href="https://r.res.easebar.com/pic/20241120/bcd20b65-6414-40bd-9f37-524652c0ed5b.png" xlink:type="simple">https://r.res.easebar.com/pic/20241120/bcd20b65-6414-40bd-9f37-524652c0ed5b.png</text:a></text:p>
          </table:table-cell>
          <table:table-cell table:style-name="ce1" office:value-type="string" calcext:value-type="string">
            <text:p>Ascend and then enter a brief state of sustained flight</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1" office:value-type="string" calcext:value-type="string">
            <text:p>Black Cat - Mento-Fish, The Thing - Stone Haymaker, The Thing - Battle Blitz, Mister Fantastic - Distended Grip, Squirrel Girl - Squirrel Blockade, Black Widow - Edge Dancer, Iron Fist - Yat Jee Chung Kuen, Hawkeye - Crescent Slash, Hawkeye - Hypersonic Arrow, Winter Soldier - Tainted Voltage, Storm - Omega Hurricane, Hulk - Incredible Leap, Jeff the Land Shark - Aqua Burst, Adam Warlock - Quantum Magic,</text:p>
          </table:table-cell>
          <table:table-cell table:style-name="ce2" table:number-columns-repeated="23"/>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Maelstrom of Madness</text:p>
          </table:table-cell>
          <table:table-cell table:style-name="ce1" office:value-type="string" calcext:value-type="string">
            <text:p><text:a xlink:href="https://r.res.easebar.com/pic/20241120/fc0621cc-3ee2-490c-bd45-28986775291c.png" xlink:type="simple">https://r.res.easebar.com/pic/20241120/fc0621cc-3ee2-490c-bd45-28986775291c.png</text:a></text:p>
          </table:table-cell>
          <table:table-cell table:style-name="ce1" office:value-type="string" calcext:value-type="string">
            <text:p>Release Dark Magic to deal damage to nearby enemies</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1" office:value-type="string" calcext:value-type="string">
            <text:p>Magik - Stepping Discs, Iron Fist - Dragon's Defense, Star-Lord - Stellar Shift,</text:p>
          </table:table-cell>
          <table:table-cell table:style-name="ce2" table:number-columns-repeated="23"/>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Pentagram of Farallah</text:p>
          </table:table-cell>
          <table:table-cell table:style-name="ce1" office:value-type="string" calcext:value-type="string">
            <text:p><text:a xlink:href="https://r.res.easebar.com/pic/20241120/9161c8ab-2eb3-4546-b454-c9d18e0ddad5.png" xlink:type="simple">https://r.res.easebar.com/pic/20241120/9161c8ab-2eb3-4546-b454-c9d18e0ddad5.png</text:a></text:p>
          </table:table-cell>
          <table:table-cell table:style-name="ce1" office:value-type="string" calcext:value-type="string">
            <text:p>Open portals between two locations, enabling all units to travel through them</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1" office:value-type="string" calcext:value-type="string">
            <text:p>Scarlet Witch - Dark Seal, Mantis - Spore Slumber, Luna Snow - Ice Arts, Angela - Assassin's Charge, Emma Frost - Psionic Seduction, Moon Knight - Ancient Ankh, Winter Soldier - Bionic Hook, Spider-man - Get Over Here!, Black Widow - Edge Dancer, Hela - Soul Drainer, The Thing - Clobberin' Time, Wolverine - Last Stand, Wolverine - Feral Leap, Hulk - World Breaker, Hulk - Radioactive Lockdown, Emma Frost - Carbon Crush, Winter Soldier - Trooper's Fist, Invisible Woman - Force Physics, Namor - Horn of Proteus, Spider-Man - Spectacular Spin,</text:p>
          </table:table-cell>
          <table:table-cell table:style-name="ce2" table:number-columns-repeated="23"/>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Shield of the Seraphim</text:p>
          </table:table-cell>
          <table:table-cell table:style-name="ce1" office:value-type="string" calcext:value-type="string">
            <text:p><text:a xlink:href="https://r.res.easebar.com/pic/20241120/9a8c0b57-316f-42da-bcca-9923be81d771.png" xlink:type="simple">https://r.res.easebar.com/pic/20241120/9a8c0b57-316f-42da-bcca-9923be81d771.png</text:a></text:p>
          </table:table-cell>
          <table:table-cell table:style-name="ce1" office:value-type="string" calcext:value-type="string">
            <text:p>Create a protective barrier against damage</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1" office:value-type="string" calcext:value-type="string">
            <text:p>Phoenix - Endsong Inferno, Ultron - Imperative: Patch, The Thing - Stone Haymaker, Mister Fantastic - Elastic Strength, Wolverine - Savage Claw, Iron Fist - Jeet Kune Do, Hawkeye - Blast Arrow, Scarlet Witch - Dark Seal, Winter Soldier - Trooper's Fist, Magik - Soulsword, Magik - Eldritch Whirl, Magik - Demon's Rage,</text:p>
          </table:table-cell>
          <table:table-cell table:style-name="ce2" table:number-columns-repeated="23"/>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Price of Magic</text:p>
          </table:table-cell>
          <table:table-cell table:style-name="ce1" office:value-type="string" calcext:value-type="string">
            <text:p><text:a xlink:href="https://r.res.easebar.com/pic/20241120/14622714-9438-4212-8a0b-738f282a64bc.png" xlink:type="simple">https://r.res.easebar.com/pic/20241120/14622714-9438-4212-8a0b-738f282a64bc.png</text:a></text:p>
          </table:table-cell>
          <table:table-cell table:style-name="ce1" office:value-type="string" calcext:value-type="string">
            <text:p>Dark Magic accumulates with every hit on an enemy. If Dark Magic peaks for too long, Doctor Strange will be cursed with Anti-Heal</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2" table:number-columns-repeated="24"/>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Enchanted Enhancement</text:p>
          </table:table-cell>
          <table:table-cell table:style-name="ce1" office:value-type="string" calcext:value-type="string">
            <text:p><text:a xlink:href="https://r.res.easebar.com/pic/20250410/99eb7c66-a521-4b6b-aa54-1048db609e28.png" xlink:type="simple">https://r.res.easebar.com/pic/20250410/99eb7c66-a521-4b6b-aa54-1048db609e28.png</text:a></text:p>
          </table:table-cell>
          <table:table-cell table:style-name="ce1" office:value-type="string" calcext:value-type="string">
            <text:p>Doctor Strange shares his arcane mastery, replacing Scarlet Witch's Chthonian Burst with Mystic Burst upon activation. Hold down the attack button to unleash a rapid, relentless salvo of magical missiles in the target direction</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2" table:number-columns-repeated="24"/>
          <table:table-cell table:number-columns-repeated="16355"/>
        </table:table-row>
        <table:table-row table:style-name="ro1">
          <table:table-cell table:style-name="ce1" office:value-type="string" calcext:value-type="string">
            <text:p>DOCTOR STRANGE</text:p>
          </table:table-cell>
          <table:table-cell table:style-name="ce1" office:value-type="string" calcext:value-type="string">
            <text:p>PSIONIC VORTEX</text:p>
          </table:table-cell>
          <table:table-cell table:style-name="ce1" office:value-type="string" calcext:value-type="string">
            <text:p><text:a xlink:href="https://r.res.easebar.com/pic/20260213/b0dacbcf-e7ec-4ddf-9e37-cc7a6c38d97b.png" xlink:type="simple">https://r.res.easebar.com/pic/20260213/b0dacbcf-e7ec-4ddf-9e37-cc7a6c38d97b.png</text:a></text:p>
          </table:table-cell>
          <table:table-cell table:style-name="ce1" office:value-type="string" calcext:value-type="string">
            <text:p>Invisible Woman enhances Doctor Strange's Maelstrom of Madness with a psionic explosion. The explosion damages and pulls enemies toward Doctor Strange. Based on the explosion's damage, Doctor Strange and nearby allies gain Bonus Health</text:p>
          </table:table-cell>
          <table:table-cell table:style-name="ce1" office:value-type="string" calcext:value-type="string">
            <text:p><text:a xlink:href="https://www.marvelrivals.com/20241123/41360_1195649.html" xlink:type="simple">https://www.marvelrivals.com/20241123/41360_1195649.html</text:a></text:p>
          </table:table-cell>
          <table:table-cell table:style-name="ce2" table:number-columns-repeated="24"/>
          <table:table-cell table:number-columns-repeated="16355"/>
        </table:table-row>
        <table:table-row table:style-name="ro1" table:number-rows-repeated="801">
          <table:table-cell table:style-name="ce2" table:number-columns-repeated="29"/>
          <table:table-cell table:number-columns-repeated="16355"/>
        </table:table-row>
        <table:table-row table:style-name="ro1" table:number-rows-repeated="104727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F304"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22T11:47:19.049000000</meta:creation-date>
    <dc:date>2026-05-22T12:26:07.573000000</dc:date>
    <meta:editing-duration>PT38M49S</meta:editing-duration>
    <meta:editing-cycles>4</meta:editing-cycles>
    <meta:generator>LibreOffice/7.5.3.2$Windows_X86_64 LibreOffice_project/9f56dff12ba03b9acd7730a5a481eea045e468f3</meta:generator>
    <meta:document-statistic meta:table-count="1" meta:cell-count="2924" meta:object-count="0"/>
  </office:meta>
</office:document-meta>
</file>