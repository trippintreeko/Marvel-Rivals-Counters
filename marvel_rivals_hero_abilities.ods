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472in"/>
    </style:style>
    <style:style style:name="co2" style:family="table-column">
      <style:table-column-properties fo:break-before="auto" style:column-width="3.4772in"/>
    </style:style>
    <style:style style:name="co3" style:family="table-column">
      <style:table-column-properties fo:break-before="auto" style:column-width="6.2535in"/>
    </style:style>
    <style:style style:name="co4" style:family="table-column">
      <style:table-column-properties fo:break-before="auto" style:column-width="3.9846in"/>
    </style:style>
    <style:style style:name="co5" style:family="table-column">
      <style:table-column-properties fo:break-before="auto" style:column-width="0.6689in"/>
    </style:style>
    <style:style style:name="ro1" style:family="table-row">
      <style:table-row-properties style:row-height="0.2083in" fo:break-before="auto" style:use-optimal-row-height="true"/>
    </style:style>
    <style:style style:name="ta1" style:family="table" style:master-page-name="PageStyle_5f_Hero_20_Abilities">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ero Abilit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default-cell-style-name="Default"/>
        <table:table-row table:style-name="ro1">
          <table:table-cell office:value-type="string" calcext:value-type="string">
            <text:p>hero</text:p>
          </table:table-cell>
          <table:table-cell office:value-type="string" calcext:value-type="string">
            <text:p>ability_name</text:p>
          </table:table-cell>
          <table:table-cell office:value-type="string" calcext:value-type="string">
            <text:p>ability_icon</text:p>
          </table:table-cell>
          <table:table-cell office:value-type="string" calcext:value-type="string">
            <text:p>ability_description</text:p>
          </table:table-cell>
          <table:table-cell office:value-type="string" calcext:value-type="string">
            <text:p>source_url</text:p>
          </table:table-cell>
          <table:table-cell table:number-columns-repeated="16379"/>
        </table:table-row>
        <table:table-row table:style-name="ro1">
          <table:table-cell office:value-type="string" calcext:value-type="string">
            <text:p>BLACK CAT</text:p>
          </table:table-cell>
          <table:table-cell office:value-type="string" calcext:value-type="string">
            <text:p>FELINE FURY</text:p>
          </table:table-cell>
          <table:table-cell office:value-type="string" calcext:value-type="string">
            <text:p>https://r.res.easebar.com/pic/20260416/b418cfa2-f3dd-4eae-b205-967e67831cf7.png</text:p>
          </table:table-cell>
          <table:table-cell office:value-type="string" calcext:value-type="string">
            <text:p>Swipe forward with razor-sharp claws</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CALLING CARD</text:p>
          </table:table-cell>
          <table:table-cell office:value-type="string" calcext:value-type="string">
            <text:p>https://r.res.easebar.com/pic/20260416/c1b8429e-cbce-4c01-ad81-b1255d6ddbb8.png</text:p>
          </table:table-cell>
          <table:table-cell office:value-type="string" calcext:value-type="string">
            <text:p>Issue a Calling Card to all enemies. Instantly dash to any enemy in sight and range, tearing into them with your claws to deal Percentage Damage</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CAT'S CRADLE</text:p>
          </table:table-cell>
          <table:table-cell office:value-type="string" calcext:value-type="string">
            <text:p>https://r.res.easebar.com/pic/20260416/0724214f-fa9d-4530-803b-02b40f0b9af7.png</text:p>
          </table:table-cell>
          <table:table-cell office:value-type="string" calcext:value-type="string">
            <text:p>Lunge forward with claws bared, slicing through any enemies caught in your path</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TURN OF FORTUNE</text:p>
          </table:table-cell>
          <table:table-cell office:value-type="string" calcext:value-type="string">
            <text:p>https://r.res.easebar.com/pic/20260416/46a0da80-3314-466d-aab1-41bc525fc793.png</text:p>
          </table:table-cell>
          <table:table-cell office:value-type="string" calcext:value-type="string">
            <text:p>Launch a grappling hook forward that damages an enemy on impact and steals Fortunebefore pulling it back to Black Cat</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THIEVING GRACE</text:p>
          </table:table-cell>
          <table:table-cell office:value-type="string" calcext:value-type="string">
            <text:p>https://r.res.easebar.com/pic/20260416/331db52b-ea1e-4d74-a4c7-c27fa17ec1a5.png</text:p>
          </table:table-cell>
          <table:table-cell office:value-type="string" calcext:value-type="string">
            <text:p>Perform a double jump</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FORTUNE'S FAVOR</text:p>
          </table:table-cell>
          <table:table-cell office:value-type="string" calcext:value-type="string">
            <text:p>https://r.res.easebar.com/pic/20260416/f20a3d87-0110-46b5-ae9c-e942746833cd.png</text:p>
          </table:table-cell>
          <table:table-cell office:value-type="string" calcext:value-type="string">
            <text:p>Spend Fortuneto unleash either Grapple Swipeor Phantom Pursuit</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STEALTHY CATWALK</text:p>
          </table:table-cell>
          <table:table-cell office:value-type="string" calcext:value-type="string">
            <text:p>https://r.res.easebar.com/pic/20260416/76e1a388-8bcd-40cb-b9b9-cbfea50d5264.png</text:p>
          </table:table-cell>
          <table:table-cell office:value-type="string" calcext:value-type="string">
            <text:p>Hold {Jump} to crawl up vertical surfaces</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MALKIN MISFORTUNE</text:p>
          </table:table-cell>
          <table:table-cell office:value-type="string" calcext:value-type="string">
            <text:p>https://r.res.easebar.com/pic/20260416/048b7e20-1062-44e0-9ae2-588cbb9d4fc8.png</text:p>
          </table:table-cell>
          <table:table-cell office:value-type="string" calcext:value-type="string">
            <text:p>Apply Jinxto enemies on hit. Jinxedfoes have a chance to lose their bonus damage when striking Black Cat with a Critical Hit</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GIFT OF GOLD</text:p>
          </table:table-cell>
          <table:table-cell office:value-type="string" calcext:value-type="string">
            <text:p>https://r.res.easebar.com/pic/20260416/dba9f061-232b-4cca-8797-cf61c520201e.png</text:p>
          </table:table-cell>
          <table:table-cell office:value-type="string" calcext:value-type="string">
            <text:p>Black Cat shares items acquired from Insider Trading with White Fox and Captain America. White Fox receives the Life Orb, which restores Spirit Fox Tail energy and converts life energy into Nine-Tailed Radiance that auto-tracks nearby allies and enemies, granting allies speed and healing while dealing damage and slowing enemies. Captain America receives the Vibranium Energy Amplifier, which expands shield block range when raised and reflects projectiles back along the crosshair direction.</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CLAW WHIP</text:p>
          </table:table-cell>
          <table:table-cell office:value-type="string" calcext:value-type="string">
            <text:p>https://r.res.easebar.com/pic/20260416/5868fb3b-fb3d-4ed5-9907-0252b6687288.png</text:p>
          </table:table-cell>
          <table:table-cell office:value-type="string" calcext:value-type="string">
            <text:p>Fire out tethered claws and whip them forward in a devastating arc, dealing damage to all enemies caught in range</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CALLING CARD</text:p>
          </table:table-cell>
          <table:table-cell office:value-type="string" calcext:value-type="string">
            <text:p>https://r.res.easebar.com/pic/20260416/542f0f37-1553-45e5-b794-9a5804088ccb.png</text:p>
          </table:table-cell>
          <table:table-cell office:value-type="string" calcext:value-type="string">
            <text:p>Issue a Calling Card to all enemies. Instantly dash to any enemy in sight and range, tearing into them with your claws to deal Percentage Damage</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CAT'S CRADLE</text:p>
          </table:table-cell>
          <table:table-cell office:value-type="string" calcext:value-type="string">
            <text:p>https://r.res.easebar.com/pic/20260416/de907edd-e322-4e4b-b64d-26f1dd5bd08e.png</text:p>
          </table:table-cell>
          <table:table-cell office:value-type="string" calcext:value-type="string">
            <text:p>Lunge forward with claws bared, slicing through any enemies caught in your path</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PHANTOM PURSUIT</text:p>
          </table:table-cell>
          <table:table-cell office:value-type="string" calcext:value-type="string">
            <text:p>https://r.res.easebar.com/pic/20260416/0f50962e-bc08-42a0-85db-7138a350d05f.png</text:p>
          </table:table-cell>
          <table:table-cell office:value-type="string" calcext:value-type="string">
            <text:p>Swiftly dash to an enemy, unleash a rapid flurry of claw attacks, and flash back to your starting position. Black Cat is Untargetableduring this move</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THIEVING GRACE</text:p>
          </table:table-cell>
          <table:table-cell office:value-type="string" calcext:value-type="string">
            <text:p>https://r.res.easebar.com/pic/20260416/db492550-ee00-49bd-b8f2-a8725012dbe1.png</text:p>
          </table:table-cell>
          <table:table-cell office:value-type="string" calcext:value-type="string">
            <text:p>Perform a double jump</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FORTUNE'S FAVOR</text:p>
          </table:table-cell>
          <table:table-cell office:value-type="string" calcext:value-type="string">
            <text:p>https://r.res.easebar.com/pic/20260416/aaaacbd7-f567-40c0-be49-494f0e6933db.png</text:p>
          </table:table-cell>
          <table:table-cell office:value-type="string" calcext:value-type="string">
            <text:p>Spend Fortuneto unleash either Grapple Swipeor Phantom Pursuit</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STEALTHY CATWALK</text:p>
          </table:table-cell>
          <table:table-cell office:value-type="string" calcext:value-type="string">
            <text:p>https://r.res.easebar.com/pic/20260416/cf0e15f3-6715-49c6-8313-9513eed6fa61.png</text:p>
          </table:table-cell>
          <table:table-cell office:value-type="string" calcext:value-type="string">
            <text:p>Hold {Jump} to crawl up vertical surfaces</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MALKIN MISFORTUNE</text:p>
          </table:table-cell>
          <table:table-cell office:value-type="string" calcext:value-type="string">
            <text:p>https://r.res.easebar.com/pic/20260416/f8475d37-2f3e-495d-8783-66a39a55e6a7.png</text:p>
          </table:table-cell>
          <table:table-cell office:value-type="string" calcext:value-type="string">
            <text:p>Apply Jinxto enemies on hit. Jinxedfoes have a chance to lose their bonus damage when striking Black Cat with a Critical Hit</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GILDED DEAL</text:p>
          </table:table-cell>
          <table:table-cell office:value-type="string" calcext:value-type="string">
            <text:p>https://r.res.easebar.com/pic/20260416/35b59c4e-01ea-4c4f-9321-2e378148df61.png</text:p>
          </table:table-cell>
          <table:table-cell office:value-type="string" calcext:value-type="string">
            <text:p>Use the Spatial Resonator to open a portal to the Elder Gods' dimension, consuming Fortune to trade with the Golden Elder and acquire items from the New York Thieves Guild vault.</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TABLET OF DESTINIES</text:p>
          </table:table-cell>
          <table:table-cell office:value-type="string" calcext:value-type="string">
            <text:p>https://r.res.easebar.com/pic/20260416/ce5e92ec-444e-48f9-9a2e-73b4f86c07fe.png</text:p>
          </table:table-cell>
          <table:table-cell office:value-type="string" calcext:value-type="string">
            <text:p>Gain a random amount of Fortune</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HELM OF HADES</text:p>
          </table:table-cell>
          <table:table-cell office:value-type="string" calcext:value-type="string">
            <text:p>https://r.res.easebar.com/pic/20260416/b4507d88-ec34-4a0b-9303-96757d10cd5b.png</text:p>
          </table:table-cell>
          <table:table-cell office:value-type="string" calcext:value-type="string">
            <text:p>Enter Invisiblestate for a set duration</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FALTINE FLAME ORB</text:p>
          </table:table-cell>
          <table:table-cell office:value-type="string" calcext:value-type="string">
            <text:p>https://r.res.easebar.com/pic/20260416/004aee58-b3ee-436d-bbe7-41ef6c00b4d5.png</text:p>
          </table:table-cell>
          <table:table-cell office:value-type="string" calcext:value-type="string">
            <text:p>Conjure an orb of mystical Faltine Flame to Revealand mark all nearby enemies</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CHERNOBOG'S CRYSTAL</text:p>
          </table:table-cell>
          <table:table-cell office:value-type="string" calcext:value-type="string">
            <text:p>https://r.res.easebar.com/pic/20260416/d7499d6e-8126-4d52-b3c5-649961da300b.png</text:p>
          </table:table-cell>
          <table:table-cell office:value-type="string" calcext:value-type="string">
            <text:p>Purify yourself, instantly removing any active control effects</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RING OF ZONA</text:p>
          </table:table-cell>
          <table:table-cell office:value-type="string" calcext:value-type="string">
            <text:p>https://r.res.easebar.com/pic/20260416/37abc875-d763-4531-8095-c0d74aae0e22.png</text:p>
          </table:table-cell>
          <table:table-cell office:value-type="string" calcext:value-type="string">
            <text:p>Open a portal on a surface, allowing instant traversal to the opposite side</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MENTO-FISH</text:p>
          </table:table-cell>
          <table:table-cell office:value-type="string" calcext:value-type="string">
            <text:p>https://r.res.easebar.com/pic/20260416/685beeba-23c2-457c-83a0-9beb64c100d9.png</text:p>
          </table:table-cell>
          <table:table-cell office:value-type="string" calcext:value-type="string">
            <text:p>Create a hypnosis field. Inflicts Slow, disables movement abilities, and Groundsall enemies caught within</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BLACK CAT</text:p>
          </table:table-cell>
          <table:table-cell office:value-type="string" calcext:value-type="string">
            <text:p>STICKY PAWS</text:p>
          </table:table-cell>
          <table:table-cell office:value-type="string" calcext:value-type="string">
            <text:p>https://r.res.easebar.com/pic/20260416/d1950ebc-6411-4006-93b9-c6db6b41ee45.png</text:p>
          </table:table-cell>
          <table:table-cell office:value-type="string" calcext:value-type="string">
            <text:p>Steal a set amount of Fortunewhenever your attacks hit an enemy</text:p>
          </table:table-cell>
          <table:table-cell office:value-type="string" calcext:value-type="string">
            <text:p>https://www.marvelrivals.com/20260416/41360_1296480.html</text:p>
          </table:table-cell>
          <table:table-cell table:number-columns-repeated="16379"/>
        </table:table-row>
        <table:table-row table:style-name="ro1">
          <table:table-cell office:value-type="string" calcext:value-type="string">
            <text:p>WHITE FOX</text:p>
          </table:table-cell>
          <table:table-cell office:value-type="string" calcext:value-type="string">
            <text:p>YEOWOO GUSEUL</text:p>
          </table:table-cell>
          <table:table-cell office:value-type="string" calcext:value-type="string">
            <text:p>https://r.res.easebar.com/pic/20260320/c58d434c-4789-4937-961d-d27e5a1f80ef.png</text:p>
          </table:table-cell>
          <table:table-cell office:value-type="string" calcext:value-type="string">
            <text:p>Fire a Fox Marble forward that bounces off terrain or heroes, then homes in on nearby heroes. It damages enemies, heals allies, and restores Spirit Tail energy</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CLAW STRIKE</text:p>
          </table:table-cell>
          <table:table-cell office:value-type="string" calcext:value-type="string">
            <text:p>https://r.res.easebar.com/pic/20260320/e738e469-d755-4bf3-93ae-0b5a252443ca.png</text:p>
          </table:table-cell>
          <table:table-cell office:value-type="string" calcext:value-type="string">
            <text:p>While Awakened, slash forward with a flurry of attacks</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SPECTRAL SURGE</text:p>
          </table:table-cell>
          <table:table-cell office:value-type="string" calcext:value-type="string">
            <text:p>https://r.res.easebar.com/pic/20260320/19bc9c00-28b2-4cb5-810c-183a9635f49b.png</text:p>
          </table:table-cell>
          <table:table-cell office:value-type="string" calcext:value-type="string">
            <text:p>Consume one Spirit Tail to send a spectral fox forward. It heals and grants invulnerability to allies it passes through, damages and Charms enemies, forcing foes to move toward White Fox</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FOX FORM AWAKENING</text:p>
          </table:table-cell>
          <table:table-cell office:value-type="string" calcext:value-type="string">
            <text:p>https://r.res.easebar.com/pic/20260320/72a48398-8002-4dfa-9056-24f73c76bc01.png</text:p>
          </table:table-cell>
          <table:table-cell office:value-type="string" calcext:value-type="string">
            <text:p>Enter Awakened state, transforming Spirit Tails into physical tails. While active, continuously drain Spirit Tail energy and heal nearby allies. Striking enemies provides additional area healing</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SPIRIT SANCTUARY</text:p>
          </table:table-cell>
          <table:table-cell office:value-type="string" calcext:value-type="string">
            <text:p>https://r.res.easebar.com/pic/20260320/a69660c4-0140-4d93-b09e-88695bef6c4b.png</text:p>
          </table:table-cell>
          <table:table-cell office:value-type="string" calcext:value-type="string">
            <text:p>Teleport to a chosen ally, instantly healing allies in the area while generating a shield</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TAIL SWEEP</text:p>
          </table:table-cell>
          <table:table-cell office:value-type="string" calcext:value-type="string">
            <text:p>https://r.res.easebar.com/pic/20260320/5c67a6c1-758c-467c-a4de-62f8fcf8ac11.png</text:p>
          </table:table-cell>
          <table:table-cell office:value-type="string" calcext:value-type="string">
            <text:p>While Awakened, sweep forward tails to launch up hit enemies</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Predatory Pounce</text:p>
          </table:table-cell>
          <table:table-cell office:value-type="string" calcext:value-type="string">
            <text:p>https://r.res.easebar.com/pic/20260320/5f574241-b3e7-46e1-83c5-658beb3885c9.png</text:p>
          </table:table-cell>
          <table:table-cell office:value-type="string" calcext:value-type="string">
            <text:p>While Awakened, dash forward. Hit an enemy to slow them, enabling a second dash that knocks back enemies</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KUMIHO UNLEASHED</text:p>
          </table:table-cell>
          <table:table-cell office:value-type="string" calcext:value-type="string">
            <text:p>https://r.res.easebar.com/pic/20260320/b089d7a9-c6dd-46d3-a000-4c0954353ad4.png</text:p>
          </table:table-cell>
          <table:table-cell office:value-type="string" calcext:value-type="string">
            <text:p>Manifest the full Nine-Tailed Fox form and continuously heal nearby allies. Cannot receive healing effects from others while in this form</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SPIRIT FOX WARD</text:p>
          </table:table-cell>
          <table:table-cell office:value-type="string" calcext:value-type="string">
            <text:p>https://r.res.easebar.com/pic/20260320/4e7caa04-0fb0-4310-87b4-4754473e6016.png</text:p>
          </table:table-cell>
          <table:table-cell office:value-type="string" calcext:value-type="string">
            <text:p>White Fox grants Luna Snow a spirit fox for protection. Luna can activate it for a burst of speed and fire it forward, healing allies in its path while applying Charm to enemies</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NINE-TAILED AURA</text:p>
          </table:table-cell>
          <table:table-cell office:value-type="string" calcext:value-type="string">
            <text:p>https://r.res.easebar.com/pic/20260416/dba9f061-232b-4cca-8797-cf61c520201e.png</text:p>
          </table:table-cell>
          <table:table-cell office:value-type="string" calcext:value-type="string">
            <text:p>Black Cat shares her luck with her allies. When White Fox embraces her newfound fortune, she unleashestracking Spirit Tails to grant Healing and Speed to allies, while damaging and Slowing foes. When Captain America enjoys his luck, his shield's block radius expands and allows him to aim deflectedProjectiles directly toward his target</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NINEFOLD SLAM</text:p>
          </table:table-cell>
          <table:table-cell office:value-type="string" calcext:value-type="string">
            <text:p>https://r.res.easebar.com/pic/20260320/246d56d8-a7ff-40e7-ace5-01c0fd4b9a66.png</text:p>
          </table:table-cell>
          <table:table-cell office:value-type="string" calcext:value-type="string">
            <text:p>In Kumiho Form, slam the ground, causing an explosive shockwave. Hitting enemies or summons grants One-Time Healing to self and nearby allies</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WHITE FOX</text:p>
          </table:table-cell>
          <table:table-cell office:value-type="string" calcext:value-type="string">
            <text:p>BLESSED BY THE NINE</text:p>
          </table:table-cell>
          <table:table-cell office:value-type="string" calcext:value-type="string">
            <text:p>https://r.res.easebar.com/pic/20260320/36acf930-5edb-4ccb-b782-333bc20b2050.png</text:p>
          </table:table-cell>
          <table:table-cell office:value-type="string" calcext:value-type="string">
            <text:p>In Kumiho Form, select an ally to grant Continuous Healing, Unstoppable, and Life-Steal for a short time</text:p>
          </table:table-cell>
          <table:table-cell office:value-type="string" calcext:value-type="string">
            <text:p>https://www.marvelrivals.com/20260320/41360_1292187.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DOUBLE-BARREL BLASTER</text:p>
          </table:table-cell>
          <table:table-cell office:value-type="string" calcext:value-type="string">
            <text:p>https://r.res.easebar.com/pic/20260210/8a132243-9cec-4ed8-aa27-f374bc58d1a7.png</text:p>
          </table:table-cell>
          <table:table-cell office:value-type="string" calcext:value-type="string">
            <text:p>Fire your shotgun forward</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MONSTER-PIERCER</text:p>
          </table:table-cell>
          <table:table-cell office:value-type="string" calcext:value-type="string">
            <text:p>https://r.res.easebar.com/pic/20260210/ff430438-d356-492c-bd28-2c68160d3a7a.png</text:p>
          </table:table-cell>
          <table:table-cell office:value-type="string" calcext:value-type="string">
            <text:p>Unleash your elephant gun forward. Bullets pierce enemies and deal high damage</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INHERITED INSTINCT</text:p>
          </table:table-cell>
          <table:table-cell office:value-type="string" calcext:value-type="string">
            <text:p>https://r.res.easebar.com/pic/20260210/4b228e3f-c80f-4bd7-903f-c38148164bd9.png</text:p>
          </table:table-cell>
          <table:table-cell office:value-type="string" calcext:value-type="string">
            <text:p>Dealing damage increases hunting Instinct. Defeating enemies caught by Smoky Snare grants additional Instinct. Higher Instinct reduces the cooldown of Helix Advance</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RUTHLESS PURSUIT</text:p>
          </table:table-cell>
          <table:table-cell office:value-type="string" calcext:value-type="string">
            <text:p>https://r.res.easebar.com/pic/20260210/d3e00685-1ad7-4e9d-a9cc-4d176abfdf09.png</text:p>
          </table:table-cell>
          <table:table-cell office:value-type="string" calcext:value-type="string">
            <text:p>Dash forward, gaining Bonus Health and launching enemies hit. Follow up with a Double-Barrel Blaster shot that propels you backward and Slows enemies. Using either stage empowers your next Double-Barrel Blaster, transforming it into Monster-Piercer</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HELIX ADVANCE</text:p>
          </table:table-cell>
          <table:table-cell office:value-type="string" calcext:value-type="string">
            <text:p>https://r.res.easebar.com/pic/20260210/d5490ea6-b478-4c97-9ef7-20621038e83e.png</text:p>
          </table:table-cell>
          <table:table-cell office:value-type="string" calcext:value-type="string">
            <text:p>Dash forward. Your next Double-Barrel Blaster becomes Monster-Piercer</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LIVING BULLET</text:p>
          </table:table-cell>
          <table:table-cell office:value-type="string" calcext:value-type="string">
            <text:p>https://r.res.easebar.com/pic/20260210/4931ed8c-267e-4117-bc98-174750ceebdf.png</text:p>
          </table:table-cell>
          <table:table-cell office:value-type="string" calcext:value-type="string">
            <text:p>Fire a Living Bullet round that splits upon impact, seeking nearby enemies and marking each with a Spectral Sigil. Hitting marked targets with Double-Barrel Blaster or Monster-Piercer grants Elsa a brief Speed boost. Living Bullets deal extra damage to shields and enemies with Bonus Health</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SMOKY SNARE</text:p>
          </table:table-cell>
          <table:table-cell office:value-type="string" calcext:value-type="string">
            <text:p>https://r.res.easebar.com/pic/20260210/a23b9d06-1993-42ec-91af-c2e44696ba07.png</text:p>
          </table:table-cell>
          <table:table-cell office:value-type="string" calcext:value-type="string">
            <text:p>Launch a trap containing the monster Diablo. Once deployed, it becomes Invisible and Invulnerable. When an enemy triggers it, Diablo Immobilizes and Damages them. Use to dash to the trapped enemy. Enemies can destroy Diablo to break free</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APEX PREDATOR</text:p>
          </table:table-cell>
          <table:table-cell office:value-type="string" calcext:value-type="string">
            <text:p>https://r.res.easebar.com/pic/20260210/baae636a-b026-4d93-b08f-3185544fbeb3.png</text:p>
          </table:table-cell>
          <table:table-cell office:value-type="string" calcext:value-type="string">
            <text:p>Summon the Glartrox to charge forward. The Glartrox can be recalled to charge back toward Elsa. When colliding with terrain or upon return, it bites fiercely, dealing heavy damage</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ELSA BLOODSTONE</text:p>
          </table:table-cell>
          <table:table-cell office:value-type="string" calcext:value-type="string">
            <text:p>BLOODSTONE'S BOOMBOX BULLETS</text:p>
          </table:table-cell>
          <table:table-cell office:value-type="string" calcext:value-type="string">
            <text:p>https://r.res.easebar.com/pic/20260210/ef8a763c-f6b0-4c09-9217-37d1796495c2.png</text:p>
          </table:table-cell>
          <table:table-cell office:value-type="string" calcext:value-type="string">
            <text:p>Deadpool hands Jeff the Land Shark a plushie. Jeff can spit it ahead where it'll continuously Taunt nearby enemies and Block Vision, while allies in range are healed! Elsa Bloodstone's Living Bullet changes to special rounds that Taunt targets with Deadpool's chatter, while Slowing, and damaging nearby enemies over time. Elsa can recall the rounds to heal based on damage dealt</text:p>
          </table:table-cell>
          <table:table-cell office:value-type="string" calcext:value-type="string">
            <text:p>https://www.marvelrivals.com/20260212/41360_1286981.html</text:p>
          </table:table-cell>
          <table:table-cell table:number-columns-repeated="16379"/>
        </table:table-row>
        <table:table-row table:style-name="ro1">
          <table:table-cell office:value-type="string" calcext:value-type="string">
            <text:p>DEADPOOL</text:p>
          </table:table-cell>
          <table:table-cell office:value-type="string" calcext:value-type="string">
            <text:p>DUAL DESERT EAGLES - VANGUARD</text:p>
          </table:table-cell>
          <table:table-cell office:value-type="string" calcext:value-type="string">
            <text:p>https://r.res.easebar.com/pic/20260114/612130fb-e64b-45c5-a9fe-536fce19cb0a.png</text:p>
          </table:table-cell>
          <table:table-cell office:value-type="string" calcext:value-type="string">
            <text:p>Nobody lays a finger on my teammates! Anyone tries, and I'm firing these big boy bullets straight at their fac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THE BAN HAMMER</text:p>
          </table:table-cell>
          <table:table-cell office:value-type="string" calcext:value-type="string">
            <text:p>https://r.res.easebar.com/pic/20260116/2dd26fc5-baa0-418f-8130-fb8e96ff90b4.png</text:p>
          </table:table-cell>
          <table:table-cell office:value-type="string" calcext:value-type="string">
            <text:p>You! Yeah, you - the hyper one! Eyes off my friends. I sentence you to...whatever! Get ready to be taunted. I get bonus HP and healing, and if you whiff your abilities, you take damage, and I get even more HP!</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GICAL UNICORN SHIELD!</text:p>
          </table:table-cell>
          <table:table-cell office:value-type="string" calcext:value-type="string">
            <text:p>https://r.res.easebar.com/pic/20260114/fef38c04-fee0-40a5-ad7f-79577aa45743.png</text:p>
          </table:table-cell>
          <table:table-cell office:value-type="string" calcext:value-type="string">
            <text:p>Plushie power! It stops every single attack those chumps throw, giving my team a safety bubble. It's cute AND bulletproof</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BUNNY BOUNCE</text:p>
          </table:table-cell>
          <table:table-cell office:value-type="string" calcext:value-type="string">
            <text:p>https://r.res.easebar.com/pic/20260114/183eb974-55a8-488f-bd08-ef83ad4688e3.png</text:p>
          </table:table-cell>
          <table:table-cell office:value-type="string" calcext:value-type="string">
            <text:p>Yup, I can double jump in midair! During The Big Test and its upgrade, I can also stomp heads and wall jump to reset its cooldown. Stomp enemies so hard they won't get near my team!</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FACTOR</text:p>
          </table:table-cell>
          <table:table-cell office:value-type="string" calcext:value-type="string">
            <text:p>https://r.res.easebar.com/pic/20260114/eb588f97-66b2-45b7-b543-88aeaa167a58.png</text:p>
          </table:table-cell>
          <table:table-cell office:value-type="string" calcext:value-type="string">
            <text:p>Out of combat? I'm healing up, staying battle-ready to protect my team. And if I'm about to croak? Surprise! I get a free pass, and my health zooms back up. Nice try, villain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XIMUM FLAIR</text:p>
          </table:table-cell>
          <table:table-cell office:value-type="string" calcext:value-type="string">
            <text:p>https://r.res.easebar.com/pic/20260114/fc477704-7f13-4fc9-a949-55a43fd0399a.png</text:p>
          </table:table-cell>
          <table:table-cell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UPGRADE!</text:p>
          </table:table-cell>
          <table:table-cell office:value-type="string" calcext:value-type="string">
            <text:p>https://r.res.easebar.com/pic/20260114/8581a805-ffde-468d-9b45-47ea9dc540da.png</text:p>
          </table:table-cell>
          <table:table-cell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VANGUARD</text:p>
          </table:table-cell>
          <table:table-cell office:value-type="string" calcext:value-type="string">
            <text:p>https://r.res.easebar.com/pic/20260114/947a7dad-eb1a-48ae-a028-0c018245d0bd.png</text:p>
          </table:table-cell>
          <table:table-cell office:value-type="string" calcext:value-type="string">
            <text:p>Want to hurt my team? Good luck! I hit you with a taunt, mess up your vision, and burn your health nonstop! Best part: my swords and guns go full turbo for the duration. Blink and you'll miss it</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Comical Chaos</text:p>
          </table:table-cell>
          <table:table-cell office:value-type="string" calcext:value-type="string">
            <text:p>https://r.res.easebar.com/pic/20260116/7ff581ee-1f52-4aae-97a8-37f03509c681.png</text:p>
          </table:table-cell>
          <table:table-cell office:value-type="string" calcext:value-type="string">
            <text:p>Deadpool hands Jeff the Land Shark a plushie with attitude. Jeff can spit it ahead where it'll continuously Taunt nearby enemies and Block Vision, while allies in range enjoy a plush-powered healing party!</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KICK@$$ KATANA - VANGUARD</text:p>
          </table:table-cell>
          <table:table-cell office:value-type="string" calcext:value-type="string">
            <text:p>https://r.res.easebar.com/pic/20260114/cd46d5e0-bd27-47b8-b5af-a50a3ae283e4.png</text:p>
          </table:table-cell>
          <table:table-cell office:value-type="string" calcext:value-type="string">
            <text:p>Protecting my team means my katanas go full savage. No mercy for the baddie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THE BIG TEST</text:p>
          </table:table-cell>
          <table:table-cell office:value-type="string" calcext:value-type="string">
            <text:p>https://r.res.easebar.com/pic/20260116/01cf36e8-0774-4b0f-96eb-1860e9d8ad4a.png</text:p>
          </table:table-cell>
          <table:table-cell office:value-type="string" calcext:value-type="string">
            <text:p>Wake the #!&amp;% up, hero! We've got a game to win! Speed and healing buffs for starters, bonus Hazardous Hijinks for me, and extra HP for me and my nearby friends. Hit enough baddies with the right abilities exactly as I ask, and you unlock mega speed and healing, plus reset my Healing Factor cooldown!. Team protection mode: activated!</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AZARDOUS HIJINKS - VANGUARD</text:p>
          </table:table-cell>
          <table:table-cell office:value-type="string" calcext:value-type="string">
            <text:p>https://r.res.easebar.com/pic/20260114/bc056ad5-a545-497b-a4b3-296be9f62c3b.png</text:p>
          </table:table-cell>
          <table:table-cell office:value-type="string" calcext:value-type="string">
            <text:p>Try getting to my teammates, I dare you! My dash slash knocks fools down, and if I hit, I get to do it again. Up to three times, baby!</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BUNNY BOUNCE</text:p>
          </table:table-cell>
          <table:table-cell office:value-type="string" calcext:value-type="string">
            <text:p>https://r.res.easebar.com/pic/20260114/f83e789b-8ec4-4623-9162-a873b479ada6.png</text:p>
          </table:table-cell>
          <table:table-cell office:value-type="string" calcext:value-type="string">
            <text:p>Yup, I can double jump in midair! During The Big Test and its upgrade, I can also stomp heads and wall jump to reset its cooldown. Stomp enemies so hard they won't get near my team!</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FACTOR</text:p>
          </table:table-cell>
          <table:table-cell office:value-type="string" calcext:value-type="string">
            <text:p>https://r.res.easebar.com/pic/20260114/68817e55-2b49-4e4f-9e54-36bc0530574e.png</text:p>
          </table:table-cell>
          <table:table-cell office:value-type="string" calcext:value-type="string">
            <text:p>Out of combat? I'm healing up, staying battle-ready to protect my team. And if I'm about to croak? Surprise! I get a free pass, and my health zooms back up. Nice try, villain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XIMUM FLAIR</text:p>
          </table:table-cell>
          <table:table-cell office:value-type="string" calcext:value-type="string">
            <text:p>https://r.res.easebar.com/pic/20260114/1e05f233-ac32-4fe9-b1b8-9c7cd4e165a3.png</text:p>
          </table:table-cell>
          <table:table-cell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UPGRADE!</text:p>
          </table:table-cell>
          <table:table-cell office:value-type="string" calcext:value-type="string">
            <text:p>https://r.res.easebar.com/pic/20260114/bf797f74-4018-4b36-85d6-89159ea831b4.png</text:p>
          </table:table-cell>
          <table:table-cell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VANGUARD</text:p>
          </table:table-cell>
          <table:table-cell office:value-type="string" calcext:value-type="string">
            <text:p>https://r.res.easebar.com/pic/20260114/b4f7983e-98fb-46bb-aabc-c8bb80041553.png</text:p>
          </table:table-cell>
          <table:table-cell office:value-type="string" calcext:value-type="string">
            <text:p>Want to hurt my team? Good luck! I hit you with a taunt, mess up your vision, and burn your health nonstop! Best part: my swords and guns go full turbo for the duration. Blink and you'll miss it</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UAL DESERT EAGLES - VANGUARD UPGRADED</text:p>
          </table:table-cell>
          <table:table-cell office:value-type="string" calcext:value-type="string">
            <text:p>https://r.res.easebar.com/pic/20260114/9950e177-ed31-4cc3-9dd0-5e81a1ebd0f4.png</text:p>
          </table:table-cell>
          <table:table-cell office:value-type="string" calcext:value-type="string">
            <text:p>I rack up shots, then, BOOM! A mind-blowing bubble bomb for all the enemies. Teammate security: maximum</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KICK@$$ KATANA - VANGUARD UPGRADED</text:p>
          </table:table-cell>
          <table:table-cell office:value-type="string" calcext:value-type="string">
            <text:p>https://r.res.easebar.com/pic/20260114/bff49308-0b5f-46fc-81ca-46fe94f05f81.png</text:p>
          </table:table-cell>
          <table:table-cell office:value-type="string" calcext:value-type="string">
            <text:p>Relax, you've got Deadpool on your side! Swords out, baddies out. My stab hits crit, and a Bad Bunny hit makes the next swing a stabby special</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VANGUARD UPGRADED</text:p>
          </table:table-cell>
          <table:table-cell office:value-type="string" calcext:value-type="string">
            <text:p>https://r.res.easebar.com/pic/20260114/dd186638-8506-401f-b1a7-c09436994ad7.png</text:p>
          </table:table-cell>
          <table:table-cell office:value-type="string" calcext:value-type="string">
            <text:p>Teammates, stay safe! Dummies, look here! It's showtime: I taunt, blind you, and hit warp speed with my swords and guns. Plus, my crew gets a damage reduction buff, so they're basically invincible. Dummies that stick around too long will even have their UI taped over!</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AZARDOUS HIJINKS - VANGUARD UPGRADED</text:p>
          </table:table-cell>
          <table:table-cell office:value-type="string" calcext:value-type="string">
            <text:p>https://r.res.easebar.com/pic/20260114/5477ab5b-877f-48c7-9541-973e67722586.png</text:p>
          </table:table-cell>
          <table:table-cell office:value-type="string" calcext:value-type="string">
            <text:p>Watch this pro bodyguard in action! I dash forward, nail the bad guy, and bounce in any direction I want. Oh, and I can do this two more times real quick!</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GICAL UNICORN SHIELD! - UPGRADED</text:p>
          </table:table-cell>
          <table:table-cell office:value-type="string" calcext:value-type="string">
            <text:p>https://r.res.easebar.com/pic/20260114/58a98547-303e-4b5d-b0ca-d05be7c951c6.png</text:p>
          </table:table-cell>
          <table:table-cell office:value-type="string" calcext:value-type="string">
            <text:p>My ultra-cool, super shiny, extra huggable, and totally blinged-out plushy. Toss it ahead, and it lands as an invincible sphere of awesomeness! Blocking attacks and keeping my team safe inside our furry fortres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THE BIG TEST - UPGRADED</text:p>
          </table:table-cell>
          <table:table-cell office:value-type="string" calcext:value-type="string">
            <text:p>https://r.res.easebar.com/pic/20260116/917c3099-6c03-40db-a5af-da7bd907b710.png</text:p>
          </table:table-cell>
          <table:table-cell office:value-type="string" calcext:value-type="string">
            <text:p>Hey, player! Warm-up's over, time for the main event! Speed, healing, dashes, for me, and bonus HP for all! Smash enough baddies with the skills I say, and you unlock super buffs (massive speed and healing), plus Healing Factor resets. For some time after, each hit means more HP for the crew and you. Don't mess this up!</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THE BAN HAMMER - UPGRADED</text:p>
          </table:table-cell>
          <table:table-cell office:value-type="string" calcext:value-type="string">
            <text:p>https://r.res.easebar.com/pic/20260116/944e9d57-7cfe-47fe-97bf-dbda97f0552c.png</text:p>
          </table:table-cell>
          <table:table-cell office:value-type="string" calcext:value-type="string">
            <text:p>Upgraded courtroom drama! Congrats, unlucky one! You're my pick; enjoy the taunt! I score bonus health and healing, and you take ongoing damage. If you miss an ability while court is in session, it's a double whammy. You get more pain, AND I get more extra HP! Thanks in advanc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UAL DESERT EAGLES - DUELIST</text:p>
          </table:table-cell>
          <table:table-cell office:value-type="string" calcext:value-type="string">
            <text:p>https://r.res.easebar.com/pic/20260114/bbbc1021-c26d-4d45-b504-41fecb1fd329.png</text:p>
          </table:table-cell>
          <table:table-cell office:value-type="string" calcext:value-type="string">
            <text:p>Bang! Bang! Unleash two hand cannons left and right, because one gun is never enough. Pew pew, baby!</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SKILL ISSUE</text:p>
          </table:table-cell>
          <table:table-cell office:value-type="string" calcext:value-type="string">
            <text:p>https://r.res.easebar.com/pic/20260116/32d6d205-925f-4e0b-ba3c-36c29e716545.png</text:p>
          </table:table-cell>
          <table:table-cell office:value-type="string" calcext:value-type="string">
            <text:p>Let's play judge! Pick a dumb-dumb and slap a taunt. They miss an ability? Boom! Gavel drops, and I slap them with pain and snark</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DSHOT! - DUELIST</text:p>
          </table:table-cell>
          <table:table-cell office:value-type="string" calcext:value-type="string">
            <text:p>https://r.res.easebar.com/pic/20260116/fe2d56e5-76f1-440b-b799-f3339fac8787.png</text:p>
          </table:table-cell>
          <table:table-cell office:value-type="string" calcext:value-type="string">
            <text:p>Ever seen someone throw their own face? Watch me KO a crowd, then catch my mug on the rebound!. Don't lose your head over it</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BUNNY HOP</text:p>
          </table:table-cell>
          <table:table-cell office:value-type="string" calcext:value-type="string">
            <text:p>https://r.res.easebar.com/pic/20260114/e30a48d2-58b5-4ea4-9fbf-b0ea4237ce55.png</text:p>
          </table:table-cell>
          <table:table-cell office:value-type="string" calcext:value-type="string">
            <text:p>Hippity-hoppity, Deadpool's on your property! Watch me squeeze in a second jump midair! Hop on heads or kick off walls with Bunny Hop to refresh the cooldown, and if I land on someone? Free health for me, and a headache for them. Whe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FACTOR</text:p>
          </table:table-cell>
          <table:table-cell office:value-type="string" calcext:value-type="string">
            <text:p>https://r.res.easebar.com/pic/20260114/34f96677-28fa-4445-ba68-7e5553a9452e.png</text:p>
          </table:table-cell>
          <table:table-cell office:value-type="string" calcext:value-type="string">
            <text:p>Out of combat? I'm healing up, staying battle-ready to protect my team. And if I'm about to croak? Surprise! I get a free pass, and my health zooms back up. Nice try, villain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XIMUM FLAIR</text:p>
          </table:table-cell>
          <table:table-cell office:value-type="string" calcext:value-type="string">
            <text:p>https://r.res.easebar.com/pic/20260114/f1818cfa-e96d-4f24-9aad-cbf41a68b80d.png</text:p>
          </table:table-cell>
          <table:table-cell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UPGRADE!</text:p>
          </table:table-cell>
          <table:table-cell office:value-type="string" calcext:value-type="string">
            <text:p>https://r.res.easebar.com/pic/20260114/b0d6febd-72f5-45ad-8ed4-801c869b8959.png</text:p>
          </table:table-cell>
          <table:table-cell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DUELIST</text:p>
          </table:table-cell>
          <table:table-cell office:value-type="string" calcext:value-type="string">
            <text:p>https://r.res.easebar.com/pic/20260114/c48ac808-c0fc-40ca-b988-4209f308059b.png</text:p>
          </table:table-cell>
          <table:table-cell office:value-type="string" calcext:value-type="string">
            <text:p>True heroes taunt face-to-face! I roast nearby baddies, mess up their vision, and tank their hits like a boss. Try m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KICK@$$ KATANA - DUELIST</text:p>
          </table:table-cell>
          <table:table-cell office:value-type="string" calcext:value-type="string">
            <text:p>https://r.res.easebar.com/pic/20260114/f441fc76-d37a-495d-bff2-9c8a74fae424.png</text:p>
          </table:table-cell>
          <table:table-cell office:value-type="string" calcext:value-type="string">
            <text:p>Slicey, dicey, twice as nicey! Swing both swords at whoever gets too close. Sushi, anyon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POP QUIZ!</text:p>
          </table:table-cell>
          <table:table-cell office:value-type="string" calcext:value-type="string">
            <text:p>https://r.res.easebar.com/pic/20260116/ddeac56f-2a2b-458f-a09b-30c02e893bda.png</text:p>
          </table:table-cell>
          <table:table-cell office:value-type="string" calcext:value-type="string">
            <text:p>Hey, you! Yeah, you! Ready for a challenge? Free speed and healing just for trying. Nail enough hits with the right abilities and unlock the deluxe speed-heal package. It's an A+ in chao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AZARDOUS HIJINKS - DUELIST</text:p>
          </table:table-cell>
          <table:table-cell office:value-type="string" calcext:value-type="string">
            <text:p>https://r.res.easebar.com/pic/20260114/a97263d2-9d7d-4f0e-9846-952d3a8873f2.png</text:p>
          </table:table-cell>
          <table:table-cell office:value-type="string" calcext:value-type="string">
            <text:p>Blink, and you'll miss my deadly dash combo. Slash, dash, repeat! Hit someone? You get to go again! (Up to 2 more times. Don't get greedy.) Who says I can't multitask?</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BUNNY HOP</text:p>
          </table:table-cell>
          <table:table-cell office:value-type="string" calcext:value-type="string">
            <text:p>https://r.res.easebar.com/pic/20260114/61987493-d453-45cc-8f8b-6da0078b21ea.png</text:p>
          </table:table-cell>
          <table:table-cell office:value-type="string" calcext:value-type="string">
            <text:p>Hippity-hoppity, Deadpool's on your property! Watch me squeeze in a second jump midair! Hop on heads or kick off walls with Bunny Hop to refresh the cooldown, and if I land on someone? Free health for me, and a headache for them. Whe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FACTOR</text:p>
          </table:table-cell>
          <table:table-cell office:value-type="string" calcext:value-type="string">
            <text:p>https://r.res.easebar.com/pic/20260114/d6633d77-4996-4afb-9640-29af2ad835f5.png</text:p>
          </table:table-cell>
          <table:table-cell office:value-type="string" calcext:value-type="string">
            <text:p>Out of combat? I'm healing up, staying battle-ready to protect my team. And if I'm about to croak? Surprise! I get a free pass, and my health zooms back up. Nice try, villain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XIMUM FLAIR</text:p>
          </table:table-cell>
          <table:table-cell office:value-type="string" calcext:value-type="string">
            <text:p>https://r.res.easebar.com/pic/20260114/13385900-a033-4e64-bf97-f8adac56bbea.png</text:p>
          </table:table-cell>
          <table:table-cell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UPGRADE!</text:p>
          </table:table-cell>
          <table:table-cell office:value-type="string" calcext:value-type="string">
            <text:p>https://r.res.easebar.com/pic/20260114/0cf9ba9a-131e-4460-9205-2acfb9fdad48.png</text:p>
          </table:table-cell>
          <table:table-cell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DUELIST</text:p>
          </table:table-cell>
          <table:table-cell office:value-type="string" calcext:value-type="string">
            <text:p>https://r.res.easebar.com/pic/20260114/68c29f6d-a09c-45e0-8d88-4ee6bd767f6c.png</text:p>
          </table:table-cell>
          <table:table-cell office:value-type="string" calcext:value-type="string">
            <text:p>True heroes taunt face-to-face! I roast nearby baddies, mess up their vision, and tank their hits like a boss. Try m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UAL DESERT EAGLES - DUELIST UPGRADED</text:p>
          </table:table-cell>
          <table:table-cell office:value-type="string" calcext:value-type="string">
            <text:p>https://r.res.easebar.com/pic/20260114/1225939a-146b-4699-9d72-050fcaa16d4c.png</text:p>
          </table:table-cell>
          <table:table-cell office:value-type="string" calcext:value-type="string">
            <text:p>Keep blasting till you trigger a BOOM. My thoughts literally explode onto the battlefield. Talk about mind-blowing firepower!</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KICK@$$ KATANA - DUELIST UPGRADED</text:p>
          </table:table-cell>
          <table:table-cell office:value-type="string" calcext:value-type="string">
            <text:p>https://r.res.easebar.com/pic/20260114/b8b503aa-e398-45a1-8500-698622cc9de4.png</text:p>
          </table:table-cell>
          <table:table-cell office:value-type="string" calcext:value-type="string">
            <text:p>Now with extra chop! Stabs can go straight for the noggin. Heads up! Do a Bunny Hop and POW! Stabby Stabby action guaranteed! Run while you can!</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DUELIST UPGRADED</text:p>
          </table:table-cell>
          <table:table-cell office:value-type="string" calcext:value-type="string">
            <text:p>https://r.res.easebar.com/pic/20260114/b43a5885-06d3-4e7f-a65a-862e8b0a75b8.png</text:p>
          </table:table-cell>
          <table:table-cell office:value-type="string" calcext:value-type="string">
            <text:p>Check out the best trash talk in the Chronoverse! Keep taunting and melting their HP! I even block their screen, so they can't see squat. Plus, I tank hits like a champ. Enemies that stick around too long get the bottom of their screen taped up. By the end, they won't even find their health bar and whatnot. Good luck fighting what you can't see, sucker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AZARDOUS HIJINKS - DUELIST UPGRADED</text:p>
          </table:table-cell>
          <table:table-cell office:value-type="string" calcext:value-type="string">
            <text:p>https://r.res.easebar.com/pic/20260114/6b324b73-b598-456a-9559-b42bf1e77176.png</text:p>
          </table:table-cell>
          <table:table-cell office:value-type="string" calcext:value-type="string">
            <text:p>Now with bouncy castle action! Slash, bounce, repeat. It's like the world's deadliest pinball!. Cooldowns? Never heard of 'em. Keep going as long as you hit stuff, just don't let me fall flat on my as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DSHOT! - DUELIST UPGRADED</text:p>
          </table:table-cell>
          <table:table-cell office:value-type="string" calcext:value-type="string">
            <text:p>https://r.res.easebar.com/pic/20260116/edddeceb-fcc3-4937-b3f3-ef12531eaf98.png</text:p>
          </table:table-cell>
          <table:table-cell office:value-type="string" calcext:value-type="string">
            <text:p>Juggle my noggin for extra throws! If you catch it thrice, it goes kaboom. Everyone gets a piece of my mind</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POP QUIZ! - UPGRADED</text:p>
          </table:table-cell>
          <table:table-cell office:value-type="string" calcext:value-type="string">
            <text:p>https://r.res.easebar.com/pic/20260116/83b33337-d2fb-4d39-929e-096c8aa53056.png</text:p>
          </table:table-cell>
          <table:table-cell office:value-type="string" calcext:value-type="string">
            <text:p>Don't just stand there, you blockhead! The challenge's still rolling. But don't worry, I'm not one of those money-hungry scam artists. The buffs are on the house, no price hike. Take on this challenge, and you'll get three freebies: a little Speed boost, Continuous Healing, and Damage Up. Hit enough baddies with the right abilities exactly as I ask, and you unlock the ultimate bundle (Super Speed, Super Healing, Damage Boost AND reset all your cooldowns (except Healing Factor; no cheating!). Now THAT'S lov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SKILL ISSUE - UPGRADED</text:p>
          </table:table-cell>
          <table:table-cell office:value-type="string" calcext:value-type="string">
            <text:p>https://r.res.easebar.com/pic/20260116/05a3bb0c-552b-48d5-9cd0-1f7e1e349923.png</text:p>
          </table:table-cell>
          <table:table-cell office:value-type="string" calcext:value-type="string">
            <text:p>Dumbpoochu, I choose you! Taunt time! Their HP melts away, and if they whiff an ability, they get bonus pain AND Vulnerability. Double whammy! Objection? Overruled!</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UAL DESERT EAGLES - STRATEGIST</text:p>
          </table:table-cell>
          <table:table-cell office:value-type="string" calcext:value-type="string">
            <text:p>https://r.res.easebar.com/pic/20260114/742f6ca8-600f-484d-8675-bac5d7b3788a.png</text:p>
          </table:table-cell>
          <table:table-cell office:value-type="string" calcext:value-type="string">
            <text:p>Nobody lays a finger on my teammates! Anyone tries, and I'm firing these big boy bullets straight at their fac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PWNAGE POUND</text:p>
          </table:table-cell>
          <table:table-cell office:value-type="string" calcext:value-type="string">
            <text:p>https://r.res.easebar.com/pic/20260116/8480f602-9af4-45fd-b52d-1a12f22cb3b8.png</text:p>
          </table:table-cell>
          <table:table-cell office:value-type="string" calcext:value-type="string">
            <text:p>You! Yeah, you - the hyper one! Eyes off my friends. I sentence you to...whatever! Get ready to be taunted. I get bonus HP and healing, and if you whiff your abilities, you take damage, and I get even more HP!</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BOUNCING BOBBLEHEAD - STRATEGIST</text:p>
          </table:table-cell>
          <table:table-cell office:value-type="string" calcext:value-type="string">
            <text:p>https://r.res.easebar.com/pic/20260116/5d99dd32-9db1-4810-8b0d-6b760db4bdf7.png</text:p>
          </table:table-cell>
          <table:table-cell office:value-type="string" calcext:value-type="string">
            <text:p>Plushie power! It stops every single attack those chumps throw, giving my team a safety bubble. It's cute AND bulletproof</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HOP</text:p>
          </table:table-cell>
          <table:table-cell office:value-type="string" calcext:value-type="string">
            <text:p>https://r.res.easebar.com/pic/20260114/ed8221fc-11a3-48a6-bfe8-03d37528203a.png</text:p>
          </table:table-cell>
          <table:table-cell office:value-type="string" calcext:value-type="string">
            <text:p>Yup, I can double jump in midair! During The Big Test and its upgrade, I can also stomp heads and wall jump to reset its cooldown. Stomp enemies so hard they won't get near my team!</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FACTOR</text:p>
          </table:table-cell>
          <table:table-cell office:value-type="string" calcext:value-type="string">
            <text:p>https://r.res.easebar.com/pic/20260114/0ef403ed-dc90-4200-9d01-f46dc30be7e7.png</text:p>
          </table:table-cell>
          <table:table-cell office:value-type="string" calcext:value-type="string">
            <text:p>Out of combat? I'm healing up, staying battle-ready to protect my team. And if I'm about to croak? Surprise! I get a free pass, and my health zooms back up. Nice try, villain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XIMUM FLAIR</text:p>
          </table:table-cell>
          <table:table-cell office:value-type="string" calcext:value-type="string">
            <text:p>https://r.res.easebar.com/pic/20260114/aef6ba6f-d996-4c2d-ba9e-ef34a0cc9ddc.png</text:p>
          </table:table-cell>
          <table:table-cell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UPGRADE!</text:p>
          </table:table-cell>
          <table:table-cell office:value-type="string" calcext:value-type="string">
            <text:p>https://r.res.easebar.com/pic/20260114/18700c8d-3453-49d2-8da7-622b77e22dae.png</text:p>
          </table:table-cell>
          <table:table-cell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STRATEGIST</text:p>
          </table:table-cell>
          <table:table-cell office:value-type="string" calcext:value-type="string">
            <text:p>https://r.res.easebar.com/pic/20260114/fa941747-fc9e-4138-af71-9dc6b0fc6a54.png</text:p>
          </table:table-cell>
          <table:table-cell office:value-type="string" calcext:value-type="string">
            <text:p>Want to hurt my team? Good luck! I hit you with a taunt, mess up your vision, and burn your health nonstop! Best part: my swords and guns go full turbo for the duration. Blink and you'll miss it</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KICK@$$ KATANA - STRATEGIST</text:p>
          </table:table-cell>
          <table:table-cell office:value-type="string" calcext:value-type="string">
            <text:p>https://r.res.easebar.com/pic/20260114/e091b58b-f4c4-4094-9076-5aa489f85ec6.png</text:p>
          </table:table-cell>
          <table:table-cell office:value-type="string" calcext:value-type="string">
            <text:p>Protecting my team means my katanas go full savage. No mercy for the baddie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FINAL EXAM</text:p>
          </table:table-cell>
          <table:table-cell office:value-type="string" calcext:value-type="string">
            <text:p>https://r.res.easebar.com/pic/20260116/cb9139a3-04c0-41b5-ad70-114a5e5baef5.png</text:p>
          </table:table-cell>
          <table:table-cell office:value-type="string" calcext:value-type="string">
            <text:p>Wake the #!&amp;% up, hero! We've got a game to win! Speed and healing buffs for starters, bonus Healing Hijinks for me, and extra HP for me and my nearby friends. Hit enough baddies with the right abilities exactly as I ask, and you unlock mega speed and healing, plus reset my Healing Factor cooldown!. Team protection mode: activated!</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HIJINKS - STRATEGIST</text:p>
          </table:table-cell>
          <table:table-cell office:value-type="string" calcext:value-type="string">
            <text:p>https://r.res.easebar.com/pic/20260114/cbd80a74-aafa-46b2-96c8-645bb247f439.png</text:p>
          </table:table-cell>
          <table:table-cell office:value-type="string" calcext:value-type="string">
            <text:p>Try getting to my teammates, I dare you! My dash slash knocks fools down, and if I hit, I get to do it again. Up to three times, baby!</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HOP</text:p>
          </table:table-cell>
          <table:table-cell office:value-type="string" calcext:value-type="string">
            <text:p>https://r.res.easebar.com/pic/20260114/d86afade-9135-4cbd-87d0-18d484cf7556.png</text:p>
          </table:table-cell>
          <table:table-cell office:value-type="string" calcext:value-type="string">
            <text:p>Yup, I can double jump in midair! During Final Exam and its upgrade, I can also stomp heads and wall jump to reset its cooldown. Stomp enemies so hard they won't get near my team!</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FACTOR</text:p>
          </table:table-cell>
          <table:table-cell office:value-type="string" calcext:value-type="string">
            <text:p>https://r.res.easebar.com/pic/20260114/257f524b-d3e0-438f-b7cc-01b8a2f7efdc.png</text:p>
          </table:table-cell>
          <table:table-cell office:value-type="string" calcext:value-type="string">
            <text:p>Out of combat? I'm healing up, staying battle-ready to protect my team. And if I'm about to croak? Surprise! I get a free pass, and my health zooms back up. Nice try, villain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MAXIMUM FLAIR</text:p>
          </table:table-cell>
          <table:table-cell office:value-type="string" calcext:value-type="string">
            <text:p>https://r.res.easebar.com/pic/20260114/7f9679be-20c5-48d5-b232-7ba2172b04b9.png</text:p>
          </table:table-cell>
          <table:table-cell office:value-type="string" calcext:value-type="string">
            <text:p>Listen up, eyes on the prize, don't wander off! Every time my abilities land on a bad guy, the style points shoot up a notch! When it's full, I can pop my ultimate! With me on the team, you're all staying alive and fabulou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UPGRADE!</text:p>
          </table:table-cell>
          <table:table-cell office:value-type="string" calcext:value-type="string">
            <text:p>https://r.res.easebar.com/pic/20260114/d628f429-4396-4fea-89bb-c9367cec8478.png</text:p>
          </table:table-cell>
          <table:table-cell office:value-type="string" calcext:value-type="string">
            <text:p>I'm here to smack baddies, get XP, and shield my friends! When my XP is full, I get to upgrade an ability! Bonus: Score the final hit and force your foe into a selfieâmore XP for me! I'm invincible while striking my best duckface. No photobomb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STRATEGIST</text:p>
          </table:table-cell>
          <table:table-cell office:value-type="string" calcext:value-type="string">
            <text:p>https://r.res.easebar.com/pic/20260114/10363965-15e5-4296-8132-9732627c1c8f.png</text:p>
          </table:table-cell>
          <table:table-cell office:value-type="string" calcext:value-type="string">
            <text:p>Want to hurt my team? Good luck! I hit you with a taunt, mess up your vision, and burn your health nonstop! Best part: my swords and guns go full turbo for the duration. Blink and you'll miss it</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UAL DESERT EAGLES - STRATEGIST UPGRADED</text:p>
          </table:table-cell>
          <table:table-cell office:value-type="string" calcext:value-type="string">
            <text:p>https://r.res.easebar.com/pic/20260114/78599d08-a3e3-40a7-a163-59e4135f91f9.png</text:p>
          </table:table-cell>
          <table:table-cell office:value-type="string" calcext:value-type="string">
            <text:p>I rack up shots, then, BOOM! A mind-blowing bubble bomb for all the enemies. Teammate security: maximum</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KICK@$$ KATANA - STRATEGIST UPGRADED</text:p>
          </table:table-cell>
          <table:table-cell office:value-type="string" calcext:value-type="string">
            <text:p>https://r.res.easebar.com/pic/20260114/351cd1a6-3b7e-4bd8-93b2-8f672d1528c6.png</text:p>
          </table:table-cell>
          <table:table-cell office:value-type="string" calcext:value-type="string">
            <text:p>Relax, you've got Deadpool on your side! Swords out, baddies out. My stab hits crit, and a Healing Hop hit makes the next swing a stabby special</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DEADPOOL IN YOUR AREA - STRATEGIST UPGRADED</text:p>
          </table:table-cell>
          <table:table-cell office:value-type="string" calcext:value-type="string">
            <text:p>https://r.res.easebar.com/pic/20260114/cf86463c-760f-4bbf-9dda-f45465f9872a.png</text:p>
          </table:table-cell>
          <table:table-cell office:value-type="string" calcext:value-type="string">
            <text:p>Teammates, stay safe! Dummies, look here! It's showtime: I taunt, blind you, and hit warp speed with my swords and guns. Plus, my crew gets a damage reduction buff, so they're basically invincible. Dummies that stick around too long will even have their UI taped over!</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HEALING HIJINKS - STRATEGIST UPGRADED</text:p>
          </table:table-cell>
          <table:table-cell office:value-type="string" calcext:value-type="string">
            <text:p>https://r.res.easebar.com/pic/20260114/dec06e87-6750-4796-91bf-a77d08cb8ce9.png</text:p>
          </table:table-cell>
          <table:table-cell office:value-type="string" calcext:value-type="string">
            <text:p>Watch this pro bodyguard in action! I dash forward, nail the bad guy, and bounce in any direction I want. Oh, and I can do this two more times real quick!</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BOUNCING BOBBLEHEAD - STRATEGIST UPGRADED</text:p>
          </table:table-cell>
          <table:table-cell office:value-type="string" calcext:value-type="string">
            <text:p>https://r.res.easebar.com/pic/20260116/a0174fbe-7018-46bf-b960-9b88bbbbf227.png</text:p>
          </table:table-cell>
          <table:table-cell office:value-type="string" calcext:value-type="string">
            <text:p>My ultra-cool, super shiny, extra huggable, and totally blinged-out plushy. Toss it ahead, and it lands as an invincible sphere of awesomeness! Blocking attacks and keeping my team safe inside our furry fortress</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FINAL EXAM - UPGRADED</text:p>
          </table:table-cell>
          <table:table-cell office:value-type="string" calcext:value-type="string">
            <text:p>https://r.res.easebar.com/pic/20260116/070f508b-a481-4fb2-8304-46bd0f690137.png</text:p>
          </table:table-cell>
          <table:table-cell office:value-type="string" calcext:value-type="string">
            <text:p>Hey, player! Warm-up's over, time for the main event! Speed, healing, dashes, for me, and bonus HP for all! Smash enough baddies with the skills I say, and you unlock super buffs(massive speed and healing), plus Healing Factor resets. For some time after, each hit means more HP for the crew and you. Don't mess this up!</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DEADPOOL</text:p>
          </table:table-cell>
          <table:table-cell office:value-type="string" calcext:value-type="string">
            <text:p>PWNAGE POUND - UPGRADED</text:p>
          </table:table-cell>
          <table:table-cell office:value-type="string" calcext:value-type="string">
            <text:p>https://r.res.easebar.com/pic/20260116/f6c942a1-e1fd-4360-beda-fc4f62ceb0e0.png</text:p>
          </table:table-cell>
          <table:table-cell office:value-type="string" calcext:value-type="string">
            <text:p>Upgraded courtroom drama! Congrats, unlucky one! You're my pick; enjoy the taunt! I score bonus health and healing, and you take ongoing damage. If you miss an ability while court is in session, it's a double whammy. You get more pain, AND I get more extra HP! Thanks in advance!</text:p>
          </table:table-cell>
          <table:table-cell office:value-type="string" calcext:value-type="string">
            <text:p>https://www.marvelrivals.com/20260115/41360_1281973.html</text:p>
          </table:table-cell>
          <table:table-cell table:number-columns-repeated="16379"/>
        </table:table-row>
        <table:table-row table:style-name="ro1">
          <table:table-cell office:value-type="string" calcext:value-type="string">
            <text:p>Rogue</text:p>
          </table:table-cell>
          <table:table-cell office:value-type="string" calcext:value-type="string">
            <text:p>Power Surge Punch</text:p>
          </table:table-cell>
          <table:table-cell office:value-type="string" calcext:value-type="string">
            <text:p>https://r.res.easebar.com/pic/20251212/60a3fc70-a087-4e74-a818-74f20c3764b6.png</text:p>
          </table:table-cell>
          <table:table-cell office:value-type="string" calcext:value-type="string">
            <text:p>Punch forward with both fists</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Defensive Stance</text:p>
          </table:table-cell>
          <table:table-cell office:value-type="string" calcext:value-type="string">
            <text:p>https://r.res.easebar.com/pic/20251212/6df4eb8d-f7ba-4808-8680-073c0f1286af.png</text:p>
          </table:table-cell>
          <table:table-cell office:value-type="string" calcext:value-type="string">
            <text:p>Absorb nearby projectiles and reduce incoming damage; absorbed damage powers up your next Southern Brawl</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Southern Brawl</text:p>
          </table:table-cell>
          <table:table-cell office:value-type="string" calcext:value-type="string">
            <text:p>https://r.res.easebar.com/pic/20251212/965eb4f6-cddc-4a8d-8c72-8be39286bc1a.png</text:p>
          </table:table-cell>
          <table:table-cell office:value-type="string" calcext:value-type="string">
            <text:p>While in Defensive Stance, dash forward and slam enemies in front, dealing area damage</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Chrono Kick Combo</text:p>
          </table:table-cell>
          <table:table-cell office:value-type="string" calcext:value-type="string">
            <text:p>https://r.res.easebar.com/pic/20251212/f4b1d6b3-447e-47fd-bc18-9585ca699b80.png</text:p>
          </table:table-cell>
          <table:table-cell office:value-type="string" calcext:value-type="string">
            <text:p>Dash forward and launch the enemy, entering flight; activate again to Knock Down nearby enemies. Your next two Power Surge Punch attacks become ranged, piercing enemies and granting Bonus Health</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Fatal Attraction</text:p>
          </table:table-cell>
          <table:table-cell office:value-type="string" calcext:value-type="string">
            <text:p>https://r.res.easebar.com/pic/20251212/922413ba-afba-4475-b0f1-97e46caec2a3.png</text:p>
          </table:table-cell>
          <table:table-cell office:value-type="string" calcext:value-type="string">
            <text:p>Dash forward. Press again to unleash a burst of Chronovium Power, dealing continuous damage to nearby foes; after a delay, the energy retracts, pulling all enemies towards Rogue</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Ability Absorption</text:p>
          </table:table-cell>
          <table:table-cell office:value-type="string" calcext:value-type="string">
            <text:p>https://r.res.easebar.com/pic/20251212/20a291b6-507e-4d9b-bd23-b215f1feb887.png</text:p>
          </table:table-cell>
          <table:table-cell office:value-type="string" calcext:value-type="string">
            <text:p>Dash forward to knock down your target and absorb their energy; after absorbing, replace Ability Absorption with one of their abilities or refresh Fatal Attraction. Also absorb Health and stats based on their role</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Heartbreaker</text:p>
          </table:table-cell>
          <table:table-cell office:value-type="string" calcext:value-type="string">
            <text:p>https://r.res.easebar.com/pic/20251212/c5ba783e-9ca3-436c-bcaa-a1dc284b6355.png</text:p>
          </table:table-cell>
          <table:table-cell office:value-type="string" calcext:value-type="string">
            <text:p>Continuously absorb Ultimate Ability Energy from nearby enemies and steal stats based on their role</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Rogue</text:p>
          </table:table-cell>
          <table:table-cell office:value-type="string" calcext:value-type="string">
            <text:p>HEARTS AS ONE</text:p>
          </table:table-cell>
          <table:table-cell office:value-type="string" calcext:value-type="string">
            <text:p>https://r.res.easebar.com/pic/20251212/c5b731bf-5102-4caf-96d1-ba09c16e4e87.png</text:p>
          </table:table-cell>
          <table:table-cell office:value-type="string" calcext:value-type="string">
            <text:p>Gambit shares kinetic energy with Magneto and Rogue. When Magneto activates this ability, Iron Volley is replaced with Ace Greatsword, which detonates upon striking enemies. The explosion leaves residual kinetic energy within the target, inflicting secondary damage after a brief delay. When Rogue activates the ability, each of her attacks causes a kinetic explosion that damages nearby enemies and heals nearby allies</text:p>
          </table:table-cell>
          <table:table-cell office:value-type="string" calcext:value-type="string">
            <text:p>https://www.marvelrivals.com/20251212/41360_1276333.html</text:p>
          </table:table-cell>
          <table:table-cell table:number-columns-repeated="16379"/>
        </table:table-row>
        <table:table-row table:style-name="ro1">
          <table:table-cell office:value-type="string" calcext:value-type="string">
            <text:p>Gambit</text:p>
          </table:table-cell>
          <table:table-cell office:value-type="string" calcext:value-type="string">
            <text:p>Kinetic Cards</text:p>
          </table:table-cell>
          <table:table-cell office:value-type="string" calcext:value-type="string">
            <text:p>https://r.res.easebar.com/pic/20251114/803eab7e-6824-40ba-8439-6852d4d13098.png</text:p>
          </table:table-cell>
          <table:table-cell office:value-type="string" calcext:value-type="string">
            <text:p>Launch three kinetic-charged cards in an arc ahead. Each card detonates on impact, creating a single-target explosion that damages enemies and heals allies</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Ragin' Royal Flush</text:p>
          </table:table-cell>
          <table:table-cell office:value-type="string" calcext:value-type="string">
            <text:p>https://r.res.easebar.com/pic/20251114/1dca6707-3f6b-48ef-a180-1f2a6f2f0c6c.png</text:p>
          </table:table-cell>
          <table:table-cell office:value-type="string" calcext:value-type="string">
            <text:p>Lock onto an ally within sight and unleash multiple Aces that heal and Purify. Both enter the Kinetic Transfer state, granting increased Movement Speed and Jump Boost, while enhancing attacks with additional single-target explosive damage and providing the ally with Ultimate Ability Charge Acceleration</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Cajun Charge</text:p>
          </table:table-cell>
          <table:table-cell office:value-type="string" calcext:value-type="string">
            <text:p>https://r.res.easebar.com/pic/20251114/ac36a353-d40b-4511-a13a-27f14a429c04.png</text:p>
          </table:table-cell>
          <table:table-cell office:value-type="string" calcext:value-type="string">
            <text:p>Side-step forward with bo staff in hand, dashing a short distance</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Healing Hearts</text:p>
          </table:table-cell>
          <table:table-cell office:value-type="string" calcext:value-type="string">
            <text:p>https://r.res.easebar.com/pic/20251114/6ac2c5f0-a2b1-4c61-9a9d-ad754bf80f8b.png</text:p>
          </table:table-cell>
          <table:table-cell office:value-type="string" calcext:value-type="string">
            <text:p>Conjure a Heart card by consuming one stack of  Sleight of Hand to Heal and switch to the Healing Hearts deck</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Breaking Spades</text:p>
          </table:table-cell>
          <table:table-cell office:value-type="string" calcext:value-type="string">
            <text:p>https://r.res.easebar.com/pic/20251114/1ef52531-92a7-4f67-8087-c439b12fd268.png</text:p>
          </table:table-cell>
          <table:table-cell office:value-type="string" calcext:value-type="string">
            <text:p>Conjure a Spade card by consuming one stack of  Sleight of Hand to gain Damage Boost and switch to the Breaking Spades deck</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Bayou Bash</text:p>
          </table:table-cell>
          <table:table-cell office:value-type="string" calcext:value-type="string">
            <text:p>https://r.res.easebar.com/pic/20251114/c8149d2a-578d-425b-baef-97750a81d644.png</text:p>
          </table:table-cell>
          <table:table-cell office:value-type="string" calcext:value-type="string">
            <text:p>Channel kinetic energy into the bo staff, then slam it into the ground after a sweeping strike, creating a shockwave that damages nearby enemies and heals allies</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ACE OF ACES</text:p>
          </table:table-cell>
          <table:table-cell office:value-type="string" calcext:value-type="string">
            <text:p>https://r.res.easebar.com/pic/20251114/0e30670c-1902-40f4-94ab-95be6d0bd05b.png</text:p>
          </table:table-cell>
          <table:table-cell office:value-type="string" calcext:value-type="string">
            <text:p>Gambit charges Magneto's greatsword with kinetic energy. When Magneto activates this ability, Iron Volley is replaced with Ace Greatsword, which detonates upon striking enemies. The explosion leaves residual kinetic energy within the target, inflicting secondary damage after a brief delay</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Bridge Boost</text:p>
          </table:table-cell>
          <table:table-cell office:value-type="string" calcext:value-type="string">
            <text:p>https://r.res.easebar.com/pic/20251114/c698518d-fcb9-49f7-88e4-6a0fdef24189.png</text:p>
          </table:table-cell>
          <table:table-cell office:value-type="string" calcext:value-type="string">
            <text:p>While Healing Hearts deck is active, trigger Flush Empowerment to card spring and fire a full deck forward. Cards bounce between allies on impact, granting Health and a Healing Boost</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Purifying Pick-Up</text:p>
          </table:table-cell>
          <table:table-cell office:value-type="string" calcext:value-type="string">
            <text:p>https://r.res.easebar.com/pic/20251114/4721ac14-6de6-4a2c-ad41-41f66bcf60ef.png</text:p>
          </table:table-cell>
          <table:table-cell office:value-type="string" calcext:value-type="string">
            <text:p>While Healing Hearts deck is active, trigger Raise Empowerment to launch a cluster of cards in an arc ahead. Explosions heal nearby allies and Purify them</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Explosive Trick</text:p>
          </table:table-cell>
          <table:table-cell office:value-type="string" calcext:value-type="string">
            <text:p>https://r.res.easebar.com/pic/20251114/fd0e01ed-c52f-47c1-bfcf-cf6f21d7489f.png</text:p>
          </table:table-cell>
          <table:table-cell office:value-type="string" calcext:value-type="string">
            <text:p>While Breaking Spades deck is active, trigger Flush Empowerment to fire a full set of cards forward. Cards explode on impact, dealing damage while inflicting Reduced Healing</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Gambit</text:p>
          </table:table-cell>
          <table:table-cell office:value-type="string" calcext:value-type="string">
            <text:p>Bidding Barrage</text:p>
          </table:table-cell>
          <table:table-cell office:value-type="string" calcext:value-type="string">
            <text:p>https://r.res.easebar.com/pic/20251114/5b36fc07-c4e6-496a-9944-efb824adfe0f.png</text:p>
          </table:table-cell>
          <table:table-cell office:value-type="string" calcext:value-type="string">
            <text:p>While Breaking Spades deck is active, trigger Raise Empowerment to scattering cards in an arc in all directions. Explosions damage enemies and Launch them up</text:p>
          </table:table-cell>
          <table:table-cell office:value-type="string" calcext:value-type="string">
            <text:p>https://www.marvelrivals.com/20251114/41360_1270998.html</text:p>
          </table:table-cell>
          <table:table-cell table:number-columns-repeated="16379"/>
        </table:table-row>
        <table:table-row table:style-name="ro1">
          <table:table-cell office:value-type="string" calcext:value-type="string">
            <text:p>Daredevil</text:p>
          </table:table-cell>
          <table:table-cell office:value-type="string" calcext:value-type="string">
            <text:p>JUSTICE JAB</text:p>
          </table:table-cell>
          <table:table-cell office:value-type="string" calcext:value-type="string">
            <text:p>https://r.res.easebar.com/pic/20251010/9a0c9bf6-2e70-4a7a-8aac-92e1a9691ecb.png</text:p>
          </table:table-cell>
          <table:table-cell office:value-type="string" calcext:value-type="string">
            <text:p>Swing Billy Clubs forward. Gain Fury on hit</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RIGHTEOUS CROSS</text:p>
          </table:table-cell>
          <table:table-cell office:value-type="string" calcext:value-type="string">
            <text:p>https://r.res.easebar.com/pic/20251010/ee03f218-5394-415f-b11a-3a4858128d81.png</text:p>
          </table:table-cell>
          <table:table-cell office:value-type="string" calcext:value-type="string">
            <text:p>Cross your Billy Clubs and surge forward. Gain Fury on hit</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OBJECTION!</text:p>
          </table:table-cell>
          <table:table-cell office:value-type="string" calcext:value-type="string">
            <text:p>https://r.res.easebar.com/pic/20251010/0d23a7fb-886a-4f9c-91ef-22eddd0352a9.png</text:p>
          </table:table-cell>
          <table:table-cell office:value-type="string" calcext:value-type="string">
            <text:p>Whirl billy clubs in a tight guard to block frontal damage and reflect projectiles, becoming immune to all incoming harm during this stance and gain Fury</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DEVIL'S LATCH</text:p>
          </table:table-cell>
          <table:table-cell office:value-type="string" calcext:value-type="string">
            <text:p>https://r.res.easebar.com/pic/20251010/39ffe656-8f28-43c4-be3d-cc79ed2df6a5.png</text:p>
          </table:table-cell>
          <table:table-cell office:value-type="string" calcext:value-type="string">
            <text:p>Fire a grappling line that reels Daredevil and his target toward each other. On completion, gain Fury and temporarily enables Cross Interrogation</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INFERNAL FURY</text:p>
          </table:table-cell>
          <table:table-cell office:value-type="string" calcext:value-type="string">
            <text:p>https://r.res.easebar.com/pic/20251010/e0e39493-ba93-4947-a38f-7d86f314b48b.png</text:p>
          </table:table-cell>
          <table:table-cell office:value-type="string" calcext:value-type="string">
            <text:p>Expend Fury to unleash Devil's Chain or Devil's Throw. Devil's Chain converts damage into Bonus Health, while Devil's Throw Slows enemies on hit and temporarily enables Cross Interrogation</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Sonic Pursuit</text:p>
          </table:table-cell>
          <table:table-cell office:value-type="string" calcext:value-type="string">
            <text:p>https://r.res.easebar.com/pic/20251010/041a40d0-92c7-4a69-9ddd-92af7dbaf73f.png</text:p>
          </table:table-cell>
          <table:table-cell office:value-type="string" calcext:value-type="string">
            <text:p>Locks onto a target, gaining increased Speed; and Damage Reduction when attacked. While in range, dash to the target, Blinding them and restore Fury</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RADAR SENSE</text:p>
          </table:table-cell>
          <table:table-cell office:value-type="string" calcext:value-type="string">
            <text:p>https://r.res.easebar.com/pic/20251010/1dd21aa7-df86-4264-9861-76e20570a272.png</text:p>
          </table:table-cell>
          <table:table-cell office:value-type="string" calcext:value-type="string">
            <text:p>Detect enemy movements within a set radius</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BLIND ASCENT</text:p>
          </table:table-cell>
          <table:table-cell office:value-type="string" calcext:value-type="string">
            <text:p>https://r.res.easebar.com/pic/20251010/ce9cbf4e-0c10-4fbe-bd57-af7eada7b84e.png</text:p>
          </table:table-cell>
          <table:table-cell office:value-type="string" calcext:value-type="string">
            <text:p>Run along walls and spring off them to reposition</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LET THE DEVIL OUT</text:p>
          </table:table-cell>
          <table:table-cell office:value-type="string" calcext:value-type="string">
            <text:p>https://r.res.easebar.com/pic/20251010/0aa73672-4753-4c5d-9f39-e501bd6dbbae.png</text:p>
          </table:table-cell>
          <table:table-cell office:value-type="string" calcext:value-type="string">
            <text:p>Embrace the Beast within. Enemies in Daredevil's line of sight take damage and suffer a ramping Blind effect. Continually gain Fury while active</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Daredevil</text:p>
          </table:table-cell>
          <table:table-cell office:value-type="string" calcext:value-type="string">
            <text:p>BLIND VERDICT</text:p>
          </table:table-cell>
          <table:table-cell office:value-type="string" calcext:value-type="string">
            <text:p>https://r.res.easebar.com/pic/20251010/b101bc7c-3d49-48dc-a02a-7e13cba90108.png</text:p>
          </table:table-cell>
          <table:table-cell office:value-type="string" calcext:value-type="string">
            <text:p>Daredevil shares the location of his Sonic Pursuit target with The Punisher. At the same time, The Punisher can launch a devil-infused shock grenade to damage and blind enemies</text:p>
          </table:table-cell>
          <table:table-cell office:value-type="string" calcext:value-type="string">
            <text:p>https://www.marvelrivals.com/20251009/41360_1263889.html</text:p>
          </table:table-cell>
          <table:table-cell table:number-columns-repeated="16379"/>
        </table:table-row>
        <table:table-row table:style-name="ro1">
          <table:table-cell office:value-type="string" calcext:value-type="string">
            <text:p>ANGELA</text:p>
          </table:table-cell>
          <table:table-cell office:value-type="string" calcext:value-type="string">
            <text:p>Spear of Ichors</text:p>
          </table:table-cell>
          <table:table-cell office:value-type="string" calcext:value-type="string">
            <text:p>https://r.res.easebar.com/pic/20250911/5a3ec9ee-6a3b-44ac-b64c-ebb34f28c425.png</text:p>
          </table:table-cell>
          <table:table-cell office:value-type="string" calcext:value-type="string">
            <text:p>Lunge forward with your spear, dealing damage that increases with Attack Charge. At full charge, Spear of Ichor can launch up enemies</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Axes Of Ichors</text:p>
          </table:table-cell>
          <table:table-cell office:value-type="string" calcext:value-type="string">
            <text:p>https://r.res.easebar.com/pic/20250911/6e3c4ad4-32a2-4140-83f3-03e236885da2.png</text:p>
          </table:table-cell>
          <table:table-cell office:value-type="string" calcext:value-type="string">
            <text:p>Alternate powerful strikes forward with twin axes, dealing increased damage as Attack Charge grows. The fourth strike propels you forward in a swift dash</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SHIELDED STANCE</text:p>
          </table:table-cell>
          <table:table-cell office:value-type="string" calcext:value-type="string">
            <text:p>https://r.res.easebar.com/pic/20250911/89c12b85-cd4c-4d3e-a6b8-b628c6de8eba.png</text:p>
          </table:table-cell>
          <table:table-cell office:value-type="string" calcext:value-type="string">
            <text:p>Transform Ichors into a shield, gaining Attack Charge when absorbing damage</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Seraphic Soar</text:p>
          </table:table-cell>
          <table:table-cell office:value-type="string" calcext:value-type="string">
            <text:p>https://r.res.easebar.com/pic/20250911/06ebb164-e0fe-494a-bfe9-58c81de0d369.png</text:p>
          </table:table-cell>
          <table:table-cell office:value-type="string" calcext:value-type="string">
            <text:p>Glide freely through the air. Continuous flight builds Attack Charge</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Divine Judgement</text:p>
          </table:table-cell>
          <table:table-cell office:value-type="string" calcext:value-type="string">
            <text:p>https://r.res.easebar.com/pic/20250911/4738a04f-deef-40f5-9e53-51c71b8dcaa7.png</text:p>
          </table:table-cell>
          <table:table-cell office:value-type="string" calcext:value-type="string">
            <text:p>Dive downward, switch to twin axes and infuse the ground with Ichors to create a Divine Judgement Zone upon impact. Within the zone, gain enhanced Speed and attacks grant Bonus Health to self and nearby allies</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Wingblade Ascent</text:p>
          </table:table-cell>
          <table:table-cell office:value-type="string" calcext:value-type="string">
            <text:p>https://r.res.easebar.com/pic/20250911/32ac3b89-8941-4ee9-9b81-fd14fdfff36b.png</text:p>
          </table:table-cell>
          <table:table-cell office:value-type="string" calcext:value-type="string">
            <text:p>Take to the skies, switching back to Spear of Ichors</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Assassin's Charge</text:p>
          </table:table-cell>
          <table:table-cell office:value-type="string" calcext:value-type="string">
            <text:p>https://r.res.easebar.com/pic/20250911/dc923ca4-e2a4-4448-92e0-cae6d029e5f1.png</text:p>
          </table:table-cell>
          <table:table-cell office:value-type="string" calcext:value-type="string">
            <text:p>Enter an accelerated dash state,  enemies struck head-on are carried through the air for a short distance</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Heven's Retribution</text:p>
          </table:table-cell>
          <table:table-cell office:value-type="string" calcext:value-type="string">
            <text:p>https://r.res.easebar.com/pic/20250911/0240ecc1-d434-46cc-82ba-abdae0c275ef.png</text:p>
          </table:table-cell>
          <table:table-cell office:value-type="string" calcext:value-type="string">
            <text:p>Wrap your spear in ribbons and hurl it with force. Upon impact, the ribbons bind nearby enemies. Angela can leap to the spear's location, damaging surrounding enemies and creating a Divine Judgement Zone</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ANGELA</text:p>
          </table:table-cell>
          <table:table-cell office:value-type="string" calcext:value-type="string">
            <text:p>Celestial Command</text:p>
          </table:table-cell>
          <table:table-cell office:value-type="string" calcext:value-type="string">
            <text:p>https://r.res.easebar.com/pic/20250911/9761dd6e-a640-43f4-84d0-db6613e412ad.png</text:p>
          </table:table-cell>
          <table:table-cell office:value-type="string" calcext:value-type="string">
            <text:p>Angela shares fragments of her Ichors with Thor, empowering him to hurl a Thunder Spear that restores Thorforce for each enemy struck. Afterward, Thor can leap to the spear's explosion point, dealing a second wave of damage to all enemies within range</text:p>
          </table:table-cell>
          <table:table-cell office:value-type="string" calcext:value-type="string">
            <text:p>https://www.marvelrivals.com/20250911/41360_1258873.html</text:p>
          </table:table-cell>
          <table:table-cell table:number-columns-repeated="16379"/>
        </table:table-row>
        <table:table-row table:style-name="ro1">
          <table:table-cell office:value-type="string" calcext:value-type="string">
            <text:p>BLADE</text:p>
          </table:table-cell>
          <table:table-cell office:value-type="string" calcext:value-type="string">
            <text:p>Ancestral Sword</text:p>
          </table:table-cell>
          <table:table-cell office:value-type="string" calcext:value-type="string">
            <text:p>https://r.res.easebar.com/pic/20250808/7fbc426f-d5a0-4566-9d1f-00f79ad25bc3.png</text:p>
          </table:table-cell>
          <table:table-cell office:value-type="string" calcext:value-type="string">
            <text:p>Slash forward with Blade's Ancestral Sword</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BLADE</text:p>
          </table:table-cell>
          <table:table-cell office:value-type="string" calcext:value-type="string">
            <text:p>Hunter's Shotgun</text:p>
          </table:table-cell>
          <table:table-cell office:value-type="string" calcext:value-type="string">
            <text:p>https://r.res.easebar.com/pic/20250808/2b532b79-61a8-4300-98a8-5cbaa4f5a29b.png</text:p>
          </table:table-cell>
          <table:table-cell office:value-type="string" calcext:value-type="string">
            <text:p>Fire at enemies using your Shotgun</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BLADE</text:p>
          </table:table-cell>
          <table:table-cell office:value-type="string" calcext:value-type="string">
            <text:p>Scarlet Shroud</text:p>
          </table:table-cell>
          <table:table-cell office:value-type="string" calcext:value-type="string">
            <text:p>https://r.res.easebar.com/pic/20250808/38dda78b-768c-421d-a971-772db41ee3dd.png</text:p>
          </table:table-cell>
          <table:table-cell office:value-type="string" calcext:value-type="string">
            <text:p>Parry with Ancestral Sword to become Unstoppable for a brief period, reducing damage taken from the front and decreasing the cooldown of Daywalker Dash</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BLADE</text:p>
          </table:table-cell>
          <table:table-cell office:value-type="string" calcext:value-type="string">
            <text:p>Bloodline Awakening</text:p>
          </table:table-cell>
          <table:table-cell office:value-type="string" calcext:value-type="string">
            <text:p>https://r.res.easebar.com/pic/20250808/407381d7-9280-4cfc-9f6e-2dac3d07e0ce.png</text:p>
          </table:table-cell>
          <table:table-cell office:value-type="string" calcext:value-type="string">
            <text:p>Awaken the Dhampir bloodline, enhancing slash speed during continuous attacks and triggering Whirlwind Slash.If all Whirlwind Slash strikes hit, your Attack Speed will further increase. While under this state, you suffer Reduced Healing, but attacks gain Lifesteal</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BLADE</text:p>
          </table:table-cell>
          <table:table-cell office:value-type="string" calcext:value-type="string">
            <text:p>Daywalker Dash</text:p>
          </table:table-cell>
          <table:table-cell office:value-type="string" calcext:value-type="string">
            <text:p>https://r.res.easebar.com/pic/20250808/317a7483-cdd2-4114-9fed-861f7973e7cf.png</text:p>
          </table:table-cell>
          <table:table-cell office:value-type="string" calcext:value-type="string">
            <text:p>Dash forward. If wielding your gun, shoot at enemies upon impact, applying a Healing Reduction effect. If wielding your sword, deliver a cleaving strike that inflicts Slow</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BLADE</text:p>
          </table:table-cell>
          <table:table-cell office:value-type="string" calcext:value-type="string">
            <text:p>Thousand-Fold Slash</text:p>
          </table:table-cell>
          <table:table-cell office:value-type="string" calcext:value-type="string">
            <text:p>https://r.res.easebar.com/pic/20250808/76a3bf21-fa7d-46b9-af37-db2c078fda6f.png</text:p>
          </table:table-cell>
          <table:table-cell office:value-type="string" calcext:value-type="string">
            <text:p>Charge power and swiftly draw the Sword of Dracula, executing a powerful Iaido strike as you dash forward, leaving behind a slashing zone where the sword automatically strikes enemies. Enemies hit suffer Reduced Healing</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BLADE</text:p>
          </table:table-cell>
          <table:table-cell office:value-type="string" calcext:value-type="string">
            <text:p>ECLIPSE EDGE</text:p>
          </table:table-cell>
          <table:table-cell office:value-type="string" calcext:value-type="string">
            <text:p>https://r.res.easebar.com/pic/20251115/103c790d-0d19-45e9-aad0-3a5ca92c2313.png</text:p>
          </table:table-cell>
          <table:table-cell office:value-type="string" calcext:value-type="string">
            <text:p>Blessed by Khonshu, Blade gains a new ability. When activated, Blade swings his Ancestral Sword in a powerful slash, dashing forward a short distance. At the end of the dash, he swiftly slashes four times, each strike sending a Darkmoon Blade forward. When a Darkmoon Blade hits an enemy, it bounces to nearby targets</text:p>
          </table:table-cell>
          <table:table-cell office:value-type="string" calcext:value-type="string">
            <text:p>https://www.marvelrivals.com/20250808/41360_1252733.html</text:p>
          </table:table-cell>
          <table:table-cell table:number-columns-repeated="16379"/>
        </table:table-row>
        <table:table-row table:style-name="ro1">
          <table:table-cell office:value-type="string" calcext:value-type="string">
            <text:p>PHOENIX</text:p>
          </table:table-cell>
          <table:table-cell office:value-type="string" calcext:value-type="string">
            <text:p>Cosmic Flames</text:p>
          </table:table-cell>
          <table:table-cell office:value-type="string" calcext:value-type="string">
            <text:p>https://r.res.easebar.com/pic/20250710/e458821f-fbdc-4505-8407-0eafe85f5a22.png</text:p>
          </table:table-cell>
          <table:table-cell office:value-type="string" calcext:value-type="string">
            <text:p>Launch a fiery projectile forward, applying 1 Spark to enemies hit. Critical hits apply 2 Sparks. At 3 Sparks, Phoenix triggers a fiery explosion that applies 1 Spark to enemies around and Healing Over Time to self. Sparks from explosions will not stack within a brief period</text:p>
          </table:table-cell>
          <table:table-cell office:value-type="string" calcext:value-type="string">
            <text:p>https://www.marvelrivals.com/20250710/41360_1246363.html</text:p>
          </table:table-cell>
          <table:table-cell table:number-columns-repeated="16379"/>
        </table:table-row>
        <table:table-row table:style-name="ro1">
          <table:table-cell office:value-type="string" calcext:value-type="string">
            <text:p>PHOENIX</text:p>
          </table:table-cell>
          <table:table-cell office:value-type="string" calcext:value-type="string">
            <text:p>Telekinesis Burst</text:p>
          </table:table-cell>
          <table:table-cell office:value-type="string" calcext:value-type="string">
            <text:p>https://r.res.easebar.com/pic/20250710/986f26e7-7141-4dc9-90ac-acff1b8c380a.png</text:p>
          </table:table-cell>
          <table:table-cell office:value-type="string" calcext:value-type="string">
            <text:p>Mark a targeted area with psionic energy, followed by a series of fiery explosions. The first blast Stuns enemies, while the subsequent two explosions inflict Slow. Applies 1 Spark to enemies hit</text:p>
          </table:table-cell>
          <table:table-cell office:value-type="string" calcext:value-type="string">
            <text:p>https://www.marvelrivals.com/20250710/41360_1246363.html</text:p>
          </table:table-cell>
          <table:table-cell table:number-columns-repeated="16379"/>
        </table:table-row>
        <table:table-row table:style-name="ro1">
          <table:table-cell office:value-type="string" calcext:value-type="string">
            <text:p>PHOENIX</text:p>
          </table:table-cell>
          <table:table-cell office:value-type="string" calcext:value-type="string">
            <text:p>Dark Ascent</text:p>
          </table:table-cell>
          <table:table-cell office:value-type="string" calcext:value-type="string">
            <text:p>https://r.res.easebar.com/pic/20250710/7ef4eae3-1354-41eb-ac11-0fefbcd96808.png</text:p>
          </table:table-cell>
          <table:table-cell office:value-type="string" calcext:value-type="string">
            <text:p>Merge with the Phoenix, entering a state of free flight. Gain a Movement Boost</text:p>
          </table:table-cell>
          <table:table-cell office:value-type="string" calcext:value-type="string">
            <text:p>https://www.marvelrivals.com/20250710/41360_1246363.html</text:p>
          </table:table-cell>
          <table:table-cell table:number-columns-repeated="16379"/>
        </table:table-row>
        <table:table-row table:style-name="ro1">
          <table:table-cell office:value-type="string" calcext:value-type="string">
            <text:p>PHOENIX</text:p>
          </table:table-cell>
          <table:table-cell office:value-type="string" calcext:value-type="string">
            <text:p>Telepathic Illusion</text:p>
          </table:table-cell>
          <table:table-cell office:value-type="string" calcext:value-type="string">
            <text:p>https://r.res.easebar.com/pic/20250710/18388d22-1918-4cfe-98e3-7a59f701b1a6.png</text:p>
          </table:table-cell>
          <table:table-cell office:value-type="string" calcext:value-type="string">
            <text:p>Leave behind an illusion and instantly teleport in the desired direction, followed by detonating the illusion. Enemies hit are applied with 1 Spark</text:p>
          </table:table-cell>
          <table:table-cell office:value-type="string" calcext:value-type="string">
            <text:p>https://www.marvelrivals.com/20250710/41360_1246363.html</text:p>
          </table:table-cell>
          <table:table-cell table:number-columns-repeated="16379"/>
        </table:table-row>
        <table:table-row table:style-name="ro1">
          <table:table-cell office:value-type="string" calcext:value-type="string">
            <text:p>PHOENIX</text:p>
          </table:table-cell>
          <table:table-cell office:value-type="string" calcext:value-type="string">
            <text:p>Endsong Inferno</text:p>
          </table:table-cell>
          <table:table-cell office:value-type="string" calcext:value-type="string">
            <text:p>https://r.res.easebar.com/pic/20250710/4a733ade-7bcc-4152-b3e7-3dc01bfcdb06.png</text:p>
          </table:table-cell>
          <table:table-cell office:value-type="string" calcext:value-type="string">
            <text:p>Soar into the sky with the Phoenix and crash down onto a selected area, dealing devastating damage to enemies while creating a shockwave that destroys enemy summons, shields, and any Bonus Health. Enemies hit are applied with 1 Spark</text:p>
          </table:table-cell>
          <table:table-cell office:value-type="string" calcext:value-type="string">
            <text:p>https://www.marvelrivals.com/20250710/41360_1246363.html</text:p>
          </table:table-cell>
          <table:table-cell table:number-columns-repeated="16379"/>
        </table:table-row>
        <table:table-row table:style-name="ro1">
          <table:table-cell office:value-type="string" calcext:value-type="string">
            <text:p>PHOENIX</text:p>
          </table:table-cell>
          <table:table-cell office:value-type="string" calcext:value-type="string">
            <text:p>Mind's Grace</text:p>
          </table:table-cell>
          <table:table-cell office:value-type="string" calcext:value-type="string">
            <text:p>https://r.res.easebar.com/pic/20250710/89d03be4-06bc-4a67-abb6-f7e95a222760.png</text:p>
          </table:table-cell>
          <table:table-cell office:value-type="string" calcext:value-type="string">
            <text:p>Jean Grey imbues Wolverine with the awe-inspiring Phoenix Force</text:p>
          </table:table-cell>
          <table:table-cell office:value-type="string" calcext:value-type="string">
            <text:p>https://www.marvelrivals.com/20250710/41360_1246363.html</text:p>
          </table:table-cell>
          <table:table-cell table:number-columns-repeated="16379"/>
        </table:table-row>
        <table:table-row table:style-name="ro1">
          <table:table-cell office:value-type="string" calcext:value-type="string">
            <text:p>Ultron</text:p>
          </table:table-cell>
          <table:table-cell office:value-type="string" calcext:value-type="string">
            <text:p>ENCEPHALO-RAY</text:p>
          </table:table-cell>
          <table:table-cell office:value-type="string" calcext:value-type="string">
            <text:p>https://r.res.easebar.com/pic/20250529/71627fa8-a6b2-4c24-b4f3-8cf7f0a195d3.png</text:p>
          </table:table-cell>
          <table:table-cell office:value-type="string" calcext:value-type="string">
            <text:p>Unleash a burning energy beam</text:p>
          </table:table-cell>
          <table:table-cell office:value-type="string" calcext:value-type="string">
            <text:p>https://www.marvelrivals.com/20250529/41360_1237549.html</text:p>
          </table:table-cell>
          <table:table-cell table:number-columns-repeated="16379"/>
        </table:table-row>
        <table:table-row table:style-name="ro1">
          <table:table-cell office:value-type="string" calcext:value-type="string">
            <text:p>Ultron</text:p>
          </table:table-cell>
          <table:table-cell office:value-type="string" calcext:value-type="string">
            <text:p>IMPERATIVE: FIREWALL</text:p>
          </table:table-cell>
          <table:table-cell office:value-type="string" calcext:value-type="string">
            <text:p>https://r.res.easebar.com/pic/20250529/da4eebd7-8dfc-406f-adaf-d02ea613d493.png</text:p>
          </table:table-cell>
          <table:table-cell office:value-type="string" calcext:value-type="string">
            <text:p>Deploy drones to an ally marked by Imperative: Patch, granting them increased Speed and Damage. Additionally, all allies within range of you and the chosen teammate receive Bonus Health.</text:p>
          </table:table-cell>
          <table:table-cell office:value-type="string" calcext:value-type="string">
            <text:p>https://www.marvelrivals.com/20250529/41360_1237549.html</text:p>
          </table:table-cell>
          <table:table-cell table:number-columns-repeated="16379"/>
        </table:table-row>
        <table:table-row table:style-name="ro1">
          <table:table-cell office:value-type="string" calcext:value-type="string">
            <text:p>Ultron</text:p>
          </table:table-cell>
          <table:table-cell office:value-type="string" calcext:value-type="string">
            <text:p>IMPERATIVE: PATCH</text:p>
          </table:table-cell>
          <table:table-cell office:value-type="string" calcext:value-type="string">
            <text:p>https://r.res.easebar.com/pic/20250529/dd94b605-3f0c-4bfc-9fc5-c16ac7b53da2.png</text:p>
          </table:table-cell>
          <table:table-cell office:value-type="string" calcext:value-type="string">
            <text:p>Command up to 2 giant drones to follow 2 allies, constantly healing allies within its radius, with more healing for the designated allies.</text:p>
          </table:table-cell>
          <table:table-cell office:value-type="string" calcext:value-type="string">
            <text:p>https://www.marvelrivals.com/20250529/41360_1237549.html</text:p>
          </table:table-cell>
          <table:table-cell table:number-columns-repeated="16379"/>
        </table:table-row>
        <table:table-row table:style-name="ro1">
          <table:table-cell office:value-type="string" calcext:value-type="string">
            <text:p>Ultron</text:p>
          </table:table-cell>
          <table:table-cell office:value-type="string" calcext:value-type="string">
            <text:p>DYNAMIC FLIGHT</text:p>
          </table:table-cell>
          <table:table-cell office:value-type="string" calcext:value-type="string">
            <text:p>https://r.res.easebar.com/pic/20250529/720ff240-78c6-49fa-92ba-fa695e6b0635.png</text:p>
          </table:table-cell>
          <table:table-cell office:value-type="string" calcext:value-type="string">
            <text:p>Fly quickly in the direction of movement and then enter an Accelerated state</text:p>
          </table:table-cell>
          <table:table-cell office:value-type="string" calcext:value-type="string">
            <text:p>https://www.marvelrivals.com/20250529/41360_1237549.html</text:p>
          </table:table-cell>
          <table:table-cell table:number-columns-repeated="16379"/>
        </table:table-row>
        <table:table-row table:style-name="ro1">
          <table:table-cell office:value-type="string" calcext:value-type="string">
            <text:p>Ultron</text:p>
          </table:table-cell>
          <table:table-cell office:value-type="string" calcext:value-type="string">
            <text:p>RAGE OF ULTRON</text:p>
          </table:table-cell>
          <table:table-cell office:value-type="string" calcext:value-type="string">
            <text:p>https://r.res.easebar.com/pic/20250529/4768132e-a560-432e-aa8b-b7fc01d321d9.png</text:p>
          </table:table-cell>
          <table:table-cell office:value-type="string" calcext:value-type="string">
            <text:p>Summon Ultron Drones to fire Encephalo-Rays, damaging enemies or healing allies</text:p>
          </table:table-cell>
          <table:table-cell office:value-type="string" calcext:value-type="string">
            <text:p>https://www.marvelrivals.com/20250529/41360_1237549.html</text:p>
          </table:table-cell>
          <table:table-cell table:number-columns-repeated="16379"/>
        </table:table-row>
        <table:table-row table:style-name="ro1">
          <table:table-cell office:value-type="string" calcext:value-type="string">
            <text:p>Ultron</text:p>
          </table:table-cell>
          <table:table-cell office:value-type="string" calcext:value-type="string">
            <text:p>NANO RAY</text:p>
          </table:table-cell>
          <table:table-cell office:value-type="string" calcext:value-type="string">
            <text:p>https://r.res.easebar.com/pic/20250531/0f93894e-5849-474d-b022-c098ba2647f0.png</text:p>
          </table:table-cell>
          <table:table-cell office:value-type="string" calcext:value-type="string">
            <text:p>When Iron Man, Ultron and Squirrel Girl team up, Ultron's Encephalo-Ray upgrades to Nano-Ray, firing a beam that pierces through all characters, dealing continuous damage to foes while healing allies; Squirrel Girl gains the Squirrel Missile ability. She directs a squirrel to ride Iron Man's nanotech glove as a homing missile. Upon hit, the squirrel flees just before a fiery explosion!</text:p>
          </table:table-cell>
          <table:table-cell office:value-type="string" calcext:value-type="string">
            <text:p>https://www.marvelrivals.com/20250529/41360_1237549.html</text:p>
          </table:table-cell>
          <table:table-cell table:number-columns-repeated="16379"/>
        </table:table-row>
        <table:table-row table:style-name="ro1">
          <table:table-cell office:value-type="string" calcext:value-type="string">
            <text:p>Emma Frost</text:p>
          </table:table-cell>
          <table:table-cell office:value-type="string" calcext:value-type="string">
            <text:p>TELEPATHIC PULSE</text:p>
          </table:table-cell>
          <table:table-cell office:value-type="string" calcext:value-type="string">
            <text:p>https://r.res.easebar.com/pic/20250409/af9f583d-3891-4929-afe5-f41651b71edb.png</text:p>
          </table:table-cell>
          <table:table-cell office:value-type="string" calcext:value-type="string">
            <text:p>Fire a psionic beam to deal damage; the longer the beam hits, the higher the damage</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MIND'S AEGIS</text:p>
          </table:table-cell>
          <table:table-cell office:value-type="string" calcext:value-type="string">
            <text:p>https://r.res.easebar.com/pic/20250409/32c4bdf3-c6de-4131-b202-db95bbd1fc07.png</text:p>
          </table:table-cell>
          <table:table-cell office:value-type="string" calcext:value-type="string">
            <text:p>Create a levitating barrier at the designated location</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PSYCHIC SPEAR</text:p>
          </table:table-cell>
          <table:table-cell office:value-type="string" calcext:value-type="string">
            <text:p>https://r.res.easebar.com/pic/20250409/091083f4-aa98-4bf7-8b9e-318798ee4939.png</text:p>
          </table:table-cell>
          <table:table-cell office:value-type="string" calcext:value-type="string">
            <text:p>Seize control of an enemy's sentienceâdamage dealt to the sentience cascades to the physical form and can be pierced by Telepathic Pulse. When the sentience shatters, it unleashes extra damage on its owner</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DIAMOND FORM</text:p>
          </table:table-cell>
          <table:table-cell office:value-type="string" calcext:value-type="string">
            <text:p>https://r.res.easebar.com/pic/20250409/139006e1-78e5-443f-9b1e-271c3f6bc276.png</text:p>
          </table:table-cell>
          <table:table-cell office:value-type="string" calcext:value-type="string">
            <text:p>Activate Diamond Form to transform your attack style while gaining Damage Reduction and becoming Unstoppable</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FACETED FURY</text:p>
          </table:table-cell>
          <table:table-cell office:value-type="string" calcext:value-type="string">
            <text:p>https://r.res.easebar.com/pic/20250409/a5598975-b4ab-49a5-b99c-a9a4d044f37c.png</text:p>
          </table:table-cell>
          <table:table-cell office:value-type="string" calcext:value-type="string">
            <text:p>In Diamond Form, deliver a crushing double-fisted strike to enemies</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CRYSTAL KICK</text:p>
          </table:table-cell>
          <table:table-cell office:value-type="string" calcext:value-type="string">
            <text:p>https://r.res.easebar.com/pic/20250409/dd86d9de-5844-4759-9692-5e0fac76579a.png</text:p>
          </table:table-cell>
          <table:table-cell office:value-type="string" calcext:value-type="string">
            <text:p>In Diamond Form, unleash a flying kick forward and knock back enemies; extra damage is dealt if they're propelled into a wall</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CARBON CRUSH</text:p>
          </table:table-cell>
          <table:table-cell office:value-type="string" calcext:value-type="string">
            <text:p>https://r.res.easebar.com/pic/20250409/a30a134d-c77a-48c3-a212-ea7704c72453.png</text:p>
          </table:table-cell>
          <table:table-cell office:value-type="string" calcext:value-type="string">
            <text:p>In Diamond Form, lunge forward to grab an enemy, then execute a back slam to inflict damage</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PSIONIC SEDUCTION</text:p>
          </table:table-cell>
          <table:table-cell office:value-type="string" calcext:value-type="string">
            <text:p>https://r.res.easebar.com/pic/20250409/f186ffef-db20-4cce-ac54-f3963738fa64.png</text:p>
          </table:table-cell>
          <table:table-cell office:value-type="string" calcext:value-type="string">
            <text:p>Project a forward psychic assault that stuns foes and prevents them from unleashing their Ultimate Abilities; if the effect lingers, it gradually commandeers their mind, forcing them to move toward Emma Frost</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Emma Frost</text:p>
          </table:table-cell>
          <table:table-cell office:value-type="string" calcext:value-type="string">
            <text:p>ICED OUT DIAMOND</text:p>
          </table:table-cell>
          <table:table-cell office:value-type="string" calcext:value-type="string">
            <text:p>https://r.res.easebar.com/pic/20250409/f7eaa483-8960-4b6f-b427-c9568e54e110.png</text:p>
          </table:table-cell>
          <table:table-cell office:value-type="string" calcext:value-type="string">
            <text:p>Luna Snow grants Winter's Chill to Iron Fist and Emma Frost. When Iron Fist activates Harmony Recovery, he can heal nearby allies with Lunar Chi. Emma Frost can project ice energy forward, dealing damage and slowing enemies. She can also enhance her diamond form, condensing frost into an Absolute Zero Diamond barrier that blocks enemy attacks and movement</text:p>
          </table:table-cell>
          <table:table-cell office:value-type="string" calcext:value-type="string">
            <text:p>https://www.marvelrivals.com/20250408/41360_1225547.html</text:p>
          </table:table-cell>
          <table:table-cell table:number-columns-repeated="16379"/>
        </table:table-row>
        <table:table-row table:style-name="ro1">
          <table:table-cell office:value-type="string" calcext:value-type="string">
            <text:p>THE THING</text:p>
          </table:table-cell>
          <table:table-cell office:value-type="string" calcext:value-type="string">
            <text:p>Rocky Jab</text:p>
          </table:table-cell>
          <table:table-cell office:value-type="string" calcext:value-type="string">
            <text:p>https://r.res.easebar.com/pic/20250220/274bfd5f-02b6-4513-a80e-3f7685dc8556.png</text:p>
          </table:table-cell>
          <table:table-cell office:value-type="string" calcext:value-type="string">
            <text:p>Rapidly punch forward</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Stone Haymaker</text:p>
          </table:table-cell>
          <table:table-cell office:value-type="string" calcext:value-type="string">
            <text:p>https://r.res.easebar.com/pic/20250220/745e0798-e37f-431b-82d5-bc3d29f97d9b.png</text:p>
          </table:table-cell>
          <table:table-cell office:value-type="string" calcext:value-type="string">
            <text:p>Deliver a devastating Heavy Blow. Can Knock Down flying enemies.</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Yancy Street Charge</text:p>
          </table:table-cell>
          <table:table-cell office:value-type="string" calcext:value-type="string">
            <text:p>https://r.res.easebar.com/pic/20250220/824cffd2-00d5-43a7-8e88-3c72d432ca92.png</text:p>
          </table:table-cell>
          <table:table-cell office:value-type="string" calcext:value-type="string">
            <text:p>Continuously charge forward, launching up enemies and leaving behind a zone at the final position that prevents the use of mobility abilities</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Embattled Leap</text:p>
          </table:table-cell>
          <table:table-cell office:value-type="string" calcext:value-type="string">
            <text:p>https://r.res.easebar.com/pic/20250220/59664e33-bdbf-4243-b93a-7583f1712cad.png</text:p>
          </table:table-cell>
          <table:table-cell office:value-type="string" calcext:value-type="string">
            <text:p>Jump toward an ally and apply damage reduction to yourself and allies within the landing area</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Battle Blitz</text:p>
          </table:table-cell>
          <table:table-cell office:value-type="string" calcext:value-type="string">
            <text:p>https://r.res.easebar.com/pic/20251104/22edee34-cf90-486d-9f16-4959ca72aec6.png</text:p>
          </table:table-cell>
          <table:table-cell office:value-type="string" calcext:value-type="string">
            <text:p>Jump toward an enemy and apply Vulnerability to enemies within the landing area</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Clobberin' Time</text:p>
          </table:table-cell>
          <table:table-cell office:value-type="string" calcext:value-type="string">
            <text:p>https://r.res.easebar.com/pic/20250220/27486433-769b-4aec-ba7b-d7da3cabd52f.png</text:p>
          </table:table-cell>
          <table:table-cell office:value-type="string" calcext:value-type="string">
            <text:p>Use immense power to launch up all enemies in front of the Thing into the air</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Unyielding Will</text:p>
          </table:table-cell>
          <table:table-cell office:value-type="string" calcext:value-type="string">
            <text:p>https://r.res.easebar.com/pic/20250220/3898e125-f9bf-4d44-8b4d-9aeec6873187.png</text:p>
          </table:table-cell>
          <table:table-cell office:value-type="string" calcext:value-type="string">
            <text:p>Immune to launch-up, knock-back, and other displacement effects</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Cosmic Fastball</text:p>
          </table:table-cell>
          <table:table-cell office:value-type="string" calcext:value-type="string">
            <text:p>https://nie.res.netease.com/r/pic/20241205/c290e460-174c-412b-b05e-a28a3c60219b.png</text:p>
          </table:table-cell>
          <table:table-cell office:value-type="string" calcext:value-type="string">
            <text:p>Wolverine and The Thing can interact with each other. Once both parties confirm, The Thing can lift Wolverine and press the key to hurl him forward</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GAMMA CHARGE</text:p>
          </table:table-cell>
          <table:table-cell office:value-type="string" calcext:value-type="string">
            <text:p>https://r.res.easebar.com/pic/20260213/b18fc9a2-fa11-4a9d-8c0c-266b5fb5d79b.png</text:p>
          </table:table-cell>
          <table:table-cell office:value-type="string" calcext:value-type="string">
            <text:p>Hulk charges Black Panther and The Thing with gamma radiation. When Black Panther's health is low, he gains a gamma shield, becoming Unstoppable and blocking attacks. The Thing gains Gamma Gauntlets, boosting Damage and range of his Rocky Jab and Stone Haymaker. Dealing damage with these attacks grants Bonus Health, and maximum Bonus Health cap is increased</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THE THING</text:p>
          </table:table-cell>
          <table:table-cell office:value-type="string" calcext:value-type="string">
            <text:p>Flying Thing</text:p>
          </table:table-cell>
          <table:table-cell office:value-type="string" calcext:value-type="string">
            <text:p>https://r.res.easebar.com/pic/20250730/7048ff41-7f0a-4cff-8469-49b1e18160cf.png</text:p>
          </table:table-cell>
          <table:table-cell office:value-type="string" calcext:value-type="string">
            <text:p>Human Torch can lift The Thing into the air and slam him down, dealing damage, launching enemies, and creating a zone that disables mobility abilities</text:p>
          </table:table-cell>
          <table:table-cell office:value-type="string" calcext:value-type="string">
            <text:p>https://www.marvelrivals.com/20250220/41360_1213067.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Fire Cluster</text:p>
          </table:table-cell>
          <table:table-cell office:value-type="string" calcext:value-type="string">
            <text:p>https://r.res.easebar.com/pic/20250220/2afdfcab-b55a-4a18-a47e-9c2a6bb175b8.png</text:p>
          </table:table-cell>
          <table:table-cell office:value-type="string" calcext:value-type="string">
            <text:p>Launch forward a splittable fireball</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Blazing Blast</text:p>
          </table:table-cell>
          <table:table-cell office:value-type="string" calcext:value-type="string">
            <text:p>https://r.res.easebar.com/pic/20250220/af838642-8301-4f48-b5ea-5c3413c7cb7f.png</text:p>
          </table:table-cell>
          <table:table-cell office:value-type="string" calcext:value-type="string">
            <text:p>Launch a fireball to create a Flame Field at the targeted area</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Flaming Meteor</text:p>
          </table:table-cell>
          <table:table-cell office:value-type="string" calcext:value-type="string">
            <text:p>https://r.res.easebar.com/pic/20250220/e3c91a9a-e174-4309-b2c6-975f0671805a.png</text:p>
          </table:table-cell>
          <table:table-cell office:value-type="string" calcext:value-type="string">
            <text:p>Dive towards the ground, dealing damage to enemies and detonating any Flame Fields hit</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Plasma Body</text:p>
          </table:table-cell>
          <table:table-cell office:value-type="string" calcext:value-type="string">
            <text:p>https://r.res.easebar.com/pic/20250220/bed6bb7e-ac4e-4b83-b75f-32b4c02b3249.png</text:p>
          </table:table-cell>
          <table:table-cell office:value-type="string" calcext:value-type="string">
            <text:p>Enter a state of accelerated ascent</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Pyro-Prison</text:p>
          </table:table-cell>
          <table:table-cell office:value-type="string" calcext:value-type="string">
            <text:p>https://r.res.easebar.com/pic/20250220/d20f2e24-4f10-4fd8-a3a9-73b2920b27ee.png</text:p>
          </table:table-cell>
          <table:table-cell office:value-type="string" calcext:value-type="string">
            <text:p>Form a fire wall between Fire Fields to burn enemies</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Supernova</text:p>
          </table:table-cell>
          <table:table-cell office:value-type="string" calcext:value-type="string">
            <text:p>https://r.res.easebar.com/pic/20250220/49ec9ee0-bff0-41c5-944f-ff679966e4d4.png</text:p>
          </table:table-cell>
          <table:table-cell office:value-type="string" calcext:value-type="string">
            <text:p>Explode with cosmic fire to deal damage to enemies within range. Upon skill activation, all Flame Fields will transform into Flame Tornadoes, dealing extra damage</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Storm Siblings</text:p>
          </table:table-cell>
          <table:table-cell office:value-type="string" calcext:value-type="string">
            <text:p>https://r.res.easebar.com/pic/20250220/d6c32fd9-64ab-4b65-9092-0f7c95ebe95a.png</text:p>
          </table:table-cell>
          <table:table-cell office:value-type="string" calcext:value-type="string">
            <text:p>The Invisible Woman taps into her powers, channeling Psionic Might to fortify the entire Fantastic Four team, granting damage resistance. Once activated, they can continually generate Bonus Health, making up for lost Health</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Pyrokinetic Energy</text:p>
          </table:table-cell>
          <table:table-cell office:value-type="string" calcext:value-type="string">
            <text:p>https://r.res.easebar.com/pic/20250712/b61ccad0-a950-4723-ae31-1f4e52f0d330.png</text:p>
          </table:table-cell>
          <table:table-cell office:value-type="string" calcext:value-type="string">
            <text:p>Human Torch stores Pyrokinetic Energy in Spider-Man's suit, enabling him to unleash an Inferno Blast that sprays a fiery web while performing a backflip to create distance. The flames damage enemies and apply a Burn-Tracer. Detonating these Burn-Tracers inflicts Damage Over Time</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HUMAN TORCH</text:p>
          </table:table-cell>
          <table:table-cell office:value-type="string" calcext:value-type="string">
            <text:p>Two In One</text:p>
          </table:table-cell>
          <table:table-cell office:value-type="string" calcext:value-type="string">
            <text:p>https://r.res.easebar.com/pic/20250730/99129fb5-1ec9-4589-99b4-9df1d892ab9b.png</text:p>
          </table:table-cell>
          <table:table-cell office:value-type="string" calcext:value-type="string">
            <text:p>Human Torch can lift The Thing into the air and slam him down, dealing damage, launching enemies, and creating a zone that disables mobility abilities</text:p>
          </table:table-cell>
          <table:table-cell office:value-type="string" calcext:value-type="string">
            <text:p>https://www.marvelrivals.com/20250220/41360_1213050.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Orb Projection</text:p>
          </table:table-cell>
          <table:table-cell office:value-type="string" calcext:value-type="string">
            <text:p>https://r.res.easebar.com/pic/20250110/79e037c4-353c-46a1-abb1-1188ff3f98e3.png</text:p>
          </table:table-cell>
          <table:table-cell office:value-type="string" calcext:value-type="string">
            <text:p>Launch a force field orbs that can pierce heroes, flying to maximum distance before returning to Invisible Woman; damaging enemies and healing teammates</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Guardian Shield</text:p>
          </table:table-cell>
          <table:table-cell office:value-type="string" calcext:value-type="string">
            <text:p>https://r.res.easebar.com/pic/20250108/af32c3d3-713a-4faf-90f7-1be2dcfa8cbd.png</text:p>
          </table:table-cell>
          <table:table-cell office:value-type="string" calcext:value-type="string">
            <text:p>Generate a force shield in front of a selected ally or in front of you. The shield can block damage and provide Healing Over Time to nearby allies. Enemies that pass through the shield are slowed</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Psionic Vortex</text:p>
          </table:table-cell>
          <table:table-cell office:value-type="string" calcext:value-type="string">
            <text:p>https://r.res.easebar.com/pic/20250108/308c5ab3-2b3f-4f53-9eb6-05c171ad4863.png</text:p>
          </table:table-cell>
          <table:table-cell office:value-type="string" calcext:value-type="string">
            <text:p>Gather psionic energy and then cast it, upon impact or pressing the Ability key again, it erupts into a psionic vortex, continuously drawing in enemies and causing damage</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Force Physics</text:p>
          </table:table-cell>
          <table:table-cell office:value-type="string" calcext:value-type="string">
            <text:p>https://r.res.easebar.com/pic/20250108/0d7893e9-e90e-483f-8b90-414535d6f133.png</text:p>
          </table:table-cell>
          <table:table-cell office:value-type="string" calcext:value-type="string">
            <text:p>Manipulate psionic energy to push or pull enemies in front of her</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Invisible Boundary</text:p>
          </table:table-cell>
          <table:table-cell office:value-type="string" calcext:value-type="string">
            <text:p>https://r.res.easebar.com/pic/20250108/c10fa2f1-64e5-417a-abbe-0092e98b0afb.png</text:p>
          </table:table-cell>
          <table:table-cell office:value-type="string" calcext:value-type="string">
            <text:p>Manifest an unseen force field within a chosen area, rendering allies inside undetectable by enemies and provide Healing Over Time. Enemies that pass through the field are slowed</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Covert Advance</text:p>
          </table:table-cell>
          <table:table-cell office:value-type="string" calcext:value-type="string">
            <text:p>https://r.res.easebar.com/pic/20250108/d273333c-e1da-4d98-925d-b7ce8601144c.png</text:p>
          </table:table-cell>
          <table:table-cell office:value-type="string" calcext:value-type="string">
            <text:p>Enter Invisible state some time after disengaging from combat and grant yourself Healing Over Time</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Veiled Step</text:p>
          </table:table-cell>
          <table:table-cell office:value-type="string" calcext:value-type="string">
            <text:p>https://r.res.easebar.com/pic/20250108/eb7b6f46-9d82-4df8-a513-8d94c07546e9.png</text:p>
          </table:table-cell>
          <table:table-cell office:value-type="string" calcext:value-type="string">
            <text:p>Generate a force field at your feet, stepping on it propels her into the Invisible state</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INVISIBLE WOMAN</text:p>
          </table:table-cell>
          <table:table-cell office:value-type="string" calcext:value-type="string">
            <text:p>Fantasti-Force</text:p>
          </table:table-cell>
          <table:table-cell office:value-type="string" calcext:value-type="string">
            <text:p>https://r.res.easebar.com/pic/20250109/053365f9-0714-4d9c-a51f-2fd1c173a7f3.png</text:p>
          </table:table-cell>
          <table:table-cell office:value-type="string" calcext:value-type="string">
            <text:p>The Invisible Woman taps into her powers, channeling Psionic Might to fortify Mr.Fantastic. This formidable force bolsters Mr.Fantastic, granting damage resistance. Once activated, they can continually generate Bonus Health, making up for lost Health</text:p>
          </table:table-cell>
          <table:table-cell office:value-type="string" calcext:value-type="string">
            <text:p>https://www.marvelrivals.com/20250108/41360_1205353.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Stretch Punch</text:p>
          </table:table-cell>
          <table:table-cell office:value-type="string" calcext:value-type="string">
            <text:p>https://r.res.easebar.com/pic/20250110/6ca25ced-20ea-495c-b403-d84fa949b02a.png</text:p>
          </table:table-cell>
          <table:table-cell office:value-type="string" calcext:value-type="string">
            <text:p>Stretch out a forward punch to attack enemies</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Distended Grip</text:p>
          </table:table-cell>
          <table:table-cell office:value-type="string" calcext:value-type="string">
            <text:p>https://r.res.easebar.com/pic/20250108/f2a1a063-eb4b-4274-a9b8-fac92c4abeba.png</text:p>
          </table:table-cell>
          <table:table-cell office:value-type="string" calcext:value-type="string">
            <text:p>Extend arms forward to entangle an enemy, then press Primary Attack to pull the hit enemy toward him, or select and yank another enemy, Knocking Them Airborne against each other. Hit targets are Immobilized</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Flexible Elongation</text:p>
          </table:table-cell>
          <table:table-cell office:value-type="string" calcext:value-type="string">
            <text:p>https://r.res.easebar.com/pic/20250108/014f9fc0-5b64-4c2d-afb1-4669b7b5369c.png</text:p>
          </table:table-cell>
          <table:table-cell office:value-type="string" calcext:value-type="string">
            <text:p>Gain a Shield, select a target and dash towards them, dealing damage to enemies or granting a Shield to allies</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Reflexive Rubber</text:p>
          </table:table-cell>
          <table:table-cell office:value-type="string" calcext:value-type="string">
            <text:p>https://r.res.easebar.com/pic/20250108/d152620a-90bc-407e-a3f1-b137503624d0.png</text:p>
          </table:table-cell>
          <table:table-cell office:value-type="string" calcext:value-type="string">
            <text:p>Stretch the body to absorb damage before launching stored damage in the targeted direction</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Brainiac Bounce</text:p>
          </table:table-cell>
          <table:table-cell office:value-type="string" calcext:value-type="string">
            <text:p>https://r.res.easebar.com/pic/20250108/05dcb43c-4de3-483a-afc6-d06c6e76e4ff.png</text:p>
          </table:table-cell>
          <table:table-cell office:value-type="string" calcext:value-type="string">
            <text:p>Leap upward and smash the ground, slowing enemies within range. Mister Fantastic can leap again upon landing a hit</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Elastic Strength</text:p>
          </table:table-cell>
          <table:table-cell office:value-type="string" calcext:value-type="string">
            <text:p>https://r.res.easebar.com/pic/20250108/25010c9f-083e-4097-a443-544e0eeaa0ab.png</text:p>
          </table:table-cell>
          <table:table-cell office:value-type="string" calcext:value-type="string">
            <text:p>Using abilities generates Elasticity, boosting attack power. Reaching full Elasticity triggers an Inflated state that increases Maximum Health, further boosts damage, and enables the use of Reflexive Rubber</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MISTER FANTASTIC</text:p>
          </table:table-cell>
          <table:table-cell office:value-type="string" calcext:value-type="string">
            <text:p>FANTASTIC AMPLIFIER</text:p>
          </table:table-cell>
          <table:table-cell office:value-type="string" calcext:value-type="string">
            <text:p>https://r.res.easebar.com/pic/20260213/eeb353f6-40cf-4c6d-b787-db7a4d316868.png</text:p>
          </table:table-cell>
          <table:table-cell office:value-type="string" calcext:value-type="string">
            <text:p>Rocket Raccoon upgrades his B.R.B. for Star-Lord and Mister Fantastic. Star-Lord gets an Astral Jump device, allowing him to teleport to its deployment point from anywhere on the map. Mister Fantastic receives a Fantastic Amplifier, removing his Elasticity limit and letting him actively enter Inflation state</text:p>
          </table:table-cell>
          <table:table-cell office:value-type="string" calcext:value-type="string">
            <text:p>https://www.marvelrivals.com/20250108/41360_1205352.html</text:p>
          </table:table-cell>
          <table:table-cell table:number-columns-repeated="16379"/>
        </table:table-row>
        <table:table-row table:style-name="ro1">
          <table:table-cell office:value-type="string" calcext:value-type="string">
            <text:p>SQUIRREL GIRL</text:p>
          </table:table-cell>
          <table:table-cell office:value-type="string" calcext:value-type="string">
            <text:p>Burst Acorn</text:p>
          </table:table-cell>
          <table:table-cell office:value-type="string" calcext:value-type="string">
            <text:p>https://r.res.easebar.com/pic/20241205/662dd801-7b3c-4929-bca7-4696b104811d.png</text:p>
          </table:table-cell>
          <table:table-cell office:value-type="string" calcext:value-type="string">
            <text:p>Shoot bouncing Burst Acorns</text:p>
          </table:table-cell>
          <table:table-cell office:value-type="string" calcext:value-type="string">
            <text:p>https://www.marvelrivals.com/20241205/41360_1198132.html</text:p>
          </table:table-cell>
          <table:table-cell table:number-columns-repeated="16379"/>
        </table:table-row>
        <table:table-row table:style-name="ro1">
          <table:table-cell office:value-type="string" calcext:value-type="string">
            <text:p>SQUIRREL GIRL</text:p>
          </table:table-cell>
          <table:table-cell office:value-type="string" calcext:value-type="string">
            <text:p>Unbeatable Squirrel Tsunami</text:p>
          </table:table-cell>
          <table:table-cell office:value-type="string" calcext:value-type="string">
            <text:p>https://r.res.easebar.com/pic/20241205/f87d8f38-b7d1-4a62-9aaa-eb00423c38d2.png</text:p>
          </table:table-cell>
          <table:table-cell office:value-type="string" calcext:value-type="string">
            <text:p>Summon a horde of squirrels to charge forward, dealing damage while bouncing against structures</text:p>
          </table:table-cell>
          <table:table-cell office:value-type="string" calcext:value-type="string">
            <text:p>https://www.marvelrivals.com/20241205/41360_1198132.html</text:p>
          </table:table-cell>
          <table:table-cell table:number-columns-repeated="16379"/>
        </table:table-row>
        <table:table-row table:style-name="ro1">
          <table:table-cell office:value-type="string" calcext:value-type="string">
            <text:p>SQUIRREL GIRL</text:p>
          </table:table-cell>
          <table:table-cell office:value-type="string" calcext:value-type="string">
            <text:p>Tail Bounce</text:p>
          </table:table-cell>
          <table:table-cell office:value-type="string" calcext:value-type="string">
            <text:p>https://r.res.easebar.com/pic/20241205/cc6be0d3-f369-4fcf-861d-5e0f2594af1a.png</text:p>
          </table:table-cell>
          <table:table-cell office:value-type="string" calcext:value-type="string">
            <text:p>Rocket upwards with a bounce of her tail</text:p>
          </table:table-cell>
          <table:table-cell office:value-type="string" calcext:value-type="string">
            <text:p>https://www.marvelrivals.com/20241205/41360_1198132.html</text:p>
          </table:table-cell>
          <table:table-cell table:number-columns-repeated="16379"/>
        </table:table-row>
        <table:table-row table:style-name="ro1">
          <table:table-cell office:value-type="string" calcext:value-type="string">
            <text:p>SQUIRREL GIRL</text:p>
          </table:table-cell>
          <table:table-cell office:value-type="string" calcext:value-type="string">
            <text:p>Mammal Bond</text:p>
          </table:table-cell>
          <table:table-cell office:value-type="string" calcext:value-type="string">
            <text:p>https://r.res.easebar.com/pic/20241205/5714be78-0962-47d3-b231-1a3b6d8d98d3.png</text:p>
          </table:table-cell>
          <table:table-cell office:value-type="string" calcext:value-type="string">
            <text:p>Reload Burst Acorns and can use an ability without cooldown once in a short duration</text:p>
          </table:table-cell>
          <table:table-cell office:value-type="string" calcext:value-type="string">
            <text:p>https://www.marvelrivals.com/20241205/41360_1198132.html</text:p>
          </table:table-cell>
          <table:table-cell table:number-columns-repeated="16379"/>
        </table:table-row>
        <table:table-row table:style-name="ro1">
          <table:table-cell office:value-type="string" calcext:value-type="string">
            <text:p>SQUIRREL GIRL</text:p>
          </table:table-cell>
          <table:table-cell office:value-type="string" calcext:value-type="string">
            <text:p>Squirrel Blockade</text:p>
          </table:table-cell>
          <table:table-cell office:value-type="string" calcext:value-type="string">
            <text:p>https://r.res.easebar.com/pic/20241205/403af848-dda8-42f7-a2a0-b3d0959eeefe.png</text:p>
          </table:table-cell>
          <table:table-cell office:value-type="string" calcext:value-type="string">
            <text:p>Launch an acorn to unleash Squirrel Guards, Imprisoning the first hit enemy</text:p>
          </table:table-cell>
          <table:table-cell office:value-type="string" calcext:value-type="string">
            <text:p>https://www.marvelrivals.com/20241205/41360_1198132.html</text:p>
          </table:table-cell>
          <table:table-cell table:number-columns-repeated="16379"/>
        </table:table-row>
        <table:table-row table:style-name="ro1">
          <table:table-cell office:value-type="string" calcext:value-type="string">
            <text:p>SQUIRREL GIRL</text:p>
          </table:table-cell>
          <table:table-cell office:value-type="string" calcext:value-type="string">
            <text:p>Squirrel Missile</text:p>
          </table:table-cell>
          <table:table-cell office:value-type="string" calcext:value-type="string">
            <text:p>https://r.res.easebar.com/pic/20250711/6a1bbb2e-7ee1-436e-87f0-f23f25f5799e.png</text:p>
          </table:table-cell>
          <table:table-cell office:value-type="string" calcext:value-type="string">
            <text:p>When Iron Man, Ultron and Squirrel Girl team up, Ultron's Encephalo-Ray upgrades to Nano-Ray, firing a beam that pierces through all characters, dealing continuous damage to foes while healing allies; Squirrel Girl gains the Squirrel Missile ability. She directs a squirrel to ride Iron Man's nanotech glove as a homing missile. Upon hit, the squirrel flees just before a fiery explosion!</text:p>
          </table:table-cell>
          <table:table-cell office:value-type="string" calcext:value-type="string">
            <text:p>https://www.marvelrivals.com/20241205/41360_1198132.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Widow's Bite Baton</text:p>
          </table:table-cell>
          <table:table-cell office:value-type="string" calcext:value-type="string">
            <text:p>https://r.res.easebar.com/pic/20241205/66ad25fa-5a94-4087-8d1d-d626e1a5c798.png</text:p>
          </table:table-cell>
          <table:table-cell office:value-type="string" calcext:value-type="string">
            <text:p>Strike with the enhanced electric batons</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Red Room Rifle</text:p>
          </table:table-cell>
          <table:table-cell office:value-type="string" calcext:value-type="string">
            <text:p>https://r.res.easebar.com/pic/20241205/67bd0973-ab49-4e6d-a04b-70f67cb2514b.png</text:p>
          </table:table-cell>
          <table:table-cell office:value-type="string" calcext:value-type="string">
            <text:p>Attack with the Red Room Rifle</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Electro-Plasma Explosion</text:p>
          </table:table-cell>
          <table:table-cell office:value-type="string" calcext:value-type="string">
            <text:p>https://r.res.easebar.com/pic/20241205/2ab04f37-ede8-4c33-aee0-ef47e6d4c495.png</text:p>
          </table:table-cell>
          <table:table-cell office:value-type="string" calcext:value-type="string">
            <text:p>Switch the Red Room Rifle to Destruction mode and unleash an electro-plasma blast, damaging enemies within range and leaving plasma on the ground to Slow nearby enemies</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Fleet Foot</text:p>
          </table:table-cell>
          <table:table-cell office:value-type="string" calcext:value-type="string">
            <text:p>https://r.res.easebar.com/pic/20241205/c54964b7-5c00-4229-8f65-5d156f05ce27.png</text:p>
          </table:table-cell>
          <table:table-cell office:value-type="string" calcext:value-type="string">
            <text:p>Dash forward and enable a powerful jump</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Edge Dancer</text:p>
          </table:table-cell>
          <table:table-cell office:value-type="string" calcext:value-type="string">
            <text:p>https://r.res.easebar.com/pic/20241205/63a7474c-3d1a-4db1-933a-c70c5a37e9ca.png</text:p>
          </table:table-cell>
          <table:table-cell office:value-type="string" calcext:value-type="string">
            <text:p>Unleash a spinning kick to Knock enemies airborne. Landing the hit will allow her to zip to the target with a grappling hook for a second kick</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Straight Shooter</text:p>
          </table:table-cell>
          <table:table-cell office:value-type="string" calcext:value-type="string">
            <text:p>https://r.res.easebar.com/pic/20241205/6361d366-98b8-4268-825e-1371bf7c99f0.png</text:p>
          </table:table-cell>
          <table:table-cell office:value-type="string" calcext:value-type="string">
            <text:p>Switch the Red Room Rifle to Sniper mode to fire high-energy rounds</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BLACK WIDOW</text:p>
          </table:table-cell>
          <table:table-cell office:value-type="string" calcext:value-type="string">
            <text:p>PHOENIX SNIPER</text:p>
          </table:table-cell>
          <table:table-cell office:value-type="string" calcext:value-type="string">
            <text:p>https://r.res.easebar.com/pic/20251115/4763cec7-ceb7-4b14-8bd7-4d7d2b7a16ac.png</text:p>
          </table:table-cell>
          <table:table-cell office:value-type="string" calcext:value-type="string">
            <text:p>Jean Grey imbues Wolverine and Black Widow with the awe-inspiring Phoenix Force. When active, Wolverine's Feral Leap transforms into Phoenix Warrior, gaining lifesteal on all damage dealt and enveloping him with Phoenix flames that scorch nearby enemies, dealing Percentage Damage. Black Widow gains Phoenix Force-empowered bullets; her Phoenix Rounds explode on impact and heal allies in the blast radius</text:p>
          </table:table-cell>
          <table:table-cell office:value-type="string" calcext:value-type="string">
            <text:p>https://www.marvelrivals.com/20241204/41360_1198106.html</text:p>
          </table:table-cell>
          <table:table-cell table:number-columns-repeated="16379"/>
        </table:table-row>
        <table:table-row table:style-name="ro1">
          <table:table-cell office:value-type="string" calcext:value-type="string">
            <text:p>WOLVERINE</text:p>
          </table:table-cell>
          <table:table-cell office:value-type="string" calcext:value-type="string">
            <text:p>Savage Claw</text:p>
          </table:table-cell>
          <table:table-cell office:value-type="string" calcext:value-type="string">
            <text:p>https://r.res.easebar.com/pic/20241205/97b1d4c6-7ea2-43f2-b528-5ea88904853f.png</text:p>
          </table:table-cell>
          <table:table-cell office:value-type="string" calcext:value-type="string">
            <text:p>Slash with Adamantium claws for a Claw Strike. Unleashing Feral Leap will enhance it to Berserk Claw Strike for a brief period</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Last Stand</text:p>
          </table:table-cell>
          <table:table-cell office:value-type="string" calcext:value-type="string">
            <text:p>https://r.res.easebar.com/pic/20241205/6900d5e2-7074-4c28-a424-4015ad9780a8.png</text:p>
          </table:table-cell>
          <table:table-cell office:value-type="string" calcext:value-type="string">
            <text:p>Knock enemies ahead airborne and spiral through the air, sweeping up enemies along the path and delivering a devastating impact at the landing point</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Feral Leap</text:p>
          </table:table-cell>
          <table:table-cell office:value-type="string" calcext:value-type="string">
            <text:p>https://r.res.easebar.com/pic/20241205/e88c7523-3fab-4cfb-a954-080c5824f0fe.png</text:p>
          </table:table-cell>
          <table:table-cell office:value-type="string" calcext:value-type="string">
            <text:p>Leap like an animal to snatch the first enemy upon impact and Smash them to the ground. Unleashing this ability will enhance his normal attack to Berserk Claw Strike for a brief period</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Undying Animal</text:p>
          </table:table-cell>
          <table:table-cell office:value-type="string" calcext:value-type="string">
            <text:p>https://r.res.easebar.com/pic/20241205/15a76d54-520c-447a-b8f1-2ab0a488faac.png</text:p>
          </table:table-cell>
          <table:table-cell office:value-type="string" calcext:value-type="string">
            <text:p>Unleash a fierce howl to briefly reduce incoming damage</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Vicious Rampage</text:p>
          </table:table-cell>
          <table:table-cell office:value-type="string" calcext:value-type="string">
            <text:p>https://r.res.easebar.com/pic/20241205/a015b659-87d4-4569-a870-4af03347ecb3.png</text:p>
          </table:table-cell>
          <table:table-cell office:value-type="string" calcext:value-type="string">
            <text:p>Dash forward and unleash a Claw Strike</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Regenerative Healing Factor</text:p>
          </table:table-cell>
          <table:table-cell office:value-type="string" calcext:value-type="string">
            <text:p>https://r.res.easebar.com/pic/20241205/031e30b1-f8d7-4be1-9a03-b758bdddc6be.png</text:p>
          </table:table-cell>
          <table:table-cell office:value-type="string" calcext:value-type="string">
            <text:p>Begin to heal and rise with a hefty Bonus Health, shaking off all debuffs. After a brief moment, any remaining Bonus Health morphs into a one-off heal, zeroing out his Rage. Assists in KOs reduce this cooldown</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Berserker Rage</text:p>
          </table:table-cell>
          <table:table-cell office:value-type="string" calcext:value-type="string">
            <text:p>https://r.res.easebar.com/pic/20241205/e97de2d3-6f28-4619-80cd-59da00931e8b.png</text:p>
          </table:table-cell>
          <table:table-cell office:value-type="string" calcext:value-type="string">
            <text:p>Rage builds when Wolverine attacks or takes hits, boosting the damage of his Claw Strikes and the Bonus Health from his regenerative healing factor</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WOLVERINE</text:p>
          </table:table-cell>
          <table:table-cell office:value-type="string" calcext:value-type="string">
            <text:p>Phoenix Warrior</text:p>
          </table:table-cell>
          <table:table-cell office:value-type="string" calcext:value-type="string">
            <text:p>https://r.res.easebar.com/pic/20250712/052fd724-4a96-47a3-97d7-fef8ac9056ac.png</text:p>
          </table:table-cell>
          <table:table-cell office:value-type="string" calcext:value-type="string">
            <text:p>Wolverine and Hulk can interact with each other. Once both parties confirm, Hulk can lift Wolverine and press the key to hurl him forwardJean Grey imbues Wolverine with the awe-inspiring Phoenix Force. With this power, Wolverine's Feral Leap transforms into Phoenix Warrior. While active, he is enveloped in Phoenix flames that continuously scorch him and nearby enemies, dealing Percentage Damage. In this state, Wolverine's abilities gain Lifesteal when inflicting damage</text:p>
          </table:table-cell>
          <table:table-cell office:value-type="string" calcext:value-type="string">
            <text:p>https://www.marvelrivals.com/20241204/41360_1198101.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Darkforce Cloak</text:p>
          </table:table-cell>
          <table:table-cell office:value-type="string" calcext:value-type="string">
            <text:p>https://r.res.easebar.com/pic/20241205/94227f4c-02fd-4954-900c-f149b05b5cea.png</text:p>
          </table:table-cell>
          <table:table-cell office:value-type="string" calcext:value-type="string">
            <text:p>Inflict continuous damage on an enemy</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Eternal Bond</text:p>
          </table:table-cell>
          <table:table-cell office:value-type="string" calcext:value-type="string">
            <text:p>https://r.res.easebar.com/pic/20241205/9791de0a-9b39-4111-a535-77a8fccaef5a.png</text:p>
          </table:table-cell>
          <table:table-cell office:value-type="string" calcext:value-type="string">
            <text:p>Perform four rapid dashes, healing allies and damaging enemies along the path</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Light's Embrace</text:p>
          </table:table-cell>
          <table:table-cell office:value-type="string" calcext:value-type="string">
            <text:p>https://r.res.easebar.com/pic/20241205/d79fe95c-03cf-4d39-97ce-a2af95dd180b.png</text:p>
          </table:table-cell>
          <table:table-cell office:value-type="string" calcext:value-type="string">
            <text:p>Switch to Dagger</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Terror Cape</text:p>
          </table:table-cell>
          <table:table-cell office:value-type="string" calcext:value-type="string">
            <text:p>https://r.res.easebar.com/pic/20241205/a57ebbc2-dcf5-4511-8a5e-7291aefbaf3f.png</text:p>
          </table:table-cell>
          <table:table-cell office:value-type="string" calcext:value-type="string">
            <text:p>Deploy a Veil of Darkforce to damage enemies upon touch, applying Blind to narrow their sight and Vulnerability to amplify damage received</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Dark Teleportation</text:p>
          </table:table-cell>
          <table:table-cell office:value-type="string" calcext:value-type="string">
            <text:p>https://r.res.easebar.com/pic/20241205/08104768-56d7-4bda-84ae-bd4cd7245223.png</text:p>
          </table:table-cell>
          <table:table-cell office:value-type="string" calcext:value-type="string">
            <text:p>Enshroud nearby allies in the Darkforce Dimension, plunging them into the Phased state, making them untargetable and invisible to enemies and granting them a Movement Boost</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FROM SHADOW TO LIGHT</text:p>
          </table:table-cell>
          <table:table-cell office:value-type="string" calcext:value-type="string">
            <text:p>https://r.res.easebar.com/pic/20251115/9a215533-35d3-4b33-b726-f9696b57259c.png</text:p>
          </table:table-cell>
          <table:table-cell office:value-type="string" calcext:value-type="string">
            <text:p>Cloak &amp; Dagger inject light and dark energy into Hawkeye's katana. When Hawkeye uses Crescent Slash, enemies hit are launched back, and a blade wave filled with light and energy sweeps forward. This wave passes through both allies and enemies: it heals and boosts healing for allies, while damaging enemies and applying Vulnerability</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Lightforce Dagger</text:p>
          </table:table-cell>
          <table:table-cell office:value-type="string" calcext:value-type="string">
            <text:p>https://r.res.easebar.com/pic/20241205/5211b159-6fa8-4589-829f-facb1c455241.png</text:p>
          </table:table-cell>
          <table:table-cell office:value-type="string" calcext:value-type="string">
            <text:p>Unleash a bouncing Lightforce Dagger to damage enemies and heal nearby allies</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Shadow's Embrace</text:p>
          </table:table-cell>
          <table:table-cell office:value-type="string" calcext:value-type="string">
            <text:p>https://r.res.easebar.com/pic/20241205/3e810039-6b5c-43e0-b1c6-22808f1ee3cf.png</text:p>
          </table:table-cell>
          <table:table-cell office:value-type="string" calcext:value-type="string">
            <text:p>Switch to Cloak</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Veil of Lightforce</text:p>
          </table:table-cell>
          <table:table-cell office:value-type="string" calcext:value-type="string">
            <text:p>https://r.res.easebar.com/pic/20241205/b2149229-d3c4-4056-9fa4-04704c96c3af.png</text:p>
          </table:table-cell>
          <table:table-cell office:value-type="string" calcext:value-type="string">
            <text:p>Deploy a Veil of Lightforce to heal allies upon touch and grant them a Healing Boost</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CLOAK&amp;DAGGER</text:p>
          </table:table-cell>
          <table:table-cell office:value-type="string" calcext:value-type="string">
            <text:p>Dagger Storm</text:p>
          </table:table-cell>
          <table:table-cell office:value-type="string" calcext:value-type="string">
            <text:p>https://r.res.easebar.com/pic/20241205/a106ebc0-80b0-4dd9-bf68-0c19f464e8bc.png</text:p>
          </table:table-cell>
          <table:table-cell office:value-type="string" calcext:value-type="string">
            <text:p>Launch a volley of daggers, creating a Healing Over Time field in the impact area</text:p>
          </table:table-cell>
          <table:table-cell office:value-type="string" calcext:value-type="string">
            <text:p>https://www.marvelrivals.com/20241204/41360_1198095.html</text:p>
          </table:table-cell>
          <table:table-cell table:number-columns-repeated="16379"/>
        </table:table-row>
        <table:table-row table:style-name="ro1">
          <table:table-cell office:value-type="string" calcext:value-type="string">
            <text:p>IRON FIST</text:p>
          </table:table-cell>
          <table:table-cell office:value-type="string" calcext:value-type="string">
            <text:p>Jeet Kune Do</text:p>
          </table:table-cell>
          <table:table-cell office:value-type="string" calcext:value-type="string">
            <text:p>https://r.res.easebar.com/pic/20241205/08e65caa-9aa0-425c-aeba-fa1544c03be2.png</text:p>
          </table:table-cell>
          <table:table-cell office:value-type="string" calcext:value-type="string">
            <text:p>Strike the targeted enemy with Jeet Kune Do, reducing the cooldown of Block and Strike with every hit</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Yat Jee Chung Kuen</text:p>
          </table:table-cell>
          <table:table-cell office:value-type="string" calcext:value-type="string">
            <text:p>https://r.res.easebar.com/pic/20241205/fd8bfe86-ffd7-4752-9da3-d005bafa8668.png</text:p>
          </table:table-cell>
          <table:table-cell office:value-type="string" calcext:value-type="string">
            <text:p>Dash forward to pursue the targeted enemy and unleash a flurry of attacks</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Living Chi</text:p>
          </table:table-cell>
          <table:table-cell office:value-type="string" calcext:value-type="string">
            <text:p>https://r.res.easebar.com/pic/20241205/080f088b-94dd-45ac-9bc7-9e5c512d51d0.png</text:p>
          </table:table-cell>
          <table:table-cell office:value-type="string" calcext:value-type="string">
            <text:p>Become living Chi to boost his speed, damage, and attack range, delivering stronger punches while reducing the cooldown of Dragon's Defense</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K'un-Lun Kick</text:p>
          </table:table-cell>
          <table:table-cell office:value-type="string" calcext:value-type="string">
            <text:p>https://r.res.easebar.com/pic/20241205/e5377516-d352-4169-bb87-7bd68523dda7.png</text:p>
          </table:table-cell>
          <table:table-cell office:value-type="string" calcext:value-type="string">
            <text:p>Dash forward, delivering a flying kick when hitting an enemy or reaching full range, dealing damage to nearby enemies. Damage increases with lower enemy health</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Harmony Recovery</text:p>
          </table:table-cell>
          <table:table-cell office:value-type="string" calcext:value-type="string">
            <text:p>https://r.res.easebar.com/pic/20241205/14e2c16b-cf9f-4e49-bef0-690bcc3d910c.png</text:p>
          </table:table-cell>
          <table:table-cell office:value-type="string" calcext:value-type="string">
            <text:p>Cross legs and channel Chi, slowly gaining Bonus Health</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Crane Leap</text:p>
          </table:table-cell>
          <table:table-cell office:value-type="string" calcext:value-type="string">
            <text:p>https://r.res.easebar.com/pic/20241205/62f2f94b-228c-4015-9d56-b9134c171cf5.png</text:p>
          </table:table-cell>
          <table:table-cell office:value-type="string" calcext:value-type="string">
            <text:p>Perform up to three consecutive jumps while airborne</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Dragon's Defense</text:p>
          </table:table-cell>
          <table:table-cell office:value-type="string" calcext:value-type="string">
            <text:p>https://r.res.easebar.com/pic/20241205/5745baab-4f3f-47f0-9eb0-8b8ea67f81f2.png</text:p>
          </table:table-cell>
          <table:table-cell office:value-type="string" calcext:value-type="string">
            <text:p>Assume a defensive stance with a boost of Chi to block incoming attacks and gain Damage Reduction, then strike back with Yat Jee Chung Kuen</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Wall Runner</text:p>
          </table:table-cell>
          <table:table-cell office:value-type="string" calcext:value-type="string">
            <text:p>https://r.res.easebar.com/pic/20241205/53125bd3-2ca7-4b39-a51c-bac18c6ecfdd.png</text:p>
          </table:table-cell>
          <table:table-cell office:value-type="string" calcext:value-type="string">
            <text:p>Run horizontally along the walls</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Chi Absorption</text:p>
          </table:table-cell>
          <table:table-cell office:value-type="string" calcext:value-type="string">
            <text:p>https://r.res.easebar.com/pic/20241205/2946ce20-8956-4efb-9729-afbdaa5efc51.png</text:p>
          </table:table-cell>
          <table:table-cell office:value-type="string" calcext:value-type="string">
            <text:p>Assists in taking down enemies allow him to absorb their Chi and gain Bonus Health</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IRON FIST</text:p>
          </table:table-cell>
          <table:table-cell office:value-type="string" calcext:value-type="string">
            <text:p>Lunar Chi</text:p>
          </table:table-cell>
          <table:table-cell office:value-type="string" calcext:value-type="string">
            <text:p>https://r.res.easebar.com/pic/20250808/63e8c36e-c83a-439d-9359-5f343c7d65fa.png</text:p>
          </table:table-cell>
          <table:table-cell office:value-type="string" calcext:value-type="string">
            <text:p>Luna Snow grants Winter's Chill to Hawkeye and Iron Fist. When Iron Fist activates Harmony Recovery, he can heal nearby allies with Lunar Chi</text:p>
          </table:table-cell>
          <table:table-cell office:value-type="string" calcext:value-type="string">
            <text:p>https://www.marvelrivals.com/20241201/41360_1197227.html</text:p>
          </table:table-cell>
          <table:table-cell table:number-columns-repeated="16379"/>
        </table:table-row>
        <table:table-row table:style-name="ro1">
          <table:table-cell office:value-type="string" calcext:value-type="string">
            <text:p>PSYLOCKE</text:p>
          </table:table-cell>
          <table:table-cell office:value-type="string" calcext:value-type="string">
            <text:p>Psionic Crossbow</text:p>
          </table:table-cell>
          <table:table-cell office:value-type="string" calcext:value-type="string">
            <text:p>https://r.res.easebar.com/pic/20241127/95719d81-365d-4ad7-bf6b-026166c95aed.png</text:p>
          </table:table-cell>
          <table:table-cell office:value-type="string" calcext:value-type="string">
            <text:p>Unleash bolts with psionic crossbows to damage enemies and reduce the cooldowns of all her abilities</text:p>
          </table:table-cell>
          <table:table-cell office:value-type="string" calcext:value-type="string">
            <text:p>https://www.marvelrivals.com/20241124/41360_1195754.html</text:p>
          </table:table-cell>
          <table:table-cell table:number-columns-repeated="16379"/>
        </table:table-row>
        <table:table-row table:style-name="ro1">
          <table:table-cell office:value-type="string" calcext:value-type="string">
            <text:p>PSYLOCKE</text:p>
          </table:table-cell>
          <table:table-cell office:value-type="string" calcext:value-type="string">
            <text:p>Dance of the Butterfly</text:p>
          </table:table-cell>
          <table:table-cell office:value-type="string" calcext:value-type="string">
            <text:p>https://r.res.easebar.com/pic/20241127/dabcc1e3-5490-4fa4-87ab-b9440a74b69b.png</text:p>
          </table:table-cell>
          <table:table-cell office:value-type="string" calcext:value-type="string">
            <text:p>Slash nearby enemies with a psionic katana, dealing massive damage</text:p>
          </table:table-cell>
          <table:table-cell office:value-type="string" calcext:value-type="string">
            <text:p>https://www.marvelrivals.com/20241124/41360_1195754.html</text:p>
          </table:table-cell>
          <table:table-cell table:number-columns-repeated="16379"/>
        </table:table-row>
        <table:table-row table:style-name="ro1">
          <table:table-cell office:value-type="string" calcext:value-type="string">
            <text:p>PSYLOCKE</text:p>
          </table:table-cell>
          <table:table-cell office:value-type="string" calcext:value-type="string">
            <text:p>Psi-Blade Dash</text:p>
          </table:table-cell>
          <table:table-cell office:value-type="string" calcext:value-type="string">
            <text:p>https://r.res.easebar.com/pic/20241127/af147052-f9a1-416b-8bfc-0143471b18c1.png</text:p>
          </table:table-cell>
          <table:table-cell office:value-type="string" calcext:value-type="string">
            <text:p>Dash forward and slice through enemies along the path with psionic blades</text:p>
          </table:table-cell>
          <table:table-cell office:value-type="string" calcext:value-type="string">
            <text:p>https://www.marvelrivals.com/20241124/41360_1195754.html</text:p>
          </table:table-cell>
          <table:table-cell table:number-columns-repeated="16379"/>
        </table:table-row>
        <table:table-row table:style-name="ro1">
          <table:table-cell office:value-type="string" calcext:value-type="string">
            <text:p>PSYLOCKE</text:p>
          </table:table-cell>
          <table:table-cell office:value-type="string" calcext:value-type="string">
            <text:p>Psychic Stealth</text:p>
          </table:table-cell>
          <table:table-cell office:value-type="string" calcext:value-type="string">
            <text:p>https://r.res.easebar.com/pic/20241127/55b04754-bda5-4bcf-8a95-44479c836508.png</text:p>
          </table:table-cell>
          <table:table-cell office:value-type="string" calcext:value-type="string">
            <text:p>Enter stealth and gain a Movement Boost</text:p>
          </table:table-cell>
          <table:table-cell office:value-type="string" calcext:value-type="string">
            <text:p>https://www.marvelrivals.com/20241124/41360_1195754.html</text:p>
          </table:table-cell>
          <table:table-cell table:number-columns-repeated="16379"/>
        </table:table-row>
        <table:table-row table:style-name="ro1">
          <table:table-cell office:value-type="string" calcext:value-type="string">
            <text:p>PSYLOCKE</text:p>
          </table:table-cell>
          <table:table-cell office:value-type="string" calcext:value-type="string">
            <text:p>Wing Shurikens</text:p>
          </table:table-cell>
          <table:table-cell office:value-type="string" calcext:value-type="string">
            <text:p>https://r.res.easebar.com/pic/20241127/90b85285-ea24-4fb2-8ec4-b60d3f177569.png</text:p>
          </table:table-cell>
          <table:table-cell office:value-type="string" calcext:value-type="string">
            <text:p>Launch a volley of psionic shurikens that stick to enemies, dealing damage and granting herself Bonus Health. Press again to recall the shurikens</text:p>
          </table:table-cell>
          <table:table-cell office:value-type="string" calcext:value-type="string">
            <text:p>https://www.marvelrivals.com/20241124/41360_1195754.html</text:p>
          </table:table-cell>
          <table:table-cell table:number-columns-repeated="16379"/>
        </table:table-row>
        <table:table-row table:style-name="ro1">
          <table:table-cell office:value-type="string" calcext:value-type="string">
            <text:p>PSYLOCKE</text:p>
          </table:table-cell>
          <table:table-cell office:value-type="string" calcext:value-type="string">
            <text:p>LIGHT &amp; DARK DARTS</text:p>
          </table:table-cell>
          <table:table-cell office:value-type="string" calcext:value-type="string">
            <text:p>https://r.res.easebar.com/pic/20251212/67962d9c-35dd-4d15-9e06-5f85ea2c0aff.png</text:p>
          </table:table-cell>
          <table:table-cell office:value-type="string" calcext:value-type="string">
            <text:p>Cloak &amp; Dagger share light and dark energy with Hawkeye and Psylocke. When Hawkeye uses Crescent Slash, he also releases a blade wave that heals and boosts healing for teammates, while inflicting damage and Vulnerability on enemies. Psylocke can launch a Light Boomerang Dart that heals allies, harms enemies, and provides her with temporary healing upon return. She can also unleash a ring of Dark Darts that slow enemies while she briefly enters a Phased state</text:p>
          </table:table-cell>
          <table:table-cell office:value-type="string" calcext:value-type="string">
            <text:p>https://www.marvelrivals.com/20241124/41360_1195754.html</text:p>
          </table:table-cell>
          <table:table-cell table:number-columns-repeated="16379"/>
        </table:table-row>
        <table:table-row table:style-name="ro1">
          <table:table-cell office:value-type="string" calcext:value-type="string">
            <text:p>HAWKEYE</text:p>
          </table:table-cell>
          <table:table-cell office:value-type="string" calcext:value-type="string">
            <text:p>Piercing Arrow</text:p>
          </table:table-cell>
          <table:table-cell office:value-type="string" calcext:value-type="string">
            <text:p>https://r.res.easebar.com/pic/20241124/9107db4e-f275-49aa-87bf-96c697157a15.png</text:p>
          </table:table-cell>
          <table:table-cell office:value-type="string" calcext:value-type="string">
            <text:p>Shoot a powerful arrow</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Blast Arrow</text:p>
          </table:table-cell>
          <table:table-cell office:value-type="string" calcext:value-type="string">
            <text:p>https://r.res.easebar.com/pic/20241124/b54fcda9-4e31-4a7b-87c7-c7e8fd675434.png</text:p>
          </table:table-cell>
          <table:table-cell office:value-type="string" calcext:value-type="string">
            <text:p>Shoot three explosive arrows</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Hunter's Sight</text:p>
          </table:table-cell>
          <table:table-cell office:value-type="string" calcext:value-type="string">
            <text:p>https://r.res.easebar.com/pic/20241124/15af78f7-6723-402d-916e-0e17ebf4b6df.png</text:p>
          </table:table-cell>
          <table:table-cell office:value-type="string" calcext:value-type="string">
            <text:p>Capture Afterimages of enemies in his view. Damage dealt to an Afterimage is transferred to the corresponding enemy</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Crescent Slash</text:p>
          </table:table-cell>
          <table:table-cell office:value-type="string" calcext:value-type="string">
            <text:p>https://r.res.easebar.com/pic/20241124/a598cd3c-e1d2-4403-8d48-13bf9dcf1b39.png</text:p>
          </table:table-cell>
          <table:table-cell office:value-type="string" calcext:value-type="string">
            <text:p>Unsheathe a katana and slash forward, launching up enemies hit</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Hypersonic Arrow</text:p>
          </table:table-cell>
          <table:table-cell office:value-type="string" calcext:value-type="string">
            <text:p>https://r.res.easebar.com/pic/20241124/96e35f6b-b42a-461a-9cd9-554ed05e3470.png</text:p>
          </table:table-cell>
          <table:table-cell office:value-type="string" calcext:value-type="string">
            <text:p>Shoot a Hypersonic Arrow, dealing two instances of damage to enemies in its path and inflicting them with Slow. This ability can Knock Down flying heroes</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Ronin Slash</text:p>
          </table:table-cell>
          <table:table-cell office:value-type="string" calcext:value-type="string">
            <text:p>https://r.res.easebar.com/pic/20241124/d8d9cc33-6737-4481-b442-ce0375138806.png</text:p>
          </table:table-cell>
          <table:table-cell office:value-type="string" calcext:value-type="string">
            <text:p>Swing a wakizashi to strike frontal enemies, deflecting all incoming projectiles</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Skyward Leap</text:p>
          </table:table-cell>
          <table:table-cell office:value-type="string" calcext:value-type="string">
            <text:p>https://r.res.easebar.com/pic/20241124/83892ce1-2db5-4c6c-a0f2-a4117ab86aab.png</text:p>
          </table:table-cell>
          <table:table-cell office:value-type="string" calcext:value-type="string">
            <text:p>Perform a double jump in the direction of movement</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Archer's Focus</text:p>
          </table:table-cell>
          <table:table-cell office:value-type="string" calcext:value-type="string">
            <text:p>https://r.res.easebar.com/pic/20241124/54419864-579b-4029-bc38-150d604b96c2.png</text:p>
          </table:table-cell>
          <table:table-cell office:value-type="string" calcext:value-type="string">
            <text:p>Aim at an enemy to improve focus, enhancing the damage inflicted by Piercing Arrow</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HAWKEYE</text:p>
          </table:table-cell>
          <table:table-cell office:value-type="string" calcext:value-type="string">
            <text:p>MOONLIT SLASH</text:p>
          </table:table-cell>
          <table:table-cell office:value-type="string" calcext:value-type="string">
            <text:p>https://r.res.easebar.com/pic/20251115/51eb0c6d-b829-4f42-8254-63a45af24047.png</text:p>
          </table:table-cell>
          <table:table-cell office:value-type="string" calcext:value-type="string">
            <text:p>Cloak &amp; Dagger inject light and dark energy into Hawkeye's katana. When Hawkeye uses Crescent Slash, enemies hit are launched back, and a blade wave filled with light and energy sweeps forward. This wave passes through both allies and enemies: it heals and boosts healing for allies, while damaging enemies and applying Vulnerability</text:p>
          </table:table-cell>
          <table:table-cell office:value-type="string" calcext:value-type="string">
            <text:p>https://www.marvelrivals.com/20241124/41360_1195753.html</text:p>
          </table:table-cell>
          <table:table-cell table:number-columns-repeated="16379"/>
        </table:table-row>
        <table:table-row table:style-name="ro1">
          <table:table-cell office:value-type="string" calcext:value-type="string">
            <text:p>IRON MAN</text:p>
          </table:table-cell>
          <table:table-cell office:value-type="string" calcext:value-type="string">
            <text:p>Repulsor Blast</text:p>
          </table:table-cell>
          <table:table-cell office:value-type="string" calcext:value-type="string">
            <text:p>https://r.res.easebar.com/pic/20241120/d69cf17a-732e-486d-87e3-43c5892e42c3.png</text:p>
          </table:table-cell>
          <table:table-cell office:value-type="string" calcext:value-type="string">
            <text:p>Fire nano pulse cannons forward</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Repulsor Blast (Armor Overdrive)</text:p>
          </table:table-cell>
          <table:table-cell office:value-type="string" calcext:value-type="string">
            <text:p>https://r.res.easebar.com/pic/20241120/d69cf17a-732e-486d-87e3-43c5892e42c3.png</text:p>
          </table:table-cell>
          <table:table-cell office:value-type="string" calcext:value-type="string">
            <text:p>Fire nano pulse cannons forward</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Unibeam</text:p>
          </table:table-cell>
          <table:table-cell office:value-type="string" calcext:value-type="string">
            <text:p>https://r.res.easebar.com/pic/20241120/5a005241-4e91-4240-9da0-671454971524.png</text:p>
          </table:table-cell>
          <table:table-cell office:value-type="string" calcext:value-type="string">
            <text:p>Fire nano pulse cannons forward</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Unibeam (Armor Overdrive)</text:p>
          </table:table-cell>
          <table:table-cell office:value-type="string" calcext:value-type="string">
            <text:p>https://r.res.easebar.com/pic/20241120/5a005241-4e91-4240-9da0-671454971524.png</text:p>
          </table:table-cell>
          <table:table-cell office:value-type="string" calcext:value-type="string">
            <text:p>Fire nano pulse cannons forward</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Invincible Pulse Cannon</text:p>
          </table:table-cell>
          <table:table-cell office:value-type="string" calcext:value-type="string">
            <text:p>https://r.res.easebar.com/pic/20241120/35909ad4-f7f5-4d30-8d58-b076bebca067.png</text:p>
          </table:table-cell>
          <table:table-cell office:value-type="string" calcext:value-type="string">
            <text:p>Fire a devastating pulse cannon in the targeted direction, delivering catastrophic damage to the targeted area upon impact</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Hyper-Velocity</text:p>
          </table:table-cell>
          <table:table-cell office:value-type="string" calcext:value-type="string">
            <text:p>https://r.res.easebar.com/pic/20241120/ea996cd4-74a0-40d7-9498-3253084b9be2.png</text:p>
          </table:table-cell>
          <table:table-cell office:value-type="string" calcext:value-type="string">
            <text:p>Activate Hyper-Velocity state for swift forward flight</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Hyper-Velocity (Armor Overdrive)</text:p>
          </table:table-cell>
          <table:table-cell office:value-type="string" calcext:value-type="string">
            <text:p>https://r.res.easebar.com/pic/20241120/ea996cd4-74a0-40d7-9498-3253084b9be2.png</text:p>
          </table:table-cell>
          <table:table-cell office:value-type="string" calcext:value-type="string">
            <text:p>Activate Hyper-Velocity state for swift forward flight</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Armor Overdrive</text:p>
          </table:table-cell>
          <table:table-cell office:value-type="string" calcext:value-type="string">
            <text:p>https://r.res.easebar.com/pic/20241120/27f07e85-4220-4227-892b-04c9850a7c02.png</text:p>
          </table:table-cell>
          <table:table-cell office:value-type="string" calcext:value-type="string">
            <text:p>Activate Armor Overdrive state, enhancing the damage of Repulsor Blast and Unibeam</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Micro-Missile Barrage</text:p>
          </table:table-cell>
          <table:table-cell office:value-type="string" calcext:value-type="string">
            <text:p>https://r.res.easebar.com/pic/20241120/19e4e5da-fa8d-4cf8-a817-1111d91dc389.png</text:p>
          </table:table-cell>
          <table:table-cell office:value-type="string" calcext:value-type="string">
            <text:p>When Hyper-Velocity or Armor Overdrive is used, Iron Man can launch a missile bombardment</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Micro-Missile Barrage (Armor Overdrive)</text:p>
          </table:table-cell>
          <table:table-cell office:value-type="string" calcext:value-type="string">
            <text:p>https://r.res.easebar.com/pic/20241120/19e4e5da-fa8d-4cf8-a817-1111d91dc389.png</text:p>
          </table:table-cell>
          <table:table-cell office:value-type="string" calcext:value-type="string">
            <text:p>When Hyper-Velocity or Armor Overdrive is used, Iron Man can launch a missile bombardment</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IRON MAN</text:p>
          </table:table-cell>
          <table:table-cell office:value-type="string" calcext:value-type="string">
            <text:p>NANO TECH</text:p>
          </table:table-cell>
          <table:table-cell office:value-type="string" calcext:value-type="string">
            <text:p>https://r.res.easebar.com/pic/20250531/2d4ab1bf-a8da-4216-9c4c-5e755596e86d.png</text:p>
          </table:table-cell>
          <table:table-cell office:value-type="string" calcext:value-type="string">
            <text:p>When Iron Man, Ultron and Squirrel Girl team up, Ultron's Encephalo-Ray upgrades to Nano-Ray, firing a beam that pierces through all characters, dealing continuous damage to foes while healing allies; Squirrel Girl gains the Squirrel Missile ability. She directs a squirrel to ride Iron Man's nanotech glove as a homing missile. Upon hit, the squirrel flees just before a fiery explosion!</text:p>
          </table:table-cell>
          <table:table-cell office:value-type="string" calcext:value-type="string">
            <text:p>https://www.marvelrivals.com/20241123/41360_1195687.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Crescent Dart</text:p>
          </table:table-cell>
          <table:table-cell office:value-type="string" calcext:value-type="string">
            <text:p>https://r.res.easebar.com/pic/20241120/f4bab63c-dd7b-4ddc-b9f5-d0481acffaf3.png</text:p>
          </table:table-cell>
          <table:table-cell office:value-type="string" calcext:value-type="string">
            <text:p>Unleash Crescent Darts forward that can bounce between enemies and Ankhs, dealing damage to enemies</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Hand of Khonshu</text:p>
          </table:table-cell>
          <table:table-cell office:value-type="string" calcext:value-type="string">
            <text:p>https://r.res.easebar.com/pic/20241120/9253ada4-37a7-4cc9-9008-2d3e748d8dc1.png</text:p>
          </table:table-cell>
          <table:table-cell office:value-type="string" calcext:value-type="string">
            <text:p>Open a portal that allows Khonshu to bombard enemies with his talons</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Night Glider</text:p>
          </table:table-cell>
          <table:table-cell office:value-type="string" calcext:value-type="string">
            <text:p>https://r.res.easebar.com/pic/20241120/815eee35-da1f-4c84-808b-ce71aa39df9c.png</text:p>
          </table:table-cell>
          <table:table-cell office:value-type="string" calcext:value-type="string">
            <text:p>Hold SHIFT to glide</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Ancient Ankh</text:p>
          </table:table-cell>
          <table:table-cell office:value-type="string" calcext:value-type="string">
            <text:p>https://r.res.easebar.com/pic/20241120/4dee2bf5-3255-4ce7-bfe4-463eb64bda06.png</text:p>
          </table:table-cell>
          <table:table-cell office:value-type="string" calcext:value-type="string">
            <text:p>Fire an Ankh to launch up enemies within its radius towards the center</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Moonlight Hook</text:p>
          </table:table-cell>
          <table:table-cell office:value-type="string" calcext:value-type="string">
            <text:p>https://r.res.easebar.com/pic/20241120/60e26c6a-92ea-4e8a-a669-4c3a9be668f7.png</text:p>
          </table:table-cell>
          <table:table-cell office:value-type="string" calcext:value-type="string">
            <text:p>Launch a frontal grappling hook that pulls Moon Knight towards it</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Rising Leap</text:p>
          </table:table-cell>
          <table:table-cell office:value-type="string" calcext:value-type="string">
            <text:p>https://r.res.easebar.com/pic/20241120/f7f1a460-7069-42b0-b926-a5fd1c43d171.png</text:p>
          </table:table-cell>
          <table:table-cell office:value-type="string" calcext:value-type="string">
            <text:p>Perform a double jump</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Moon Blade</text:p>
          </table:table-cell>
          <table:table-cell office:value-type="string" calcext:value-type="string">
            <text:p>https://r.res.easebar.com/pic/20241120/7864c28b-7c4b-4cc4-8e74-d600e7c586ee.png</text:p>
          </table:table-cell>
          <table:table-cell office:value-type="string" calcext:value-type="string">
            <text:p>Launch forward a Moon Blade that can bounce between enemies and Ankhs, dealing damage to enemies</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Triple Eclipse</text:p>
          </table:table-cell>
          <table:table-cell office:value-type="string" calcext:value-type="string">
            <text:p>https://r.res.easebar.com/pic/20241125/9b92fd1c-3cdc-4d9d-83cf-f43d6706a73d.png</text:p>
          </table:table-cell>
          <table:table-cell office:value-type="string" calcext:value-type="string">
            <text:p>Perform a combo with his truncheon, and the third strike will launch up the enemy hit slightly</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MOON KNIGHT</text:p>
          </table:table-cell>
          <table:table-cell office:value-type="string" calcext:value-type="string">
            <text:p>MOON GOD'S CHOSEN</text:p>
          </table:table-cell>
          <table:table-cell office:value-type="string" calcext:value-type="string">
            <text:p>https://r.res.easebar.com/pic/20251115/85d68157-5d41-4297-a2b2-d353a96dda73.png</text:p>
          </table:table-cell>
          <table:table-cell office:value-type="string" calcext:value-type="string">
            <text:p>Blessed by Khonshu, Blade gains a new ability. When activated, Blade swings his Ancestral Sword in a powerful slash, dashing forward a short distance. At the end of the dash, he swiftly slashes four times, each strike sending a Darkmoon Blade forward. When a Darkmoon Blade hits an enemy, it bounces to nearby targets</text:p>
          </table:table-cell>
          <table:table-cell office:value-type="string" calcext:value-type="string">
            <text:p>https://www.marvelrivals.com/20241123/41360_1195685.html</text:p>
          </table:table-cell>
          <table:table-cell table:number-columns-repeated="16379"/>
        </table:table-row>
        <table:table-row table:style-name="ro1">
          <table:table-cell office:value-type="string" calcext:value-type="string">
            <text:p>NAMOR</text:p>
          </table:table-cell>
          <table:table-cell office:value-type="string" calcext:value-type="string">
            <text:p>Trident of Neptune</text:p>
          </table:table-cell>
          <table:table-cell office:value-type="string" calcext:value-type="string">
            <text:p>https://r.res.easebar.com/pic/20241120/cc74a8d7-aa7a-4bef-9777-6f2499ece5a4.png</text:p>
          </table:table-cell>
          <table:table-cell office:value-type="string" calcext:value-type="string">
            <text:p>Throw the trident forward, reducing Aquatic Dominion's cooldown upon enemy impact. Critical hits cause Monstro Spawn to enter a berserk state, gaining increased Attack Speed</text:p>
          </table:table-cell>
          <table:table-cell office:value-type="string" calcext:value-type="string">
            <text:p>https://www.marvelrivals.com/20241123/41360_1195686.html</text:p>
          </table:table-cell>
          <table:table-cell table:number-columns-repeated="16379"/>
        </table:table-row>
        <table:table-row table:style-name="ro1">
          <table:table-cell office:value-type="string" calcext:value-type="string">
            <text:p>NAMOR</text:p>
          </table:table-cell>
          <table:table-cell office:value-type="string" calcext:value-type="string">
            <text:p>Horn of Proteus</text:p>
          </table:table-cell>
          <table:table-cell office:value-type="string" calcext:value-type="string">
            <text:p>https://r.res.easebar.com/pic/20241120/41fb388d-1b2c-433f-ab04-3a02562c5b19.png</text:p>
          </table:table-cell>
          <table:table-cell office:value-type="string" calcext:value-type="string">
            <text:p>Summon Giganto to leap atop enemies within range, disabling their mobility abilities</text:p>
          </table:table-cell>
          <table:table-cell office:value-type="string" calcext:value-type="string">
            <text:p>https://www.marvelrivals.com/20241123/41360_1195686.html</text:p>
          </table:table-cell>
          <table:table-cell table:number-columns-repeated="16379"/>
        </table:table-row>
        <table:table-row table:style-name="ro1">
          <table:table-cell office:value-type="string" calcext:value-type="string">
            <text:p>NAMOR</text:p>
          </table:table-cell>
          <table:table-cell office:value-type="string" calcext:value-type="string">
            <text:p>Blessing of the Deep</text:p>
          </table:table-cell>
          <table:table-cell office:value-type="string" calcext:value-type="string">
            <text:p>https://r.res.easebar.com/pic/20241120/e301578f-ee43-42c9-a95a-f162259d62fb.png</text:p>
          </table:table-cell>
          <table:table-cell office:value-type="string" calcext:value-type="string">
            <text:p>Summon a protective barrier while flying upwards</text:p>
          </table:table-cell>
          <table:table-cell office:value-type="string" calcext:value-type="string">
            <text:p>https://www.marvelrivals.com/20241123/41360_1195686.html</text:p>
          </table:table-cell>
          <table:table-cell table:number-columns-repeated="16379"/>
        </table:table-row>
        <table:table-row table:style-name="ro1">
          <table:table-cell office:value-type="string" calcext:value-type="string">
            <text:p>NAMOR</text:p>
          </table:table-cell>
          <table:table-cell office:value-type="string" calcext:value-type="string">
            <text:p>Aquatic Dominion</text:p>
          </table:table-cell>
          <table:table-cell office:value-type="string" calcext:value-type="string">
            <text:p>https://r.res.easebar.com/pic/20241120/4bf22127-5c87-4163-82d7-ba90c1edae57.png</text:p>
          </table:table-cell>
          <table:table-cell office:value-type="string" calcext:value-type="string">
            <text:p>Summon a Monstro Spawn that can autonomously attack enemies</text:p>
          </table:table-cell>
          <table:table-cell office:value-type="string" calcext:value-type="string">
            <text:p>https://www.marvelrivals.com/20241123/41360_1195686.html</text:p>
          </table:table-cell>
          <table:table-cell table:number-columns-repeated="16379"/>
        </table:table-row>
        <table:table-row table:style-name="ro1">
          <table:table-cell office:value-type="string" calcext:value-type="string">
            <text:p>NAMOR</text:p>
          </table:table-cell>
          <table:table-cell office:value-type="string" calcext:value-type="string">
            <text:p>Wrath of the Seven Seas</text:p>
          </table:table-cell>
          <table:table-cell office:value-type="string" calcext:value-type="string">
            <text:p>https://r.res.easebar.com/pic/20241120/0e8f873c-9edf-43ff-87f8-1db24dcb4500.png</text:p>
          </table:table-cell>
          <table:table-cell office:value-type="string" calcext:value-type="string">
            <text:p>Launch the trident forward to damage nearby enemies, then direct all Monstro Spawn to perform an enhanced attack on the nearest hit enemy. When the trident hits an enemy, Monstro Spawn to enter a berserk state, gaining increased Attack Speed</text:p>
          </table:table-cell>
          <table:table-cell office:value-type="string" calcext:value-type="string">
            <text:p>https://www.marvelrivals.com/20241123/41360_1195686.html</text:p>
          </table:table-cell>
          <table:table-cell table:number-columns-repeated="16379"/>
        </table:table-row>
        <table:table-row table:style-name="ro1">
          <table:table-cell office:value-type="string" calcext:value-type="string">
            <text:p>NAMOR</text:p>
          </table:table-cell>
          <table:table-cell office:value-type="string" calcext:value-type="string">
            <text:p>TIDAL DIRGE</text:p>
          </table:table-cell>
          <table:table-cell office:value-type="string" calcext:value-type="string">
            <text:p>https://r.res.easebar.com/pic/20251011/e1e60d27-462f-41da-90cb-96f47ef58548.png</text:p>
          </table:table-cell>
          <table:table-cell office:value-type="string" calcext:value-type="string">
            <text:p>Hela channels energy of the undead to empower Namor. When Namor strikes with his trident, a spectral water column erupts at the target area, slowing enemies hit. Whenever Hela or Namor assist in a KO, an invulnerable Undead Monstro spawns at the fallen enemy's position, automatically attacking the nearest foe for a short time before vanishing</text:p>
          </table:table-cell>
          <table:table-cell office:value-type="string" calcext:value-type="string">
            <text:p>https://www.marvelrivals.com/20241123/41360_1195686.html</text:p>
          </table:table-cell>
          <table:table-cell table:number-columns-repeated="16379"/>
        </table:table-row>
        <table:table-row table:style-name="ro1">
          <table:table-cell office:value-type="string" calcext:value-type="string">
            <text:p>STAR-LORD</text:p>
          </table:table-cell>
          <table:table-cell office:value-type="string" calcext:value-type="string">
            <text:p>Element Guns</text:p>
          </table:table-cell>
          <table:table-cell office:value-type="string" calcext:value-type="string">
            <text:p>https://r.res.easebar.com/pic/20241120/947d9975-ec6d-4d17-b00b-ce4642fafebc.png</text:p>
          </table:table-cell>
          <table:table-cell office:value-type="string" calcext:value-type="string">
            <text:p>Shoot enemies with dual Element Guns</text:p>
          </table:table-cell>
          <table:table-cell office:value-type="string" calcext:value-type="string">
            <text:p>https://www.marvelrivals.com/20241123/41360_1195683.html</text:p>
          </table:table-cell>
          <table:table-cell table:number-columns-repeated="16379"/>
        </table:table-row>
        <table:table-row table:style-name="ro1">
          <table:table-cell office:value-type="string" calcext:value-type="string">
            <text:p>STAR-LORD</text:p>
          </table:table-cell>
          <table:table-cell office:value-type="string" calcext:value-type="string">
            <text:p>Galactic Legend</text:p>
          </table:table-cell>
          <table:table-cell office:value-type="string" calcext:value-type="string">
            <text:p>https://r.res.easebar.com/pic/20241120/cdfdc8b1-27e7-4a28-a666-3a3387b92263.png</text:p>
          </table:table-cell>
          <table:table-cell office:value-type="string" calcext:value-type="string">
            <text:p>Engage in free-flight and lock onto enemies in sight</text:p>
          </table:table-cell>
          <table:table-cell office:value-type="string" calcext:value-type="string">
            <text:p>https://www.marvelrivals.com/20241123/41360_1195683.html</text:p>
          </table:table-cell>
          <table:table-cell table:number-columns-repeated="16379"/>
        </table:table-row>
        <table:table-row table:style-name="ro1">
          <table:table-cell office:value-type="string" calcext:value-type="string">
            <text:p>STAR-LORD</text:p>
          </table:table-cell>
          <table:table-cell office:value-type="string" calcext:value-type="string">
            <text:p>Rocket Propulsion</text:p>
          </table:table-cell>
          <table:table-cell office:value-type="string" calcext:value-type="string">
            <text:p>https://r.res.easebar.com/pic/20241120/2c065ae8-398d-4001-a38d-c30a2d4737bc.png</text:p>
          </table:table-cell>
          <table:table-cell office:value-type="string" calcext:value-type="string">
            <text:p>Consume energy to gain a Movement Boost and soar forward</text:p>
          </table:table-cell>
          <table:table-cell office:value-type="string" calcext:value-type="string">
            <text:p>https://www.marvelrivals.com/20241123/41360_1195683.html</text:p>
          </table:table-cell>
          <table:table-cell table:number-columns-repeated="16379"/>
        </table:table-row>
        <table:table-row table:style-name="ro1">
          <table:table-cell office:value-type="string" calcext:value-type="string">
            <text:p>STAR-LORD</text:p>
          </table:table-cell>
          <table:table-cell office:value-type="string" calcext:value-type="string">
            <text:p>Blaster Barrage</text:p>
          </table:table-cell>
          <table:table-cell office:value-type="string" calcext:value-type="string">
            <text:p>https://r.res.easebar.com/pic/20241120/00802ad1-6900-44dc-a134-258fae77b326.png</text:p>
          </table:table-cell>
          <table:table-cell office:value-type="string" calcext:value-type="string">
            <text:p>Fire a frenzy of shots, causing damage to enemies within range.</text:p>
          </table:table-cell>
          <table:table-cell office:value-type="string" calcext:value-type="string">
            <text:p>https://www.marvelrivals.com/20241123/41360_1195683.html</text:p>
          </table:table-cell>
          <table:table-cell table:number-columns-repeated="16379"/>
        </table:table-row>
        <table:table-row table:style-name="ro1">
          <table:table-cell office:value-type="string" calcext:value-type="string">
            <text:p>STAR-LORD</text:p>
          </table:table-cell>
          <table:table-cell office:value-type="string" calcext:value-type="string">
            <text:p>Stellar Shift</text:p>
          </table:table-cell>
          <table:table-cell office:value-type="string" calcext:value-type="string">
            <text:p>https://r.res.easebar.com/pic/20241120/8f25f3a9-7dba-437d-b794-fed37ea2fdd3.png</text:p>
          </table:table-cell>
          <table:table-cell office:value-type="string" calcext:value-type="string">
            <text:p>Dodge in the direction of movement and swiftly reload</text:p>
          </table:table-cell>
          <table:table-cell office:value-type="string" calcext:value-type="string">
            <text:p>https://www.marvelrivals.com/20241123/41360_1195683.html</text:p>
          </table:table-cell>
          <table:table-cell table:number-columns-repeated="16379"/>
        </table:table-row>
        <table:table-row table:style-name="ro1">
          <table:table-cell office:value-type="string" calcext:value-type="string">
            <text:p>STAR-LORD</text:p>
          </table:table-cell>
          <table:table-cell office:value-type="string" calcext:value-type="string">
            <text:p>Astral Jump</text:p>
          </table:table-cell>
          <table:table-cell office:value-type="string" calcext:value-type="string">
            <text:p>https://r.res.easebar.com/pic/20250808/cd6417e5-8cbb-4e85-b34f-0e4d79875b80.png</text:p>
          </table:table-cell>
          <table:table-cell office:value-type="string" calcext:value-type="string">
            <text:p>Star-Lord gets a teleport to its deployment point from anywhere on the map</text:p>
          </table:table-cell>
          <table:table-cell office:value-type="string" calcext:value-type="string">
            <text:p>https://www.marvelrivals.com/20241123/41360_1195683.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Chaos Control</text:p>
          </table:table-cell>
          <table:table-cell office:value-type="string" calcext:value-type="string">
            <text:p>https://r.res.easebar.com/pic/20241120/9df1d11b-6486-4f0e-83a8-b7e5dca461b6.png</text:p>
          </table:table-cell>
          <table:table-cell office:value-type="string" calcext:value-type="string">
            <text:p>Unleash Chaos Magic on enemies to deal damage and restore Chaos Energy</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Reality Erasure</text:p>
          </table:table-cell>
          <table:table-cell office:value-type="string" calcext:value-type="string">
            <text:p>https://r.res.easebar.com/pic/20241120/9fe279e3-1ca1-4202-b925-4eaddc649f14.png</text:p>
          </table:table-cell>
          <table:table-cell office:value-type="string" calcext:value-type="string">
            <text:p>Engage in free-flight while charging energy, then unleash it to deal massive damage</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Mystic Projection</text:p>
          </table:table-cell>
          <table:table-cell office:value-type="string" calcext:value-type="string">
            <text:p>https://r.res.easebar.com/pic/20241120/a1bd056d-4040-4dda-a79a-c1c721718e2b.png</text:p>
          </table:table-cell>
          <table:table-cell office:value-type="string" calcext:value-type="string">
            <text:p>Enter the Phased state for free-flight. Press again to exit early</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Dark Seal</text:p>
          </table:table-cell>
          <table:table-cell office:value-type="string" calcext:value-type="string">
            <text:p>https://r.res.easebar.com/pic/20241120/06d393d2-e8b7-443c-8e04-3696ecefac86.png</text:p>
          </table:table-cell>
          <table:table-cell office:value-type="string" calcext:value-type="string">
            <text:p>Land a hit on a target or the scene, or press E to generate a Force Field that periodically Stuns enemies within range</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Telekinesis</text:p>
          </table:table-cell>
          <table:table-cell office:value-type="string" calcext:value-type="string">
            <text:p>https://r.res.easebar.com/pic/20241120/2893e078-cc3e-49ec-8447-4ff73a549139.png</text:p>
          </table:table-cell>
          <table:table-cell office:value-type="string" calcext:value-type="string">
            <text:p>Hold Space to fall slowly</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Chthonian Burst</text:p>
          </table:table-cell>
          <table:table-cell office:value-type="string" calcext:value-type="string">
            <text:p>https://r.res.easebar.com/pic/20241120/97e67269-1308-46d2-aef0-99ef179d9748.png</text:p>
          </table:table-cell>
          <table:table-cell office:value-type="string" calcext:value-type="string">
            <text:p>Consume Chaos Energy to fire explosive magic missiles, damaging enemies</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SCARLET WITCH</text:p>
          </table:table-cell>
          <table:table-cell office:value-type="string" calcext:value-type="string">
            <text:p>Sorcery Surge</text:p>
          </table:table-cell>
          <table:table-cell office:value-type="string" calcext:value-type="string">
            <text:p>https://r.res.easebar.com/pic/20250410/99eb7c66-a521-4b6b-aa54-1048db609e28.png</text:p>
          </table:table-cell>
          <table:table-cell office:value-type="string" calcext:value-type="string">
            <text:p>Doctor Strange shares his arcane mastery, replacing Scarlet Witch's Chthonian Burst with Mystic Burst upon activation. Hold down the attack button to unleash a rapid, relentless salvo of magical missiles in the target direction</text:p>
          </table:table-cell>
          <table:table-cell office:value-type="string" calcext:value-type="string">
            <text:p>https://www.marvelrivals.com/20241123/41360_1195684.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Roterstern</text:p>
          </table:table-cell>
          <table:table-cell office:value-type="string" calcext:value-type="string">
            <text:p>https://r.res.easebar.com/pic/20241120/c394a786-61e2-4311-af38-ddbb77fb0c17.png</text:p>
          </table:table-cell>
          <table:table-cell office:value-type="string" calcext:value-type="string">
            <text:p>Fire explosive rounds with his blaster, Roterstern, damaging the target hit and enemies behind them.</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Kraken Impact</text:p>
          </table:table-cell>
          <table:table-cell office:value-type="string" calcext:value-type="string">
            <text:p>https://r.res.easebar.com/pic/20241120/a53ce147-45d7-472a-b01d-27c0824f21e0.png</text:p>
          </table:table-cell>
          <table:table-cell office:value-type="string" calcext:value-type="string">
            <text:p>Leap high, then dash forward and slam down with the bionic arm, dealing damage to enemies in range, marking them for Culling. Marked enemies will perish instantly if their health falls below a certain threshold, recharging the bionic arm for another Kraken Impact within a short period</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Trooper's Fist</text:p>
          </table:table-cell>
          <table:table-cell office:value-type="string" calcext:value-type="string">
            <text:p>https://r.res.easebar.com/pic/20241120/239b4e01-33ed-4f71-afd9-845810e96b8e.png</text:p>
          </table:table-cell>
          <table:table-cell office:value-type="string" calcext:value-type="string">
            <text:p>Dash forward, seizing enemies along the path and launching up enemies at the end of the dash</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Tainted Voltage</text:p>
          </table:table-cell>
          <table:table-cell office:value-type="string" calcext:value-type="string">
            <text:p>https://r.res.easebar.com/pic/20241120/65cf216c-9ad1-4a8e-9e2c-d7f1c2a9964c.png</text:p>
          </table:table-cell>
          <table:table-cell office:value-type="string" calcext:value-type="string">
            <text:p>Charge up and launch a powerful electrical punch with the bionic arm in the target direction, dealing damage to enemies within range and Slowing them. This ability can Knock Down flying heroes</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Bionic Hook</text:p>
          </table:table-cell>
          <table:table-cell office:value-type="string" calcext:value-type="string">
            <text:p>https://r.res.easebar.com/pic/20241120/4173fa58-8641-47f9-9ee5-b63472fe074e.png</text:p>
          </table:table-cell>
          <table:table-cell office:value-type="string" calcext:value-type="string">
            <text:p>Charge up and launch a hook with his bionic arm, reeling in the first target hit and enemies lurking behind</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Ceaseless Charge</text:p>
          </table:table-cell>
          <table:table-cell office:value-type="string" calcext:value-type="string">
            <text:p>https://r.res.easebar.com/pic/20241120/55a1b572-78dd-47c3-8006-5b26e8d8813a.png</text:p>
          </table:table-cell>
          <table:table-cell office:value-type="string" calcext:value-type="string">
            <text:p>Roterstern reloads automatically while the bionic arm is in action, granting Bonus Health to the Winter Soldier</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WINTER SOLDIER</text:p>
          </table:table-cell>
          <table:table-cell office:value-type="string" calcext:value-type="string">
            <text:p>Stellar Impact</text:p>
          </table:table-cell>
          <table:table-cell office:value-type="string" calcext:value-type="string">
            <text:p>https://r.res.easebar.com/pic/20250410/c34a6f5c-8be1-4bcb-a0f0-f5572a64e6e9.png</text:p>
          </table:table-cell>
          <table:table-cell office:value-type="string" calcext:value-type="string">
            <text:p>Inspired by Captain America's resolve, Winter Soldier can leap to the aid of a designated ally, slamming the ground with his mechanical arm to damage nearby foes and grant Bonus Health to allies within range. Captain America and Winter Soldier can interact with each other once both parties confirm. The duo then collides and unleashes a shockwave that damages and slows enemies</text:p>
          </table:table-cell>
          <table:table-cell office:value-type="string" calcext:value-type="string">
            <text:p>https://www.marvelrivals.com/20241123/41360_1195681.html</text:p>
          </table:table-cell>
          <table:table-cell table:number-columns-repeated="16379"/>
        </table:table-row>
        <table:table-row table:style-name="ro1">
          <table:table-cell office:value-type="string" calcext:value-type="string">
            <text:p>MAGIK</text:p>
          </table:table-cell>
          <table:table-cell office:value-type="string" calcext:value-type="string">
            <text:p>Soulsword</text:p>
          </table:table-cell>
          <table:table-cell office:value-type="string" calcext:value-type="string">
            <text:p>https://r.res.easebar.com/pic/20241120/3c254667-aec0-4d1f-bac8-8f74e5c7ec57.png</text:p>
          </table:table-cell>
          <table:table-cell office:value-type="string" calcext:value-type="string">
            <text:p>Slash forward with the Soulsword</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Darkchild</text:p>
          </table:table-cell>
          <table:table-cell office:value-type="string" calcext:value-type="string">
            <text:p>https://r.res.easebar.com/pic/20241120/54ceb957-f089-4149-9b6e-f19b0b434f76.png</text:p>
          </table:table-cell>
          <table:table-cell office:value-type="string" calcext:value-type="string">
            <text:p>Transform into Darkchild, gaining enhancements to all her abilities</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Stepping Discs</text:p>
          </table:table-cell>
          <table:table-cell office:value-type="string" calcext:value-type="string">
            <text:p>https://r.res.easebar.com/pic/20241120/83bdc026-b6c1-4c72-8a4e-b82036d06a5b.png</text:p>
          </table:table-cell>
          <table:table-cell office:value-type="string" calcext:value-type="string">
            <text:p>Jump through a Stepping Disc, teleporting a short distance in the direction of movement. Become Invincible while teleporting</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Umbral Incursion</text:p>
          </table:table-cell>
          <table:table-cell office:value-type="string" calcext:value-type="string">
            <text:p>https://r.res.easebar.com/pic/20241120/23e2f98e-b25d-465f-8aca-92772da73677.png</text:p>
          </table:table-cell>
          <table:table-cell office:value-type="string" calcext:value-type="string">
            <text:p>Dash forward and launch up enemies</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Eldritch Whirl</text:p>
          </table:table-cell>
          <table:table-cell office:value-type="string" calcext:value-type="string">
            <text:p>https://r.res.easebar.com/pic/20241120/a360c242-9475-4d7b-ba43-efb57fdbc44a.png</text:p>
          </table:table-cell>
          <table:table-cell office:value-type="string" calcext:value-type="string">
            <text:p>Spin while swinging the Soulsword after exiting a Stepping Disc</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Magik Slash</text:p>
          </table:table-cell>
          <table:table-cell office:value-type="string" calcext:value-type="string">
            <text:p>https://r.res.easebar.com/pic/20241120/ddcc3be2-0a9f-4588-bbeb-b6ecc289d8cf.png</text:p>
          </table:table-cell>
          <table:table-cell office:value-type="string" calcext:value-type="string">
            <text:p>Strike forward an air slash</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Demon's Rage</text:p>
          </table:table-cell>
          <table:table-cell office:value-type="string" calcext:value-type="string">
            <text:p>https://r.res.easebar.com/pic/20241120/a9c67524-0a71-4106-8a95-f26d78aa15e1.png</text:p>
          </table:table-cell>
          <table:table-cell office:value-type="string" calcext:value-type="string">
            <text:p>Summon a Limbo demon that attacks enemies after exiting a Stepping Disc</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Limbo's Might</text:p>
          </table:table-cell>
          <table:table-cell office:value-type="string" calcext:value-type="string">
            <text:p>https://r.res.easebar.com/pic/20241120/ca2c47d6-8349-4bae-b6bc-58436c47776b.png</text:p>
          </table:table-cell>
          <table:table-cell office:value-type="string" calcext:value-type="string">
            <text:p>Convert damage inflicted on enemies into Bonus Health to herself</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CHAIN OF CYTTORAK</text:p>
          </table:table-cell>
          <table:table-cell office:value-type="string" calcext:value-type="string">
            <text:p>https://r.res.easebar.com/pic/20250912/d6385e94-02b9-4890-b366-46e7194f8ade.png</text:p>
          </table:table-cell>
          <table:table-cell office:value-type="string" calcext:value-type="string">
            <text:p>Doctor Strange shares his arcane mastery with Scarlet Witch and Magik. Scarlet Witch's Chthonian Burst is replaced with Mystic Burst upon activation. Hold down the attack button to unleash a rapid, relentless salvo of magical missiles in the target direction. Magik can unleash a Chain of Cyttorak that links two enemies and slows them; the farther they are apart, the greater the Slow effect inflicted during the link</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Soulsword</text:p>
          </table:table-cell>
          <table:table-cell office:value-type="string" calcext:value-type="string">
            <text:p>https://r.res.easebar.com/pic/20241120/1429fdcf-3e9f-4dd9-873e-4ccf6f758cfd.png</text:p>
          </table:table-cell>
          <table:table-cell office:value-type="string" calcext:value-type="string">
            <text:p>Slash forward with the Soulsword</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Stepping Discs</text:p>
          </table:table-cell>
          <table:table-cell office:value-type="string" calcext:value-type="string">
            <text:p>https://r.res.easebar.com/pic/20241120/77738b7f-79a1-4eae-8d72-8bbda393bd5e.png</text:p>
          </table:table-cell>
          <table:table-cell office:value-type="string" calcext:value-type="string">
            <text:p>Jump through a Stepping Disc, teleporting a short distance in the direction of movement. Become Invincible while teleporting</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Umbral Incursion</text:p>
          </table:table-cell>
          <table:table-cell office:value-type="string" calcext:value-type="string">
            <text:p>https://r.res.easebar.com/pic/20241120/d5f0b817-5275-4e8f-a1cf-7674cfe5e077.png</text:p>
          </table:table-cell>
          <table:table-cell office:value-type="string" calcext:value-type="string">
            <text:p>Dash forward and launch up enemies</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Eldritch Whirl</text:p>
          </table:table-cell>
          <table:table-cell office:value-type="string" calcext:value-type="string">
            <text:p>https://r.res.easebar.com/pic/20241120/ab4444b3-e2b2-4855-bce8-ac5e4aadec45.png</text:p>
          </table:table-cell>
          <table:table-cell office:value-type="string" calcext:value-type="string">
            <text:p>Spin while swinging the Soulsword after exiting a Stepping Disc</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Magik Slash</text:p>
          </table:table-cell>
          <table:table-cell office:value-type="string" calcext:value-type="string">
            <text:p>https://r.res.easebar.com/pic/20241120/055e35e2-253d-45da-ae04-82984115f741.png</text:p>
          </table:table-cell>
          <table:table-cell office:value-type="string" calcext:value-type="string">
            <text:p>Strike forward an air slash</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MAGIK</text:p>
          </table:table-cell>
          <table:table-cell office:value-type="string" calcext:value-type="string">
            <text:p>Demon's Rage</text:p>
          </table:table-cell>
          <table:table-cell office:value-type="string" calcext:value-type="string">
            <text:p>https://r.res.easebar.com/pic/20241120/7c8271e5-5e8c-4394-a7d5-7a9e6f578295.png</text:p>
          </table:table-cell>
          <table:table-cell office:value-type="string" calcext:value-type="string">
            <text:p>Summon a Limbo demon that attacks enemies after exiting a Stepping Disc</text:p>
          </table:table-cell>
          <table:table-cell office:value-type="string" calcext:value-type="string">
            <text:p>https://www.marvelrivals.com/20241123/41360_1195682.html</text:p>
          </table:table-cell>
          <table:table-cell table:number-columns-repeated="16379"/>
        </table:table-row>
        <table:table-row table:style-name="ro1">
          <table:table-cell office:value-type="string" calcext:value-type="string">
            <text:p>SPIDER-MAN</text:p>
          </table:table-cell>
          <table:table-cell office:value-type="string" calcext:value-type="string">
            <text:p>Spider-Power</text:p>
          </table:table-cell>
          <table:table-cell office:value-type="string" calcext:value-type="string">
            <text:p>https://r.res.easebar.com/pic/20241120/b69dc2e7-1a28-471e-a000-19b06a1adac4.png</text:p>
          </table:table-cell>
          <table:table-cell office:value-type="string" calcext:value-type="string">
            <text:p>Swing fists forward to strike, dealing extra damage to the enemy with a Spider-Tracer</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Web-Cluster</text:p>
          </table:table-cell>
          <table:table-cell office:value-type="string" calcext:value-type="string">
            <text:p>https://r.res.easebar.com/pic/20241120/51836fcc-b278-46b2-80d6-3450f9902f18.png</text:p>
          </table:table-cell>
          <table:table-cell office:value-type="string" calcext:value-type="string">
            <text:p>Shoot a Web-Cluster that deals damage and attaches a Spider-Tracer to the hit enemy</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Spectacular Spin</text:p>
          </table:table-cell>
          <table:table-cell office:value-type="string" calcext:value-type="string">
            <text:p>https://r.res.easebar.com/pic/20241120/df0e1190-adea-471c-aa47-186aaabe41dc.png</text:p>
          </table:table-cell>
          <table:table-cell office:value-type="string" calcext:value-type="string">
            <text:p>Launch Web-Clusters all around to damage and Stun enemies</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Web-Swing</text:p>
          </table:table-cell>
          <table:table-cell office:value-type="string" calcext:value-type="string">
            <text:p>https://r.res.easebar.com/pic/20241120/fb95e6a5-5e9d-44d7-b565-2cda190e0cb8.png</text:p>
          </table:table-cell>
          <table:table-cell office:value-type="string" calcext:value-type="string">
            <text:p>Shoot a strand of webbing to swing.</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Get Over Here!</text:p>
          </table:table-cell>
          <table:table-cell office:value-type="string" calcext:value-type="string">
            <text:p>https://r.res.easebar.com/pic/20241120/d3b40d5d-cb78-4e6d-990c-0ec61404f8e0.png</text:p>
          </table:table-cell>
          <table:table-cell office:value-type="string" calcext:value-type="string">
            <text:p>Shoot webbing to reel in the hit enemy. If the enemy is tagged with a Spider-Tracer, Spider-Man will get pulled to them instead</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Amazing Combo</text:p>
          </table:table-cell>
          <table:table-cell office:value-type="string" calcext:value-type="string">
            <text:p>https://r.res.easebar.com/pic/20241120/db4cbe9c-98b6-47b2-849b-655e63c86f87.png</text:p>
          </table:table-cell>
          <table:table-cell office:value-type="string" calcext:value-type="string">
            <text:p>Launch an enemy upward, dealing extra damage to the enemy with a Spider-Tracer</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Thwip and Flip</text:p>
          </table:table-cell>
          <table:table-cell office:value-type="string" calcext:value-type="string">
            <text:p>https://r.res.easebar.com/pic/20241124/82debb10-0166-41c3-914e-9dee98cd30af.png</text:p>
          </table:table-cell>
          <table:table-cell office:value-type="string" calcext:value-type="string">
            <text:p>Perform a double jump</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Spider-Sense</text:p>
          </table:table-cell>
          <table:table-cell office:value-type="string" calcext:value-type="string">
            <text:p>https://r.res.easebar.com/pic/20241120/70f075d3-fdcc-4339-b537-061af16fae55.png</text:p>
          </table:table-cell>
          <table:table-cell office:value-type="string" calcext:value-type="string">
            <text:p>Give a warning of enemies that have been around</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Wall Crawl</text:p>
          </table:table-cell>
          <table:table-cell office:value-type="string" calcext:value-type="string">
            <text:p>https://r.res.easebar.com/pic/20241120/e0ab4409-cfaa-4e13-9731-240a09a6a553.png</text:p>
          </table:table-cell>
          <table:table-cell office:value-type="string" calcext:value-type="string">
            <text:p>Press Space to wall crawl, and while crawling, left-click to sprint</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Inferno Blast</text:p>
          </table:table-cell>
          <table:table-cell office:value-type="string" calcext:value-type="string">
            <text:p>https://r.res.easebar.com/pic/20250712/76419110-b69d-460d-a1d3-4ccbceb7f6de.png</text:p>
          </table:table-cell>
          <table:table-cell office:value-type="string" calcext:value-type="string">
            <text:p>Human Torch stores Pyrokinetic Energy in Spider-Man's suit, enabling him to unleash an Inferno Blast that sprays a fiery web while performing a backflip to create distance. The flames damage enemies and apply a Burn-Tracer. Detonating these Burn-Tracers inflicts Damage Over Time</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SPIDER-MAN</text:p>
          </table:table-cell>
          <table:table-cell office:value-type="string" calcext:value-type="string">
            <text:p>Sticky Spider-Bomb</text:p>
          </table:table-cell>
          <table:table-cell office:value-type="string" calcext:value-type="string">
            <text:p>https://r.res.easebar.com/pic/20260117/65af9b66-0441-49bc-aa49-9756d53c483d.png</text:p>
          </table:table-cell>
          <table:table-cell office:value-type="string" calcext:value-type="string">
            <text:p>Cyber-Spiders Peni Parker whips up a Sticky Bomb for Spider-Man! Prime it, then toss it before the timer's up for a blast that damages nearby enemies and attaches a Spider-Tracer to them. If not thrown in time, it explodes on Spider-Man, recharging a Web-Cluster shot and granting Bonus Health</text:p>
          </table:table-cell>
          <table:table-cell office:value-type="string" calcext:value-type="string">
            <text:p>https://www.marvelrivals.com/20241123/41360_1195680.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Vibranium Claws</text:p>
          </table:table-cell>
          <table:table-cell office:value-type="string" calcext:value-type="string">
            <text:p>https://r.res.easebar.com/pic/20241120/095862fd-2dce-4947-8996-58741ba3e326.png</text:p>
          </table:table-cell>
          <table:table-cell office:value-type="string" calcext:value-type="string">
            <text:p>Slice Vibranium Claws forward</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Bast's Descent</text:p>
          </table:table-cell>
          <table:table-cell office:value-type="string" calcext:value-type="string">
            <text:p>https://r.res.easebar.com/pic/20241120/796baaa9-278e-464f-a394-bc5869dbc473.png</text:p>
          </table:table-cell>
          <table:table-cell office:value-type="string" calcext:value-type="string">
            <text:p>Summon Bast, pouncing forward, dealing damage, and attaching a Vibranium Mark to enemies hit while refreshing Spirit Rend</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Spirit Rend</text:p>
          </table:table-cell>
          <table:table-cell office:value-type="string" calcext:value-type="string">
            <text:p>https://r.res.easebar.com/pic/20241120/5420a5ab-0ba8-4c9c-8953-7f60adf79cd2.png</text:p>
          </table:table-cell>
          <table:table-cell office:value-type="string" calcext:value-type="string">
            <text:p>Lunge forward and deal damage to enemies. Vibranium Mark produces Bonus Health and refreshes the ability</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Spinning Kick</text:p>
          </table:table-cell>
          <table:table-cell office:value-type="string" calcext:value-type="string">
            <text:p>https://r.res.easebar.com/pic/20241120/a56f606b-d519-49aa-9570-cc615be6f239.png</text:p>
          </table:table-cell>
          <table:table-cell office:value-type="string" calcext:value-type="string">
            <text:p>Spiral forward and attach a Vibranium Mark to enemies hit</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Subtle Step</text:p>
          </table:table-cell>
          <table:table-cell office:value-type="string" calcext:value-type="string">
            <text:p>https://r.res.easebar.com/pic/20241120/715f8f12-5bf3-4f11-a583-ee4ad606136d.png</text:p>
          </table:table-cell>
          <table:table-cell office:value-type="string" calcext:value-type="string">
            <text:p>Hold Space to run on a wall; perform a jump after detaching from the wall</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Spear Toss</text:p>
          </table:table-cell>
          <table:table-cell office:value-type="string" calcext:value-type="string">
            <text:p>https://r.res.easebar.com/pic/20241120/4ccd846a-f72e-4d69-aa9f-6c459f67648c.png</text:p>
          </table:table-cell>
          <table:table-cell office:value-type="string" calcext:value-type="string">
            <text:p>Toss a Vibranium energy spear forward, creating a Vibranium Force Field and attaching a Vibranium Mark to enemies in its radius</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Panther's Cunning</text:p>
          </table:table-cell>
          <table:table-cell office:value-type="string" calcext:value-type="string">
            <text:p>https://r.res.easebar.com/pic/20241120/07bd1118-a93b-49f7-8789-696e0480ee44.png</text:p>
          </table:table-cell>
          <table:table-cell office:value-type="string" calcext:value-type="string">
            <text:p>Deal higher damage when at low Health</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BLACK PANTHER</text:p>
          </table:table-cell>
          <table:table-cell office:value-type="string" calcext:value-type="string">
            <text:p>GAMMA VIBRANIUM ARMOR</text:p>
          </table:table-cell>
          <table:table-cell office:value-type="string" calcext:value-type="string">
            <text:p>https://r.res.easebar.com/pic/20250912/d1ab2347-3f3a-48e8-a936-506f89e78a75.png</text:p>
          </table:table-cell>
          <table:table-cell office:value-type="string" calcext:value-type="string">
            <text:p>Hulk charges Namor and Black Panther with gamma radiation. Namor can summon an extra Gamma Monstro which will continuously fire gamma rays at locked-on enemies. The longer the rays hit, the higher the damage. Black Panther's Vibranium armor is enhanced; when his health is low he receives a gamma shield, blocking incoming attacks and becoming Unstoppable</text:p>
          </table:table-cell>
          <table:table-cell office:value-type="string" calcext:value-type="string">
            <text:p>https://www.marvelrivals.com/20241123/41360_1195677.html</text:p>
          </table:table-cell>
          <table:table-cell table:number-columns-repeated="16379"/>
        </table:table-row>
        <table:table-row table:style-name="ro1">
          <table:table-cell office:value-type="string" calcext:value-type="string">
            <text:p>HELA</text:p>
          </table:table-cell>
          <table:table-cell office:value-type="string" calcext:value-type="string">
            <text:p>Nightsword Thorn</text:p>
          </table:table-cell>
          <table:table-cell office:value-type="string" calcext:value-type="string">
            <text:p>https://r.res.easebar.com/pic/20241120/ea4b3942-f0b3-43b4-a2fc-d5b43b6a8b35.png</text:p>
          </table:table-cell>
          <table:table-cell office:value-type="string" calcext:value-type="string">
            <text:p>Throw Nightsword thorns</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Goddess of Death</text:p>
          </table:table-cell>
          <table:table-cell office:value-type="string" calcext:value-type="string">
            <text:p>https://r.res.easebar.com/pic/20241120/cc37d07b-7128-47a0-8706-240fda571a47.png</text:p>
          </table:table-cell>
          <table:table-cell office:value-type="string" calcext:value-type="string">
            <text:p>Soar into the sky and unleash Nastrond Crows from each hand at will</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Astral Flock</text:p>
          </table:table-cell>
          <table:table-cell office:value-type="string" calcext:value-type="string">
            <text:p>https://r.res.easebar.com/pic/20241120/e9a46cd0-2dcc-4835-9f4b-f18302c03eac.png</text:p>
          </table:table-cell>
          <table:table-cell office:value-type="string" calcext:value-type="string">
            <text:p>Transform into a Nastrond Crow to glide forth, press again to undo the transformation. Gain Bonus Health when the transformation ends</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Soul Drainer</text:p>
          </table:table-cell>
          <table:table-cell office:value-type="string" calcext:value-type="string">
            <text:p>https://r.res.easebar.com/pic/20241120/558313fc-c58a-4507-a812-18e9acf92b97.png</text:p>
          </table:table-cell>
          <table:table-cell office:value-type="string" calcext:value-type="string">
            <text:p>Project an explosive Hel sphere to Stun nearby enemies.</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Piercing Night</text:p>
          </table:table-cell>
          <table:table-cell office:value-type="string" calcext:value-type="string">
            <text:p>https://r.res.easebar.com/pic/20241120/b40f4698-b5ca-4cd1-a8fd-4ff916f1a5da.png</text:p>
          </table:table-cell>
          <table:table-cell office:value-type="string" calcext:value-type="string">
            <text:p>Fire multiple Nightsword thorns that detonate after a delay</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Nastrond Crowstorm</text:p>
          </table:table-cell>
          <table:table-cell office:value-type="string" calcext:value-type="string">
            <text:p>https://r.res.easebar.com/pic/20241120/f7bbe4b0-932e-421b-a60e-d5fb5560c6f7.png</text:p>
          </table:table-cell>
          <table:table-cell office:value-type="string" calcext:value-type="string">
            <text:p>Defeating an enemy will generate a Nastrond Crow, exploding after a duration</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Hel's Descent</text:p>
          </table:table-cell>
          <table:table-cell office:value-type="string" calcext:value-type="string">
            <text:p>https://r.res.easebar.com/pic/20241120/29f6f04d-087b-4e97-8aeb-3b505b3c2952.png</text:p>
          </table:table-cell>
          <table:table-cell office:value-type="string" calcext:value-type="string">
            <text:p>Hold Space to fall slowly</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Hel Tendrils</text:p>
          </table:table-cell>
          <table:table-cell office:value-type="string" calcext:value-type="string">
            <text:p>https://r.res.easebar.com/pic/20250712/bf161d8e-a652-4abe-aca7-add44ac5429e.png</text:p>
          </table:table-cell>
          <table:table-cell office:value-type="string" calcext:value-type="string">
            <text:p>Venom shares his symbiotes with Jeff and Hela.  Hela's Hel Tendrils unleash a symbiotic Hel Sphere. Upon hit, it pulls nearby enemies toward the impact point and links them, slowing enemies that try to escape.</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HELA</text:p>
          </table:table-cell>
          <table:table-cell office:value-type="string" calcext:value-type="string">
            <text:p>DEATH KNELL</text:p>
          </table:table-cell>
          <table:table-cell office:value-type="string" calcext:value-type="string">
            <text:p>https://r.res.easebar.com/pic/20251011/00e05df0-3681-4908-a9f8-c14cc35bbc57.png</text:p>
          </table:table-cell>
          <table:table-cell office:value-type="string" calcext:value-type="string">
            <text:p>Hela channels energy of the undead to empower Namor. When Namor strikes with his trident, a spectral water column erupts at the target area, slowing enemies hit. Whenever Hela or Namor assist in a KO, an invulnerable Undead Monstro spawns at the fallen enemy's position, automatically attacking the nearest foe for a short time before vanishing</text:p>
          </table:table-cell>
          <table:table-cell office:value-type="string" calcext:value-type="string">
            <text:p>https://www.marvelrivals.com/20241123/41360_1195676.html</text:p>
          </table:table-cell>
          <table:table-cell table:number-columns-repeated="16379"/>
        </table:table-row>
        <table:table-row table:style-name="ro1">
          <table:table-cell office:value-type="string" calcext:value-type="string">
            <text:p>STORM</text:p>
          </table:table-cell>
          <table:table-cell office:value-type="string" calcext:value-type="string">
            <text:p>Wind Blade</text:p>
          </table:table-cell>
          <table:table-cell office:value-type="string" calcext:value-type="string">
            <text:p>https://r.res.easebar.com/pic/20241120/ac2de8df-0a48-4c10-b0be-090c2662d5e6.png</text:p>
          </table:table-cell>
          <table:table-cell office:value-type="string" calcext:value-type="string">
            <text:p>Launch forward-piercing Wind Blades</text:p>
          </table:table-cell>
          <table:table-cell office:value-type="string" calcext:value-type="string">
            <text:p>https://www.marvelrivals.com/20241123/41360_1195675.html</text:p>
          </table:table-cell>
          <table:table-cell table:number-columns-repeated="16379"/>
        </table:table-row>
        <table:table-row table:style-name="ro1">
          <table:table-cell office:value-type="string" calcext:value-type="string">
            <text:p>STORM</text:p>
          </table:table-cell>
          <table:table-cell office:value-type="string" calcext:value-type="string">
            <text:p>Omega Hurricane</text:p>
          </table:table-cell>
          <table:table-cell office:value-type="string" calcext:value-type="string">
            <text:p>https://r.res.easebar.com/pic/20241120/618d0d4a-f522-4ea9-9f11-64de62abe3ad.png</text:p>
          </table:table-cell>
          <table:table-cell office:value-type="string" calcext:value-type="string">
            <text:p>Transform into a hurricane to draw in nearby enemies and deal damage</text:p>
          </table:table-cell>
          <table:table-cell office:value-type="string" calcext:value-type="string">
            <text:p>https://www.marvelrivals.com/20241123/41360_1195675.html</text:p>
          </table:table-cell>
          <table:table-cell table:number-columns-repeated="16379"/>
        </table:table-row>
        <table:table-row table:style-name="ro1">
          <table:table-cell office:value-type="string" calcext:value-type="string">
            <text:p>STORM</text:p>
          </table:table-cell>
          <table:table-cell office:value-type="string" calcext:value-type="string">
            <text:p>Weather Control</text:p>
          </table:table-cell>
          <table:table-cell office:value-type="string" calcext:value-type="string">
            <text:p>https://r.res.easebar.com/pic/20241120/10b670aa-f6c6-4775-811a-5d9c4e3ae6cf.png</text:p>
          </table:table-cell>
          <table:table-cell office:value-type="string" calcext:value-type="string">
            <text:p>Switch the weather to empower allies: Tornado grants a Movement Boost; Thunder grants a Damage Boost</text:p>
          </table:table-cell>
          <table:table-cell office:value-type="string" calcext:value-type="string">
            <text:p>https://www.marvelrivals.com/20241123/41360_1195675.html</text:p>
          </table:table-cell>
          <table:table-cell table:number-columns-repeated="16379"/>
        </table:table-row>
        <table:table-row table:style-name="ro1">
          <table:table-cell office:value-type="string" calcext:value-type="string">
            <text:p>STORM</text:p>
          </table:table-cell>
          <table:table-cell office:value-type="string" calcext:value-type="string">
            <text:p>Goddess Boost</text:p>
          </table:table-cell>
          <table:table-cell office:value-type="string" calcext:value-type="string">
            <text:p>https://r.res.easebar.com/pic/20241120/af7bafa6-fe10-45d2-8a65-f1523f9c5223.png</text:p>
          </table:table-cell>
          <table:table-cell office:value-type="string" calcext:value-type="string">
            <text:p>Channel the power of the weather to empower Storm: Tornado grants a Movement Boost and inflicts Slow on enemies; Thunder grants a Damage Boost and summons lightning to inflict damage</text:p>
          </table:table-cell>
          <table:table-cell office:value-type="string" calcext:value-type="string">
            <text:p>https://www.marvelrivals.com/20241123/41360_1195675.html</text:p>
          </table:table-cell>
          <table:table-cell table:number-columns-repeated="16379"/>
        </table:table-row>
        <table:table-row table:style-name="ro1">
          <table:table-cell office:value-type="string" calcext:value-type="string">
            <text:p>STORM</text:p>
          </table:table-cell>
          <table:table-cell office:value-type="string" calcext:value-type="string">
            <text:p>Bolt Rush</text:p>
          </table:table-cell>
          <table:table-cell office:value-type="string" calcext:value-type="string">
            <text:p>https://r.res.easebar.com/pic/20241120/644cd425-b90f-41dd-b750-8d11c36e04d1.png</text:p>
          </table:table-cell>
          <table:table-cell office:value-type="string" calcext:value-type="string">
            <text:p>Unleash a lightning bolt forward</text:p>
          </table:table-cell>
          <table:table-cell office:value-type="string" calcext:value-type="string">
            <text:p>https://www.marvelrivals.com/20241123/41360_1195675.html</text:p>
          </table:table-cell>
          <table:table-cell table:number-columns-repeated="16379"/>
        </table:table-row>
        <table:table-row table:style-name="ro1">
          <table:table-cell office:value-type="string" calcext:value-type="string">
            <text:p>STORM</text:p>
          </table:table-cell>
          <table:table-cell office:value-type="string" calcext:value-type="string">
            <text:p>ETERNAL WEATHER WITCH</text:p>
          </table:table-cell>
          <table:table-cell office:value-type="string" calcext:value-type="string">
            <text:p>https://r.res.easebar.com/pic/20260320/65f6fbec-1e61-459b-b559-80d192045108.png</text:p>
          </table:table-cell>
          <table:table-cell office:value-type="string" calcext:value-type="string">
            <text:p>Storm channels her elemental power into Adam Warlock. When Adam uses Soaring Surge, his movement speed is increased. While flying, Adam leaves behind a storm-charged trail that heals and speeds up allies within it</text:p>
          </table:table-cell>
          <table:table-cell office:value-type="string" calcext:value-type="string">
            <text:p>https://www.marvelrivals.com/20241123/41360_1195675.html</text:p>
          </table:table-cell>
          <table:table-cell table:number-columns-repeated="16379"/>
        </table:table-row>
        <table:table-row table:style-name="ro1">
          <table:table-cell office:value-type="string" calcext:value-type="string">
            <text:p>HULK</text:p>
          </table:table-cell>
          <table:table-cell office:value-type="string" calcext:value-type="string">
            <text:p>Gamma Ray Gun</text:p>
          </table:table-cell>
          <table:table-cell office:value-type="string" calcext:value-type="string">
            <text:p>https://r.res.easebar.com/pic/20241120/8cb6a38e-5f26-483e-8b6c-92ff443084d1.png</text:p>
          </table:table-cell>
          <table:table-cell office:value-type="string" calcext:value-type="string">
            <text:p>Fire with a Gamma Ray Gun</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Puny Banner</text:p>
          </table:table-cell>
          <table:table-cell office:value-type="string" calcext:value-type="string">
            <text:p>https://r.res.easebar.com/pic/20241120/9a3b272b-318b-45e2-a863-274aa7bcf288.png</text:p>
          </table:table-cell>
          <table:table-cell office:value-type="string" calcext:value-type="string">
            <text:p>Transform from Bruce Banner into Hero Hulk</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Gamma Grenade</text:p>
          </table:table-cell>
          <table:table-cell office:value-type="string" calcext:value-type="string">
            <text:p>https://r.res.easebar.com/pic/20241120/3187b7a0-06b5-4e1c-babe-796554bc2430.png</text:p>
          </table:table-cell>
          <table:table-cell office:value-type="string" calcext:value-type="string">
            <text:p>Launch a Gamma Grenade to inflict damage and Launch Up enemies</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Gamma Boost</text:p>
          </table:table-cell>
          <table:table-cell office:value-type="string" calcext:value-type="string">
            <text:p>https://r.res.easebar.com/pic/20241120/101d8739-0c74-4e34-bbbc-207cfef95ce0.png</text:p>
          </table:table-cell>
          <table:table-cell office:value-type="string" calcext:value-type="string">
            <text:p>Hulk charges Iron Man and Namor with gamma radiation. When Iron Man uses Armor Overdrive, he will initiate a gamma upgrade. When Namor receives the radiation, he will summon an extra Gamma Monstro which will continuously fire gamma rays at locked-on enemies. The longer the rays hit, the higher the damage</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Heavy Blow</text:p>
          </table:table-cell>
          <table:table-cell office:value-type="string" calcext:value-type="string">
            <text:p>https://r.res.easebar.com/pic/20241120/cc774c86-d162-462f-95d0-1b11d36eed83.png</text:p>
          </table:table-cell>
          <table:table-cell office:value-type="string" calcext:value-type="string">
            <text:p>Swing fists forward to punch enemies</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HULK SMASH!</text:p>
          </table:table-cell>
          <table:table-cell office:value-type="string" calcext:value-type="string">
            <text:p>https://r.res.easebar.com/pic/20241120/a3a3990b-5005-4616-abc2-96e48a971420.png</text:p>
          </table:table-cell>
          <table:table-cell office:value-type="string" calcext:value-type="string">
            <text:p>Unleash stored gamma energy, transforming from Hero Hulk into Monster Hulk for a limited time period</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Indestructible Guard</text:p>
          </table:table-cell>
          <table:table-cell office:value-type="string" calcext:value-type="string">
            <text:p>https://r.res.easebar.com/pic/20241120/4879fdb5-3227-4af4-9264-dd04c12941b4.png</text:p>
          </table:table-cell>
          <table:table-cell office:value-type="string" calcext:value-type="string">
            <text:p>Generate gamma shields for Hero Hulk and nearby allies, absorbing and converting damage into energy for HULK SMASH</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Radioactive Lockdown</text:p>
          </table:table-cell>
          <table:table-cell office:value-type="string" calcext:value-type="string">
            <text:p>https://r.res.easebar.com/pic/20241120/172254e3-9768-4dec-9157-76b456d5383d.png</text:p>
          </table:table-cell>
          <table:table-cell office:value-type="string" calcext:value-type="string">
            <text:p>Emit gamma energy to irradiate enemies and render them immobilize and immune to all ability effects. Using Heavy Blow or Gamma Burst will prematurely remove this status</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Incredible Leap</text:p>
          </table:table-cell>
          <table:table-cell office:value-type="string" calcext:value-type="string">
            <text:p>https://r.res.easebar.com/pic/20241120/b74339de-5816-4639-ba7f-d32d39f620cd.png</text:p>
          </table:table-cell>
          <table:table-cell office:value-type="string" calcext:value-type="string">
            <text:p>HOLD Space to perform a charged leap that allows Hero Hulk to Knock a flying enemy to the ground</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Gamma Burst</text:p>
          </table:table-cell>
          <table:table-cell office:value-type="string" calcext:value-type="string">
            <text:p>https://r.res.easebar.com/pic/20241120/c55bb9d3-8b8b-44ad-ac43-4fb9bcf02130.png</text:p>
          </table:table-cell>
          <table:table-cell office:value-type="string" calcext:value-type="string">
            <text:p>Emit gamma-ray bursts to inflict damage. Reduce Indestructible Guard cooldown upon hit</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Gamma Fastball</text:p>
          </table:table-cell>
          <table:table-cell office:value-type="string" calcext:value-type="string">
            <text:p>https://r.res.easebar.com/pic/20241205/cb438e5d-7e3c-47ff-af80-0b776f860874.png</text:p>
          </table:table-cell>
          <table:table-cell office:value-type="string" calcext:value-type="string">
            <text:p>Wolverine, Hulk can interact with each other. Once both parties confirm, Hulk can lift Wolverine and press the key to hurl him forward</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Heavy Blow</text:p>
          </table:table-cell>
          <table:table-cell office:value-type="string" calcext:value-type="string">
            <text:p>https://r.res.easebar.com/pic/20241120/cc774c86-d162-462f-95d0-1b11d36eed83.png</text:p>
          </table:table-cell>
          <table:table-cell office:value-type="string" calcext:value-type="string">
            <text:p>Swing fists forward to punch and launch up enemies</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World Breaker</text:p>
          </table:table-cell>
          <table:table-cell office:value-type="string" calcext:value-type="string">
            <text:p>https://r.res.easebar.com/pic/20241120/e2c65ff1-2180-4f19-b7b0-1cf08ad1b1c4.png</text:p>
          </table:table-cell>
          <table:table-cell office:value-type="string" calcext:value-type="string">
            <text:p>Grab and smash the enemy in front</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Radioactive Lockdown</text:p>
          </table:table-cell>
          <table:table-cell office:value-type="string" calcext:value-type="string">
            <text:p>https://r.res.easebar.com/pic/20241120/5965d229-691b-42be-859e-bc83191b3d1d.png</text:p>
          </table:table-cell>
          <table:table-cell office:value-type="string" calcext:value-type="string">
            <text:p>Emit gamma energy to irradiate enemies and render them immobilize and immune to all ability effects. Using Heavy Blow or Gamma Burst will prematurely remove this status</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Incredible Leap</text:p>
          </table:table-cell>
          <table:table-cell office:value-type="string" calcext:value-type="string">
            <text:p>https://r.res.easebar.com/pic/20241120/b74339de-5816-4639-ba7f-d32d39f620cd.png</text:p>
          </table:table-cell>
          <table:table-cell office:value-type="string" calcext:value-type="string">
            <text:p>HOLD Space to perform a charged leap that allows Monster Hulk to Knock a flying enemy to the ground</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HULK</text:p>
          </table:table-cell>
          <table:table-cell office:value-type="string" calcext:value-type="string">
            <text:p>Gamma Burst</text:p>
          </table:table-cell>
          <table:table-cell office:value-type="string" calcext:value-type="string">
            <text:p>https://r.res.easebar.com/pic/20241120/0ac60cf3-6b01-485b-b205-900f7ac674a4.png</text:p>
          </table:table-cell>
          <table:table-cell office:value-type="string" calcext:value-type="string">
            <text:p>Emit gamma-ray bursts to inflict damage</text:p>
          </table:table-cell>
          <table:table-cell office:value-type="string" calcext:value-type="string">
            <text:p>https://www.marvelrivals.com/20241123/41360_1195678.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Joyful Splash</text:p>
          </table:table-cell>
          <table:table-cell office:value-type="string" calcext:value-type="string">
            <text:p>https://r.res.easebar.com/pic/20241120/404c171f-9a95-4341-8313-b2f6d16fd6f1.png</text:p>
          </table:table-cell>
          <table:table-cell office:value-type="string" calcext:value-type="string">
            <text:p>Unleash a healing splash</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Aqua Burst</text:p>
          </table:table-cell>
          <table:table-cell office:value-type="string" calcext:value-type="string">
            <text:p>https://r.res.easebar.com/pic/20241120/247fc32e-57f7-4bc3-a52a-ed9e9a46e49e.png</text:p>
          </table:table-cell>
          <table:table-cell office:value-type="string" calcext:value-type="string">
            <text:p>Launch a high-speed water sphere that bursts upon impact, dealing damage to enemies within range</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It's Jeff!</text:p>
          </table:table-cell>
          <table:table-cell office:value-type="string" calcext:value-type="string">
            <text:p>https://r.res.easebar.com/pic/20241120/25d707ba-9f22-4b05-bb8e-d2eb22a8f1f5.png</text:p>
          </table:table-cell>
          <table:table-cell office:value-type="string" calcext:value-type="string">
            <text:p>Deep dive into the scene and resurface to swallow both enemies and allies within range, activating Hide and Seek for a brief duration before ejecting the swallowed heroes forward</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Hide and Seek</text:p>
          </table:table-cell>
          <table:table-cell office:value-type="string" calcext:value-type="string">
            <text:p>https://r.res.easebar.com/pic/20241120/ef573d4e-d703-4015-982f-e171765bc65f.png</text:p>
          </table:table-cell>
          <table:table-cell office:value-type="string" calcext:value-type="string">
            <text:p>Dive into the scene with only his dorsal fin exposed, granting himself a Movement Boost. Jeff can heal while submerged and gains the wall-crawl ability</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Healing Bubble</text:p>
          </table:table-cell>
          <table:table-cell office:value-type="string" calcext:value-type="string">
            <text:p>https://r.res.easebar.com/pic/20241120/4d341032-2db5-4cb1-84eb-2ecaa167bd2f.png</text:p>
          </table:table-cell>
          <table:table-cell office:value-type="string" calcext:value-type="string">
            <text:p>Spit a bubble that heals the ally who collects it, granting them Healing Boost and Movement Boost while also launching up nearby enemies</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Oblivious Cuteness</text:p>
          </table:table-cell>
          <table:table-cell office:value-type="string" calcext:value-type="string">
            <text:p>https://r.res.easebar.com/pic/20241120/d976ea1f-f15a-4b12-8a47-edbb88304548.png</text:p>
          </table:table-cell>
          <table:table-cell office:value-type="string" calcext:value-type="string">
            <text:p>Reduce damage taken from critical hits</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IT'S JEFF-NADO!</text:p>
          </table:table-cell>
          <table:table-cell office:value-type="string" calcext:value-type="string">
            <text:p>https://r.res.easebar.com/pic/20250531/50deaa25-2f90-439c-a1fb-15c9597ff6ab.png</text:p>
          </table:table-cell>
          <table:table-cell office:value-type="string" calcext:value-type="string">
            <text:p>When Storm activates Omega Hurricane and Jeff the Land Shark's It's Jeff is ready, they can unleash a powerful Team-Up Ability. During this period, Storm's Omega Hurricane merges with Jeff to form a Jeff-nado</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GUARDIAN OF THE DEEP</text:p>
          </table:table-cell>
          <table:table-cell office:value-type="string" calcext:value-type="string">
            <text:p>https://r.res.easebar.com/pic/20250531/e2e11f8b-69d4-4412-adec-b3ad76c55446.png</text:p>
          </table:table-cell>
          <table:table-cell office:value-type="string" calcext:value-type="string">
            <text:p>Venom shares his symbiotes with Jeff and Hela. Jeff's Guardian of the Deep links with nearby allies, providing continuous healing. When the effect ends, it releases a powerful healing burst, converting any excess into Bonus Health.</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New Friends</text:p>
          </table:table-cell>
          <table:table-cell office:value-type="string" calcext:value-type="string">
            <text:p>https://r.res.easebar.com/pic/20241123/87222dcb-ebbb-4edc-a8f0-f7123ee5f61b.png</text:p>
          </table:table-cell>
          <table:table-cell office:value-type="string" calcext:value-type="string">
            <text:p>Jeff the Land Shark and Rocket Raccoon can ride on Groot's shoulders, receiving Damage Reduction</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JEFF THE LAND SHARK</text:p>
          </table:table-cell>
          <table:table-cell office:value-type="string" calcext:value-type="string">
            <text:p>Jeff's Cuddle Buddy</text:p>
          </table:table-cell>
          <table:table-cell office:value-type="string" calcext:value-type="string">
            <text:p>https://r.res.easebar.com/pic/20260117/8d44e8d8-40a4-4d9f-9647-8450a01bb368.png</text:p>
          </table:table-cell>
          <table:table-cell office:value-type="string" calcext:value-type="string">
            <text:p>Jeff the Land Shark and Rocket Raccoon can ride on Groot's shoulders, receiving Damage Reduction</text:p>
          </table:table-cell>
          <table:table-cell office:value-type="string" calcext:value-type="string">
            <text:p>https://www.marvelrivals.com/20241123/41360_1195674.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Adjudication</text:p>
          </table:table-cell>
          <table:table-cell office:value-type="string" calcext:value-type="string">
            <text:p>https://r.res.easebar.com/pic/20241120/e755fe97-976b-43f7-90d8-e791ca310df1.png</text:p>
          </table:table-cell>
          <table:table-cell office:value-type="string" calcext:value-type="string">
            <text:p>Fire at enemies with Adjudication, his Automatic Rifle</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Deliverance</text:p>
          </table:table-cell>
          <table:table-cell office:value-type="string" calcext:value-type="string">
            <text:p>https://r.res.easebar.com/pic/20241120/b420c662-6d55-438d-932a-d2947005b6de.png</text:p>
          </table:table-cell>
          <table:table-cell office:value-type="string" calcext:value-type="string">
            <text:p>Fire at enemies with Deliverance, his Shotgun</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Final Judgement</text:p>
          </table:table-cell>
          <table:table-cell office:value-type="string" calcext:value-type="string">
            <text:p>https://r.res.easebar.com/pic/20241120/6695cf9f-352c-4bf3-aab1-1824ecf39c95.png</text:p>
          </table:table-cell>
          <table:table-cell office:value-type="string" calcext:value-type="string">
            <text:p>Unleash two Gatling guns and missiles to attack enemies</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Vantage Connection</text:p>
          </table:table-cell>
          <table:table-cell office:value-type="string" calcext:value-type="string">
            <text:p>https://r.res.easebar.com/pic/20241120/e39565ca-3dfd-4794-bb51-23ec19256130.png</text:p>
          </table:table-cell>
          <table:table-cell office:value-type="string" calcext:value-type="string">
            <text:p>Launch a hook to generate a cable that enables the Punisher to move rapidly by pressing F</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Culling Turret</text:p>
          </table:table-cell>
          <table:table-cell office:value-type="string" calcext:value-type="string">
            <text:p>https://r.res.easebar.com/pic/20241120/3806a440-7ae1-4a86-8b75-09c34be080fd.png</text:p>
          </table:table-cell>
          <table:table-cell office:value-type="string" calcext:value-type="string">
            <text:p>Deploy a Culling Turret that grounds Punisher and blocks damage from the front while dealing massive damage</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Scourge Grenade</text:p>
          </table:table-cell>
          <table:table-cell office:value-type="string" calcext:value-type="string">
            <text:p>https://r.res.easebar.com/pic/20241120/d9b61f83-54c3-42e7-9ac1-aadb46562237.png</text:p>
          </table:table-cell>
          <table:table-cell office:value-type="string" calcext:value-type="string">
            <text:p>Throw a smoke grenade forward to obscure enemy vision and leap backward</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Warrior's Gaze</text:p>
          </table:table-cell>
          <table:table-cell office:value-type="string" calcext:value-type="string">
            <text:p>https://r.res.easebar.com/pic/20241120/c121a9dc-8597-45f7-8495-4dea1b7c043b.png</text:p>
          </table:table-cell>
          <table:table-cell office:value-type="string" calcext:value-type="string">
            <text:p>Retain vision of enemies that disappear from view for a short duration</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CUTTING-EDGE TECH</text:p>
          </table:table-cell>
          <table:table-cell office:value-type="string" calcext:value-type="string">
            <text:p>https://r.res.easebar.com/pic/20250530/91bfb861-f201-4aa4-b40e-88860849e6a5.png</text:p>
          </table:table-cell>
          <table:table-cell office:value-type="string" calcext:value-type="string">
            <text:p>The Punisher upgrades Black Widow's arsenal, adding a Pulse Mode to her Red Room Rifle. While the ability is active, using Straight Shooter fires a pulse beam that deals piercing damage</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THE PUNISHER</text:p>
          </table:table-cell>
          <table:table-cell office:value-type="string" calcext:value-type="string">
            <text:p>JUSTICE SENSE</text:p>
          </table:table-cell>
          <table:table-cell office:value-type="string" calcext:value-type="string">
            <text:p>https://r.res.easebar.com/pic/20251011/6d08d915-d30d-4aad-9203-9055f7efab8c.png</text:p>
          </table:table-cell>
          <table:table-cell office:value-type="string" calcext:value-type="string">
            <text:p>Daredevil shares the location of his Sonic Pursuit target with The Punisher. At the same time, The Punisher can launch a devil-infused shock grenade to damage and blind enemies</text:p>
          </table:table-cell>
          <table:table-cell office:value-type="string" calcext:value-type="string">
            <text:p>https://www.marvelrivals.com/20241123/41360_1195673.html</text:p>
          </table:table-cell>
          <table:table-cell table:number-columns-repeated="16379"/>
        </table:table-row>
        <table:table-row table:style-name="ro1">
          <table:table-cell office:value-type="string" calcext:value-type="string">
            <text:p>LUNA SNOW</text:p>
          </table:table-cell>
          <table:table-cell office:value-type="string" calcext:value-type="string">
            <text:p>Light &amp; Dark Ice</text:p>
          </table:table-cell>
          <table:table-cell office:value-type="string" calcext:value-type="string">
            <text:p>https://r.res.easebar.com/pic/20241120/9b9358c8-4975-450c-8f88-5e18d637d0c4.png</text:p>
          </table:table-cell>
          <table:table-cell office:value-type="string" calcext:value-type="string">
            <text:p>Fire ice shots that damage enemies or heal allies</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Fate of Both Worlds</text:p>
          </table:table-cell>
          <table:table-cell office:value-type="string" calcext:value-type="string">
            <text:p>https://r.res.easebar.com/pic/20241120/47cd68fc-feb1-45d8-b204-69e09294dc80.png</text:p>
          </table:table-cell>
          <table:table-cell office:value-type="string" calcext:value-type="string">
            <text:p>Take center stage and start dancing! Press to toggle between two performances: Heal allies or grant them Damage Boost</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Ice Arts</text:p>
          </table:table-cell>
          <table:table-cell office:value-type="string" calcext:value-type="string">
            <text:p>https://r.res.easebar.com/pic/20241120/db8d7bd7-8433-4b9c-b79a-4893df673815.png</text:p>
          </table:table-cell>
          <table:table-cell office:value-type="string" calcext:value-type="string">
            <text:p>Fire ice shards for a short duration, damaging enemies or healing allies while restoring her own Health</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Share the Stage</text:p>
          </table:table-cell>
          <table:table-cell office:value-type="string" calcext:value-type="string">
            <text:p>https://r.res.easebar.com/pic/20241120/c5d05de8-094f-4003-81bc-449b5e9b65d0.png</text:p>
          </table:table-cell>
          <table:table-cell office:value-type="string" calcext:value-type="string">
            <text:p>Attach Idol Aura to an ally. Allies with Idol Aura also restore Health when Luna Snow is healing others</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Absolute Zero</text:p>
          </table:table-cell>
          <table:table-cell office:value-type="string" calcext:value-type="string">
            <text:p>https://r.res.easebar.com/pic/20241120/3bbafdb7-d05d-4040-ac35-ba3ef0e021ba.png</text:p>
          </table:table-cell>
          <table:table-cell office:value-type="string" calcext:value-type="string">
            <text:p>Cast a clump of ice to Freeze the hit enemy and restore Health</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Cryo Heart</text:p>
          </table:table-cell>
          <table:table-cell office:value-type="string" calcext:value-type="string">
            <text:p>https://r.res.easebar.com/pic/20241120/1e2f39fb-fb72-4b78-923d-09ba6b076e4f.png</text:p>
          </table:table-cell>
          <table:table-cell office:value-type="string" calcext:value-type="string">
            <text:p>Automatically restore Health when casting Ice Arts or Absolute Zero</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Smooth Skate</text:p>
          </table:table-cell>
          <table:table-cell office:value-type="string" calcext:value-type="string">
            <text:p>https://r.res.easebar.com/pic/20241120/c672e9c6-8368-4a9b-88b5-d78fefe000ba.png</text:p>
          </table:table-cell>
          <table:table-cell office:value-type="string" calcext:value-type="string">
            <text:p>Keep moving forward to start ice skating and enable higher jumps</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Number One Idol</text:p>
          </table:table-cell>
          <table:table-cell office:value-type="string" calcext:value-type="string">
            <text:p>https://r.res.easebar.com/pic/20251222/b4210d02-0f6e-4b2b-9550-dd23e58547fa.png</text:p>
          </table:table-cell>
          <table:table-cell office:value-type="string" calcext:value-type="string">
            <text:p>Boost Damage and Healing. Gain extra healing when healing others</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ICED OUT DIAMOND</text:p>
          </table:table-cell>
          <table:table-cell office:value-type="string" calcext:value-type="string">
            <text:p>https://r.res.easebar.com/pic/20260107/0241d1da-8792-47ed-bff4-ba336a1d8f8c.png</text:p>
          </table:table-cell>
          <table:table-cell office:value-type="string" calcext:value-type="string">
            <text:p>Luna Snow grants Winter's Chill to Iron Fist and Emma Frost. When Iron Fist activates Harmony Recovery, he can heal nearby allies with Lunar Chi. Emma Frost can project ice energy forward, dealing damage and slowing enemies. She can also enhance her diamond form, condensing frost into an Absolute Zero Diamond barrier that blocks enemy attacks and movement</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LUNA SNOW</text:p>
          </table:table-cell>
          <table:table-cell office:value-type="string" calcext:value-type="string">
            <text:p>SPIRIT FOX ACCORD</text:p>
          </table:table-cell>
          <table:table-cell office:value-type="string" calcext:value-type="string">
            <text:p>https://r.res.easebar.com/pic/20260320/ebe9992a-a9bc-4840-9e3b-7b37ed9cdba3.png</text:p>
          </table:table-cell>
          <table:table-cell office:value-type="string" calcext:value-type="string">
            <text:p>White Fox grants Luna Snow a spirit fox for protection. Luna can activate it for a burst of speed and fire it forward, healing allies in its path while applying Charm to enemies</text:p>
          </table:table-cell>
          <table:table-cell office:value-type="string" calcext:value-type="string">
            <text:p>https://www.marvelrivals.com/20241123/41360_1195671.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Quantum Magic</text:p>
          </table:table-cell>
          <table:table-cell office:value-type="string" calcext:value-type="string">
            <text:p>https://r.res.easebar.com/pic/20241120/996e6c76-b2b8-42c6-9e17-c74f25768123.png</text:p>
          </table:table-cell>
          <table:table-cell office:value-type="string" calcext:value-type="string">
            <text:p>Launch quantum energy to deal damage</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Karmic Revival</text:p>
          </table:table-cell>
          <table:table-cell office:value-type="string" calcext:value-type="string">
            <text:p>https://r.res.easebar.com/pic/20260311/6c4e7eed-03e0-472a-a3a5-8f81cbd9cf4a.png</text:p>
          </table:table-cell>
          <table:table-cell office:value-type="string" calcext:value-type="string">
            <text:p>Take to the skies, entering a flying state and swiftly surge forward</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Karmic Revival</text:p>
          </table:table-cell>
          <table:table-cell office:value-type="string" calcext:value-type="string">
            <text:p>https://r.res.easebar.com/pic/20241120/bedb33ea-a7d7-482f-a3ba-695afc84d7df.png</text:p>
          </table:table-cell>
          <table:table-cell office:value-type="string" calcext:value-type="string">
            <text:p>Awaken the karma of allies to revive them. Allies revived have lower health but enjoy a brief period of Invincibility</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Soul Bond</text:p>
          </table:table-cell>
          <table:table-cell office:value-type="string" calcext:value-type="string">
            <text:p>https://r.res.easebar.com/pic/20241120/6d9c5f2f-ad6d-4f5e-9a1d-bf039b2d6fdc.png</text:p>
          </table:table-cell>
          <table:table-cell office:value-type="string" calcext:value-type="string">
            <text:p>Forge a soul bond with allies, granting Healing Over Time and distributing damage taken across the bond</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Avatar Life Stream</text:p>
          </table:table-cell>
          <table:table-cell office:value-type="string" calcext:value-type="string">
            <text:p>https://r.res.easebar.com/pic/20241120/00ceedf0-0fab-45f5-bcb6-009797271b65.png</text:p>
          </table:table-cell>
          <table:table-cell office:value-type="string" calcext:value-type="string">
            <text:p>Target an ally for a bouncing stream of healing energy, which also heals himself upon casting; self-targets if no ally is selected</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Cosmic Cluster</text:p>
          </table:table-cell>
          <table:table-cell office:value-type="string" calcext:value-type="string">
            <text:p>https://r.res.easebar.com/pic/20241120/cac2ca73-29e2-4ea4-87f9-1f1c0c24f382.png</text:p>
          </table:table-cell>
          <table:table-cell office:value-type="string" calcext:value-type="string">
            <text:p>Gather quantum energy into a cluster and then swiftly launch it at the enemy</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Regenerative Cocoon</text:p>
          </table:table-cell>
          <table:table-cell office:value-type="string" calcext:value-type="string">
            <text:p>https://r.res.easebar.com/pic/20241120/b85e229f-e718-4402-9c78-3ce82b3b5ee0.png</text:p>
          </table:table-cell>
          <table:table-cell office:value-type="string" calcext:value-type="string">
            <text:p>Once his body perishes, Adam Warlock can freely move as a soul and reforge his body at a chosen spot</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ADAM WARLOCK</text:p>
          </table:table-cell>
          <table:table-cell office:value-type="string" calcext:value-type="string">
            <text:p>HEAVENLY HARMONY</text:p>
          </table:table-cell>
          <table:table-cell office:value-type="string" calcext:value-type="string">
            <text:p>https://r.res.easebar.com/pic/20260323/aba481e1-c898-43e5-be33-be8393bae864.png</text:p>
          </table:table-cell>
          <table:table-cell office:value-type="string" calcext:value-type="string">
            <text:p>Storm channels her elemental power into Adam Warlock. When Adam uses Soaring Surge, his movement speed is increased. While flying, Adam leaves behind a storm-charged trail that heals and speeds up allies within it</text:p>
          </table:table-cell>
          <table:table-cell office:value-type="string" calcext:value-type="string">
            <text:p>https://www.marvelrivals.com/20241123/41360_1195670.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Bombard Mode</text:p>
          </table:table-cell>
          <table:table-cell office:value-type="string" calcext:value-type="string">
            <text:p>https://r.res.easebar.com/pic/20241120/6d5fc9e6-f194-494f-bcb9-a0eea60e7f60.png</text:p>
          </table:table-cell>
          <table:table-cell office:value-type="string" calcext:value-type="string">
            <text:p>Fire energy projectiles that deal damage</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Repair Mode</text:p>
          </table:table-cell>
          <table:table-cell office:value-type="string" calcext:value-type="string">
            <text:p>https://r.res.easebar.com/pic/20241120/8e83a73c-dbc6-4d8b-bf0e-2f6fbffe20a4.png</text:p>
          </table:table-cell>
          <table:table-cell office:value-type="string" calcext:value-type="string">
            <text:p>Shoot bouncing spheres to heal allies</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C.Y.A.</text:p>
          </table:table-cell>
          <table:table-cell office:value-type="string" calcext:value-type="string">
            <text:p>https://r.res.easebar.com/pic/20241120/8fa6c871-fb91-4115-bf94-a1ccf6f12d2c.png</text:p>
          </table:table-cell>
          <table:table-cell office:value-type="string" calcext:value-type="string">
            <text:p>Deploy a Cosmic Yarn Amplifier that grants allies a Damage Boost</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Jetpack Dash</text:p>
          </table:table-cell>
          <table:table-cell office:value-type="string" calcext:value-type="string">
            <text:p>https://r.res.easebar.com/pic/20241120/66c6ccca-0e2b-4c87-87c3-29fddfa3b4c1.png</text:p>
          </table:table-cell>
          <table:table-cell office:value-type="string" calcext:value-type="string">
            <text:p>Dash forward</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B.R.B.</text:p>
          </table:table-cell>
          <table:table-cell office:value-type="string" calcext:value-type="string">
            <text:p>https://r.res.easebar.com/pic/20241120/f5f99d54-aeaa-4dc8-bad1-7c0e390434cf.png</text:p>
          </table:table-cell>
          <table:table-cell office:value-type="string" calcext:value-type="string">
            <text:p>Deploy a Battle Rebirth Beacon that revives a fallen ally and periodically produces armor packs and rocket jet packs</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Wild Crawl</text:p>
          </table:table-cell>
          <table:table-cell office:value-type="string" calcext:value-type="string">
            <text:p>https://r.res.easebar.com/pic/20241120/2bf79c26-d564-4a9e-8148-85e5b44add4f.png</text:p>
          </table:table-cell>
          <table:table-cell office:value-type="string" calcext:value-type="string">
            <text:p>Hold Space to run on a wall</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Flying Ace</text:p>
          </table:table-cell>
          <table:table-cell office:value-type="string" calcext:value-type="string">
            <text:p>https://r.res.easebar.com/pic/20241120/75456c26-a53f-4d7e-955f-b663d7dd337a.png</text:p>
          </table:table-cell>
          <table:table-cell office:value-type="string" calcext:value-type="string">
            <text:p>Hold Space to fall slowly</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ROCKET RACCOON</text:p>
          </table:table-cell>
          <table:table-cell office:value-type="string" calcext:value-type="string">
            <text:p>Old Friends</text:p>
          </table:table-cell>
          <table:table-cell office:value-type="string" calcext:value-type="string">
            <text:p>https://r.res.easebar.com/pic/20241120/8f92cf82-a9bb-4c40-bb3c-2aa6aebc9c6d.png</text:p>
          </table:table-cell>
          <table:table-cell office:value-type="string" calcext:value-type="string">
            <text:p>Jeff the Land Shark and Rocket Raccoon can ride on Groot's shoulders, receiving Damage Reduction</text:p>
          </table:table-cell>
          <table:table-cell office:value-type="string" calcext:value-type="string">
            <text:p>https://www.marvelrivals.com/20241123/41360_1195663.html</text:p>
          </table:table-cell>
          <table:table-cell table:number-columns-repeated="16379"/>
        </table:table-row>
        <table:table-row table:style-name="ro1">
          <table:table-cell office:value-type="string" calcext:value-type="string">
            <text:p>LOKI</text:p>
          </table:table-cell>
          <table:table-cell office:value-type="string" calcext:value-type="string">
            <text:p>Mystical Missile</text:p>
          </table:table-cell>
          <table:table-cell office:value-type="string" calcext:value-type="string">
            <text:p>https://r.res.easebar.com/pic/20241120/ed396f47-c71d-47d9-b81b-3345b8dc9622.png</text:p>
          </table:table-cell>
          <table:table-cell office:value-type="string" calcext:value-type="string">
            <text:p>Fire Mystical Missiles to heal allies or deal damage to enemies. Direct hits on allies provide extra healing</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God of Mischief</text:p>
          </table:table-cell>
          <table:table-cell office:value-type="string" calcext:value-type="string">
            <text:p>https://r.res.easebar.com/pic/20241120/8348514b-e03f-442b-9aa2-ab90fcd2186a.png</text:p>
          </table:table-cell>
          <table:table-cell office:value-type="string" calcext:value-type="string">
            <text:p>Shapeshift into a targeted ally or enemy hero and use all their abilities except any of their Team-Up Abilities</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Regeneration Domain</text:p>
          </table:table-cell>
          <table:table-cell office:value-type="string" calcext:value-type="string">
            <text:p>https://r.res.easebar.com/pic/20241120/e7dd8ace-749c-49a0-bc71-bb9c59a8ba2f.png</text:p>
          </table:table-cell>
          <table:table-cell office:value-type="string" calcext:value-type="string">
            <text:p>Use Rune Stones to create a magical field that provides allies Healing and converts incoming damage into further healing</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Doppelganger</text:p>
          </table:table-cell>
          <table:table-cell office:value-type="string" calcext:value-type="string">
            <text:p>https://r.res.easebar.com/pic/20241120/ef9f3e86-7ad9-4ad4-8ca5-490d580e567b.png</text:p>
          </table:table-cell>
          <table:table-cell office:value-type="string" calcext:value-type="string">
            <text:p>Project an Illusion that can cast some of Loki's abilities</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Devious Exchange</text:p>
          </table:table-cell>
          <table:table-cell office:value-type="string" calcext:value-type="string">
            <text:p>https://r.res.easebar.com/pic/20241120/ac0da903-c22d-4471-bff9-d7df0a2a6ba6.png</text:p>
          </table:table-cell>
          <table:table-cell office:value-type="string" calcext:value-type="string">
            <text:p>Swap with the selected Illusion</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Backstab</text:p>
          </table:table-cell>
          <table:table-cell office:value-type="string" calcext:value-type="string">
            <text:p>https://r.res.easebar.com/pic/20241120/fe10c19c-0649-4c4d-a406-4e7ea9ada27a.png</text:p>
          </table:table-cell>
          <table:table-cell office:value-type="string" calcext:value-type="string">
            <text:p>Pull out a dagger to stab enemies, dealing extra damage when attacking an enemy from behind</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Deception</text:p>
          </table:table-cell>
          <table:table-cell office:value-type="string" calcext:value-type="string">
            <text:p>https://r.res.easebar.com/pic/20241120/ed974a34-cbea-4529-b613-028bb481b125.png</text:p>
          </table:table-cell>
          <table:table-cell office:value-type="string" calcext:value-type="string">
            <text:p>Become Invisible and conjure an Illusion to deceive enemies</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LOKI</text:p>
          </table:table-cell>
          <table:table-cell office:value-type="string" calcext:value-type="string">
            <text:p>Deific Blessing</text:p>
          </table:table-cell>
          <table:table-cell office:value-type="string" calcext:value-type="string">
            <text:p>https://r.res.easebar.com/pic/20250808/bc864d9a-7a8e-4700-84aa-324d7227de88.png</text:p>
          </table:table-cell>
          <table:table-cell office:value-type="string" calcext:value-type="string">
            <text:p>Mantis enhances Groot's wooden walls and Loki's Rune Stones with life energy. Groot can additionally unleash a Flower Wall, which, when in Flora Colossus state, restores health to random nearby allies and grants them Damage Reduction. Loki's Rune Stones grant allies within Regeneration Domain a Damage Boost</text:p>
          </table:table-cell>
          <table:table-cell office:value-type="string" calcext:value-type="string">
            <text:p>https://www.marvelrivals.com/20241123/41360_1195662.html</text:p>
          </table:table-cell>
          <table:table-cell table:number-columns-repeated="16379"/>
        </table:table-row>
        <table:table-row table:style-name="ro1">
          <table:table-cell office:value-type="string" calcext:value-type="string">
            <text:p>MANTIS</text:p>
          </table:table-cell>
          <table:table-cell office:value-type="string" calcext:value-type="string">
            <text:p>Life Energy Blast</text:p>
          </table:table-cell>
          <table:table-cell office:value-type="string" calcext:value-type="string">
            <text:p>https://r.res.easebar.com/pic/20241120/53a8b0e2-f33b-4630-a318-b11feeb63da7.png</text:p>
          </table:table-cell>
          <table:table-cell office:value-type="string" calcext:value-type="string">
            <text:p>Fire an energy thorn and regain one Life Orb after a critical hit.</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Soul Resurgence</text:p>
          </table:table-cell>
          <table:table-cell office:value-type="string" calcext:value-type="string">
            <text:p>https://r.res.easebar.com/pic/20241120/6185722d-c92f-4eab-8a8c-106168ad6e1a.png</text:p>
          </table:table-cell>
          <table:table-cell office:value-type="string" calcext:value-type="string">
            <text:p>Release energy around her while moving, providing Healing Over Time and Movement Boosts for surrounding allies. Excess healing converts to Bonus Health</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Spore Slumber</text:p>
          </table:table-cell>
          <table:table-cell office:value-type="string" calcext:value-type="string">
            <text:p>https://r.res.easebar.com/pic/20241120/297739c8-b9b1-4d0c-9578-0ba4d2cede4e.png</text:p>
          </table:table-cell>
          <table:table-cell office:value-type="string" calcext:value-type="string">
            <text:p>Throw a spore to Sedate the nearest enemy</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Allied Inspiration</text:p>
          </table:table-cell>
          <table:table-cell office:value-type="string" calcext:value-type="string">
            <text:p>https://r.res.easebar.com/pic/20241120/c43c7aff-d641-4b43-829b-ddf53bf2b3e7.png</text:p>
          </table:table-cell>
          <table:table-cell office:value-type="string" calcext:value-type="string">
            <text:p>Consume Life Orbs to grant allies a Damage Boost</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Natural Anger</text:p>
          </table:table-cell>
          <table:table-cell office:value-type="string" calcext:value-type="string">
            <text:p>https://r.res.easebar.com/pic/20241120/a414ebec-b637-44c3-83dd-4db27749575b.png</text:p>
          </table:table-cell>
          <table:table-cell office:value-type="string" calcext:value-type="string">
            <text:p>Consume Life Orbs to grant herself a Damage Boost</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Healing Flower</text:p>
          </table:table-cell>
          <table:table-cell office:value-type="string" calcext:value-type="string">
            <text:p>https://r.res.easebar.com/pic/20241120/cd2771ec-d276-4a64-91fd-faa67a121da6.png</text:p>
          </table:table-cell>
          <table:table-cell office:value-type="string" calcext:value-type="string">
            <text:p>Consume Life Orbs to grant allies Healing Over Time</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Nature's Favor</text:p>
          </table:table-cell>
          <table:table-cell office:value-type="string" calcext:value-type="string">
            <text:p>https://r.res.easebar.com/pic/20241120/b921470f-e723-4129-847e-be24fd974552.png</text:p>
          </table:table-cell>
          <table:table-cell office:value-type="string" calcext:value-type="string">
            <text:p>Receive a Movement Boost when not injured and Healing Over Time when consuming Life Orbs</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MANTIS</text:p>
          </table:table-cell>
          <table:table-cell office:value-type="string" calcext:value-type="string">
            <text:p>Heavenly Guardian</text:p>
          </table:table-cell>
          <table:table-cell office:value-type="string" calcext:value-type="string">
            <text:p>https://r.res.easebar.com/pic/20250808/d0ee6b57-7475-4e57-a5c1-f02c357545d4.png</text:p>
          </table:table-cell>
          <table:table-cell office:value-type="string" calcext:value-type="string">
            <text:p>Mantis enhances Groot's wooden walls and Loki's Rune Stones with life energy. Groot can additionally unleash a Flower Wall, which, when in Flora Colossus state, restores health to random nearby allies and grants them Damage Reduction. Loki's Rune Stones grant allies within Regeneration Domain a Damage Boost</text:p>
          </table:table-cell>
          <table:table-cell office:value-type="string" calcext:value-type="string">
            <text:p>https://www.marvelrivals.com/20241123/41360_1195661.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Cyber-Web Cluster</text:p>
          </table:table-cell>
          <table:table-cell office:value-type="string" calcext:value-type="string">
            <text:p>https://r.res.easebar.com/pic/20241120/2b24b421-99cf-4e20-b584-8f8e755911af.png</text:p>
          </table:table-cell>
          <table:table-cell office:value-type="string" calcext:value-type="string">
            <text:p>Launch forward a Cyber-Web Cluster</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Spider-Sweeper</text:p>
          </table:table-cell>
          <table:table-cell office:value-type="string" calcext:value-type="string">
            <text:p>https://r.res.easebar.com/pic/20241120/bcccc074-f210-4239-a6e1-05ae478859a6.png</text:p>
          </table:table-cell>
          <table:table-cell office:value-type="string" calcext:value-type="string">
            <text:p>Enhance the SP//dr suit, launching up enemies in its path and deploying Arachno-Mines, Spider-Drones, and Cyber-Webs repeatedly</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Bionic Spider-Nest</text:p>
          </table:table-cell>
          <table:table-cell office:value-type="string" calcext:value-type="string">
            <text:p>https://r.res.easebar.com/pic/20241120/b0a9458d-2a87-483c-a165-c362bf34d179.png</text:p>
          </table:table-cell>
          <table:table-cell office:value-type="string" calcext:value-type="string">
            <text:p>Generate a Bionic Spider-Nest at a targeted area, periodically spawning Spider-Drones and creating Cyber-Webs. While in the Cyber-Web, Peni and allies gain Healing Over Time and a Movement Boost. Excess healing converts into Bonus Health. Spider-Drones inflict a Slow effect on hit, which can stack and refresh its effect period with multiple hits</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Arachno-Mine</text:p>
          </table:table-cell>
          <table:table-cell office:value-type="string" calcext:value-type="string">
            <text:p>https://r.res.easebar.com/pic/20241120/a0c17f1d-4984-4961-af7a-515078b751a4.png</text:p>
          </table:table-cell>
          <table:table-cell office:value-type="string" calcext:value-type="string">
            <text:p>Deploy Arachno-Mines that can be concealed within the confines of a Cyber-Web</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Cyber-Bond</text:p>
          </table:table-cell>
          <table:table-cell office:value-type="string" calcext:value-type="string">
            <text:p>https://r.res.easebar.com/pic/20241120/6146023c-4c46-4135-aba6-79eff6014d3b.png</text:p>
          </table:table-cell>
          <table:table-cell office:value-type="string" calcext:value-type="string">
            <text:p>Shoot a web strand that links to the targeted area or Cyber-Web. If stretched too far, it will trigger a pullback</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Wall Crawl</text:p>
          </table:table-cell>
          <table:table-cell office:value-type="string" calcext:value-type="string">
            <text:p>https://r.res.easebar.com/pic/20241120/a812a9bf-dcaa-443a-870f-79586813d558.png</text:p>
          </table:table-cell>
          <table:table-cell office:value-type="string" calcext:value-type="string">
            <text:p>HOLD Jump to crawl on vertical surfaces</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Cyber-Web Snare</text:p>
          </table:table-cell>
          <table:table-cell office:value-type="string" calcext:value-type="string">
            <text:p>https://r.res.easebar.com/pic/20241120/036e9648-779e-48a7-ab8b-0e60bc0c5bd1.png</text:p>
          </table:table-cell>
          <table:table-cell office:value-type="string" calcext:value-type="string">
            <text:p>Cast futuristic webbing that Immobilizes enemies or creates a Cyber-Web. While in the Cyber-Web, Peni and allies gain Healing Over Time and a Movement Boost. Excess healing converts into Bonus Health</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ARMORIZED SPIDER-NEST</text:p>
          </table:table-cell>
          <table:table-cell office:value-type="string" calcext:value-type="string">
            <text:p>https://r.res.easebar.com/pic/20250531/b2250054-6ee6-4b3e-8062-57ef69717686.png</text:p>
          </table:table-cell>
          <table:table-cell office:value-type="string" calcext:value-type="string">
            <text:p>Enhanced by Rocket Raccoon, Peni Parkerâs Bionic Spider-Nest regularly generates strengthened armor packs. Each armor pack grants bonus health to the hero who picks up the pack. Peni Parker can deploy Bionic Spider-Nest and Armored Spider-Nest at the same time</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PENI PARKER</text:p>
          </table:table-cell>
          <table:table-cell office:value-type="string" calcext:value-type="string">
            <text:p>Cyber-Spiders</text:p>
          </table:table-cell>
          <table:table-cell office:value-type="string" calcext:value-type="string">
            <text:p>https://r.res.easebar.com/pic/20260117/99aa4398-a29a-4cac-8935-2542feff88f6.png</text:p>
          </table:table-cell>
          <table:table-cell office:value-type="string" calcext:value-type="string">
            <text:p>Peni Parker whips up a Sticky Bomb for Spider-Man! Prime it, then toss it before the timer's up for a blast that damages nearby enemies and attaches a Spider-Tracer to them. If not thrown in time, it explodes on Spider-Man, recharging a Web-Cluster shot and granting Bonus Health</text:p>
          </table:table-cell>
          <table:table-cell office:value-type="string" calcext:value-type="string">
            <text:p>https://www.marvelrivals.com/20241123/41360_1195656.html</text:p>
          </table:table-cell>
          <table:table-cell table:number-columns-repeated="16379"/>
        </table:table-row>
        <table:table-row table:style-name="ro1">
          <table:table-cell office:value-type="string" calcext:value-type="string">
            <text:p>THOR</text:p>
          </table:table-cell>
          <table:table-cell office:value-type="string" calcext:value-type="string">
            <text:p>Mjolnir Bash</text:p>
          </table:table-cell>
          <table:table-cell office:value-type="string" calcext:value-type="string">
            <text:p>https://r.res.easebar.com/pic/20241120/5767ff16-bdb0-4e38-be05-f86ae73aef7e.png</text:p>
          </table:table-cell>
          <table:table-cell office:value-type="string" calcext:value-type="string">
            <text:p>Wield Mjolnir to strike enemies. When Awakened, Thor can launch lightning arc waves to deal damage</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God of Thunder</text:p>
          </table:table-cell>
          <table:table-cell office:value-type="string" calcext:value-type="string">
            <text:p>https://r.res.easebar.com/pic/20241120/68c2df37-4e4b-48be-af36-22a545b1cb8d.png</text:p>
          </table:table-cell>
          <table:table-cell office:value-type="string" calcext:value-type="string">
            <text:p>Soar upwards and smite the ground after charging for a duration, inflicting damage on enemies within range</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Storm Surge</text:p>
          </table:table-cell>
          <table:table-cell office:value-type="string" calcext:value-type="string">
            <text:p>https://r.res.easebar.com/pic/20241120/b18044b4-d344-4400-95aa-1db27f994c9c.png</text:p>
          </table:table-cell>
          <table:table-cell office:value-type="string" calcext:value-type="string">
            <text:p>Hold to spin Mjolnir before dashing forward and knocking back enemies</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Lightning Realm</text:p>
          </table:table-cell>
          <table:table-cell office:value-type="string" calcext:value-type="string">
            <text:p>https://r.res.easebar.com/pic/20241120/37d0dc4d-ca68-48f0-8e5a-d7511b05b02e.png</text:p>
          </table:table-cell>
          <table:table-cell office:value-type="string" calcext:value-type="string">
            <text:p>Summon lightning that restores Thorforce based on the number of hit enemies</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Awakening Rune</text:p>
          </table:table-cell>
          <table:table-cell office:value-type="string" calcext:value-type="string">
            <text:p>https://r.res.easebar.com/pic/20241120/77bc01c1-2967-4660-a899-87a8b6c3efe5.png</text:p>
          </table:table-cell>
          <table:table-cell office:value-type="string" calcext:value-type="string">
            <text:p>Consume Thorforce to enter the Awakened state, granting Bonus Health and enhancing Mjolnir Bash</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Hammer Throw</text:p>
          </table:table-cell>
          <table:table-cell office:value-type="string" calcext:value-type="string">
            <text:p>https://r.res.easebar.com/pic/20241120/06301e2b-a041-47cb-bf81-009ef24c3a3d.png</text:p>
          </table:table-cell>
          <table:table-cell office:value-type="string" calcext:value-type="string">
            <text:p>Throw Mjolnir forward which then returns</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Thorforce</text:p>
          </table:table-cell>
          <table:table-cell office:value-type="string" calcext:value-type="string">
            <text:p>https://r.res.easebar.com/pic/20241120/78caf91d-ecd4-431c-9e43-31558f4e5fa9.png</text:p>
          </table:table-cell>
          <table:table-cell office:value-type="string" calcext:value-type="string">
            <text:p>Consume Thorforce to gain Bonus Health. Landing Mjolnir Bash on an enemy instantly recharges Thorforce</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THOR</text:p>
          </table:table-cell>
          <table:table-cell office:value-type="string" calcext:value-type="string">
            <text:p>THUNDERSTRIKE PIKE</text:p>
          </table:table-cell>
          <table:table-cell office:value-type="string" calcext:value-type="string">
            <text:p>https://r.res.easebar.com/pic/20250912/f3f25383-cb85-43c1-9479-e4d60a8dfcb7.png</text:p>
          </table:table-cell>
          <table:table-cell office:value-type="string" calcext:value-type="string">
            <text:p>Angela shares fragments of her Ichors with Thor, empowering him to hurl a Thunder Spear that restores Thorforce for each enemy struck. Afterward, Thor can leap to the spear's explosion point, dealing a second wave of damage to all enemies within range</text:p>
          </table:table-cell>
          <table:table-cell office:value-type="string" calcext:value-type="string">
            <text:p>https://www.marvelrivals.com/20241123/41360_1195657.html</text:p>
          </table:table-cell>
          <table:table-cell table:number-columns-repeated="16379"/>
        </table:table-row>
        <table:table-row table:style-name="ro1">
          <table:table-cell office:value-type="string" calcext:value-type="string">
            <text:p>MAGNETO</text:p>
          </table:table-cell>
          <table:table-cell office:value-type="string" calcext:value-type="string">
            <text:p>Iron Volley</text:p>
          </table:table-cell>
          <table:table-cell office:value-type="string" calcext:value-type="string">
            <text:p>https://r.res.easebar.com/pic/20241120/3401f142-e87e-40ad-8ff2-3a749a6f4984.png</text:p>
          </table:table-cell>
          <table:table-cell office:value-type="string" calcext:value-type="string">
            <text:p>Fire a volley of magnetic orbs forward. The range of the resulting explosion increases based on distance flown</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Meteor M</text:p>
          </table:table-cell>
          <table:table-cell office:value-type="string" calcext:value-type="string">
            <text:p>https://r.res.easebar.com/pic/20241120/9cd870bb-e876-438b-9416-b230d990d3e8.png</text:p>
          </table:table-cell>
          <table:table-cell office:value-type="string" calcext:value-type="string">
            <text:p>Draw in all materials around to forge an iron meteor that deals massive damage upon impact. Absorbing enemy projectiles can enhance the meteor's power, yet overloading will cause it to self-destruct</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Metallic Curtain</text:p>
          </table:table-cell>
          <table:table-cell office:value-type="string" calcext:value-type="string">
            <text:p>https://r.res.easebar.com/pic/20241120/e834f5cc-ab25-4c64-8c84-4fc1e19f4f7c.png</text:p>
          </table:table-cell>
          <table:table-cell office:value-type="string" calcext:value-type="string">
            <text:p>Change the magnetic field around to form a metallic curtain, blocking all incoming projectiles</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Metal Bulwark</text:p>
          </table:table-cell>
          <table:table-cell office:value-type="string" calcext:value-type="string">
            <text:p>https://r.res.easebar.com/pic/20241120/3b28340a-e0b8-4801-98b5-32ca9934bb01.png</text:p>
          </table:table-cell>
          <table:table-cell office:value-type="string" calcext:value-type="string">
            <text:p>Conjure a metal shield around a chosen ally. Damage taken will transform into rings on Magneto's back</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Iron Bulwark</text:p>
          </table:table-cell>
          <table:table-cell office:value-type="string" calcext:value-type="string">
            <text:p>https://r.res.easebar.com/pic/20241120/02e7eb06-6242-43ba-bd8d-3ae7e124f774.png</text:p>
          </table:table-cell>
          <table:table-cell office:value-type="string" calcext:value-type="string">
            <text:p>Conjure an iron shield around himself. Damage taken will transform into rings on Magneto's back</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Mag-Cannon</text:p>
          </table:table-cell>
          <table:table-cell office:value-type="string" calcext:value-type="string">
            <text:p>https://r.res.easebar.com/pic/20241120/fa0cf0a3-32cc-4104-8c74-4fe98a7b8628.png</text:p>
          </table:table-cell>
          <table:table-cell office:value-type="string" calcext:value-type="string">
            <text:p>Convert the iron rings on Magneto's back into a Mag-Cannon and launch a metallic mass forward. Higher stacks of rings increase damage, and full stacks knock back enemies</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Magnetic Descent</text:p>
          </table:table-cell>
          <table:table-cell office:value-type="string" calcext:value-type="string">
            <text:p>https://r.res.easebar.com/pic/20241120/d59de34f-22d9-459b-9469-8a2bb8ce714c.png</text:p>
          </table:table-cell>
          <table:table-cell office:value-type="string" calcext:value-type="string">
            <text:p>Hold Space to fall slowly</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MAGNETO</text:p>
          </table:table-cell>
          <table:table-cell office:value-type="string" calcext:value-type="string">
            <text:p>ROYAL BLADE</text:p>
          </table:table-cell>
          <table:table-cell office:value-type="string" calcext:value-type="string">
            <text:p>https://r.res.easebar.com/pic/20251115/76aaa2b5-ba1a-44b7-a584-82b904800075.png</text:p>
          </table:table-cell>
          <table:table-cell office:value-type="string" calcext:value-type="string">
            <text:p>Gambit charges Magneto's greatsword with kinetic energy. When Magneto activates this ability, Iron Volley is replaced with Ace Greatsword, which detonates upon striking enemies. The explosion leaves residual kinetic energy within the target, inflicting secondary damage after a brief delay</text:p>
          </table:table-cell>
          <table:table-cell office:value-type="string" calcext:value-type="string">
            <text:p>https://www.marvelrivals.com/20241123/41360_1195655.html</text:p>
          </table:table-cell>
          <table:table-cell table:number-columns-repeated="16379"/>
        </table:table-row>
        <table:table-row table:style-name="ro1">
          <table:table-cell office:value-type="string" calcext:value-type="string">
            <text:p>VENOM</text:p>
          </table:table-cell>
          <table:table-cell office:value-type="string" calcext:value-type="string">
            <text:p>Dark Predation</text:p>
          </table:table-cell>
          <table:table-cell office:value-type="string" calcext:value-type="string">
            <text:p>https://r.res.easebar.com/pic/20241120/bc30fb5a-7d0a-4acb-9cc7-68d9ce23471f.png</text:p>
          </table:table-cell>
          <table:table-cell office:value-type="string" calcext:value-type="string">
            <text:p>Unleash tentacles forward to attack enemies</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Feast of the Abyss</text:p>
          </table:table-cell>
          <table:table-cell office:value-type="string" calcext:value-type="string">
            <text:p>https://r.res.easebar.com/pic/20241120/8d6946a4-fdcd-4260-a36b-4d6367c22910.png</text:p>
          </table:table-cell>
          <table:table-cell office:value-type="string" calcext:value-type="string">
            <text:p>Burrow underground for free movement. After a duration or by left-clicking, devour enemies above to deal damage based on the enemy's current health and generate equivalent Bonus Health. Devoured enemies suffer Reduced Healing</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Venom Swing</text:p>
          </table:table-cell>
          <table:table-cell office:value-type="string" calcext:value-type="string">
            <text:p>https://r.res.easebar.com/pic/20241120/e3d5d3b0-9605-4bdd-8e7d-5b10a96f6fdc.png</text:p>
          </table:table-cell>
          <table:table-cell office:value-type="string" calcext:value-type="string">
            <text:p>Launch webbing forward, allowing for a singular swing in the desired direction</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Symbiotic Resilience</text:p>
          </table:table-cell>
          <table:table-cell office:value-type="string" calcext:value-type="string">
            <text:p>https://r.res.easebar.com/pic/20241120/6cbe943b-e6aa-46d3-9c54-bff3d7264fcc.png</text:p>
          </table:table-cell>
          <table:table-cell office:value-type="string" calcext:value-type="string">
            <text:p>Generate Bonus Health against damage. The lower Venom's Health, the greater the Bonus Health generated</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Frenzied Arrival</text:p>
          </table:table-cell>
          <table:table-cell office:value-type="string" calcext:value-type="string">
            <text:p>https://r.res.easebar.com/pic/20241120/bd5d9e69-ca07-465d-aafa-c7225d6a6f7f.png</text:p>
          </table:table-cell>
          <table:table-cell office:value-type="string" calcext:value-type="string">
            <text:p>Dash to the target location from a certain height. Upon landing, damage nearby enemies, launching them up toward the landing point</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Cellular Corrosion</text:p>
          </table:table-cell>
          <table:table-cell office:value-type="string" calcext:value-type="string">
            <text:p>https://r.res.easebar.com/pic/20241120/67d47ae7-0b50-42ec-98d4-b704e68e8c0d.png</text:p>
          </table:table-cell>
          <table:table-cell office:value-type="string" calcext:value-type="string">
            <text:p>Unleash tentacles to Slow enemies within reach. Enemies unable to break free in time will suffer damage</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Alien Biology</text:p>
          </table:table-cell>
          <table:table-cell office:value-type="string" calcext:value-type="string">
            <text:p>https://r.res.easebar.com/pic/20241120/5ac60cab-09a4-4f2a-8236-75b82ed43c39.png</text:p>
          </table:table-cell>
          <table:table-cell office:value-type="string" calcext:value-type="string">
            <text:p>Press Space to wall crawl, and while crawling, left-click to sprint</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VENOM</text:p>
          </table:table-cell>
          <table:table-cell office:value-type="string" calcext:value-type="string">
            <text:p>HEALING TENDRILS</text:p>
          </table:table-cell>
          <table:table-cell office:value-type="string" calcext:value-type="string">
            <text:p>https://r.res.easebar.com/pic/20250531/1ad044d0-1743-4ae9-8a7c-1cd92bef69a1.png</text:p>
          </table:table-cell>
          <table:table-cell office:value-type="string" calcext:value-type="string">
            <text:p>Venom shares his symbiotes with Jeff and Hela. Jeff's Guardian of the Deep links with nearby allies, providing continuous healing. When the effect ends, it releases a powerful healing burst, converting any excess into Bonus Health. Hela's Hel Tendrils unleash a symbiotic Hel Sphere. Upon hit, it pulls nearby enemies toward the impact point and links them, slowing enemies that try to escape.</text:p>
          </table:table-cell>
          <table:table-cell office:value-type="string" calcext:value-type="string">
            <text:p>https://www.marvelrivals.com/20241123/41360_1195654.html</text:p>
          </table:table-cell>
          <table:table-cell table:number-columns-repeated="16379"/>
        </table:table-row>
        <table:table-row table:style-name="ro1">
          <table:table-cell office:value-type="string" calcext:value-type="string">
            <text:p>GROOT</text:p>
          </table:table-cell>
          <table:table-cell office:value-type="string" calcext:value-type="string">
            <text:p>Vine Strike</text:p>
          </table:table-cell>
          <table:table-cell office:value-type="string" calcext:value-type="string">
            <text:p>https://r.res.easebar.com/pic/20241120/b1e08b7f-2364-45cb-9ebc-6b73214d8529.png</text:p>
          </table:table-cell>
          <table:table-cell office:value-type="string" calcext:value-type="string">
            <text:p>Launch vines to attack enemies</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Strangling Prison</text:p>
          </table:table-cell>
          <table:table-cell office:value-type="string" calcext:value-type="string">
            <text:p>https://r.res.easebar.com/pic/20241120/72a68f64-ac6b-4b4d-a6c2-a96d8ba932f2.png</text:p>
          </table:table-cell>
          <table:table-cell office:value-type="string" calcext:value-type="string">
            <text:p>Fire a massive vine cluster that pulls nearby enemies to its center and Imprisons them</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Thornlash Wall</text:p>
          </table:table-cell>
          <table:table-cell office:value-type="string" calcext:value-type="string">
            <text:p>https://r.res.easebar.com/pic/20241120/22175d18-5214-4a59-a1a2-b20d042ac46c.png</text:p>
          </table:table-cell>
          <table:table-cell office:value-type="string" calcext:value-type="string">
            <text:p>Target a location and grow a Thornlash Wall. When Awakened, it strikes nearby enemies attacked by Groot and his allies</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Ironwood Wall</text:p>
          </table:table-cell>
          <table:table-cell office:value-type="string" calcext:value-type="string">
            <text:p>https://r.res.easebar.com/pic/20241120/6b671ac4-7312-4702-8062-5f3d93cdbcd4.png</text:p>
          </table:table-cell>
          <table:table-cell office:value-type="string" calcext:value-type="string">
            <text:p>Target a location and grow an Ironwood Wall. When the wall is Awakened, damage dealt by Groot and nearby allies grants Groot Bonus Health. Groot gains Unstoppable while near Ironwood Walls</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Spore Bomb</text:p>
          </table:table-cell>
          <table:table-cell office:value-type="string" calcext:value-type="string">
            <text:p>https://r.res.easebar.com/pic/20241120/bba9fe65-f6c7-46de-807c-0ba36c78e505.png</text:p>
          </table:table-cell>
          <table:table-cell office:value-type="string" calcext:value-type="string">
            <text:p>Throw an explosive Spore Bomb that splits into multiple small explosive spores</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Flora Colossus</text:p>
          </table:table-cell>
          <table:table-cell office:value-type="string" calcext:value-type="string">
            <text:p>https://r.res.easebar.com/pic/20241120/9a004657-cc4f-47c9-8f81-a4d3471a03bb.png</text:p>
          </table:table-cell>
          <table:table-cell office:value-type="string" calcext:value-type="string">
            <text:p>Wooden walls near Groot will Awaken, activating an extra effect. Right-click while building a wooden wall to continue building additional walls</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Furious Flora</text:p>
          </table:table-cell>
          <table:table-cell office:value-type="string" calcext:value-type="string">
            <text:p>https://r.res.easebar.com/pic/20241125/32653d8e-2a57-460d-af0a-72f35b84b607.png</text:p>
          </table:table-cell>
          <table:table-cell office:value-type="string" calcext:value-type="string">
            <text:p>Perform a combo with his arms, and the third strike will slightly Launch Up the hit enemy airborne</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GROOT</text:p>
          </table:table-cell>
          <table:table-cell office:value-type="string" calcext:value-type="string">
            <text:p>Wild Wall</text:p>
          </table:table-cell>
          <table:table-cell office:value-type="string" calcext:value-type="string">
            <text:p>https://r.res.easebar.com/pic/20250808/1c89933e-1908-4b71-80d1-9074582fa726.png</text:p>
          </table:table-cell>
          <table:table-cell office:value-type="string" calcext:value-type="string">
            <text:p>Mantis enhances Groot's wooden walls and Loki's Rune Stones with life energy. Groot can additionally unleash a Flower Wall, which, when in Flora Colossus state, restores health to random nearby allies and grants them Damage Reduction. Loki's Rune Stones grant allies within Regeneration Domain a Damage Boost</text:p>
          </table:table-cell>
          <table:table-cell office:value-type="string" calcext:value-type="string">
            <text:p>https://www.marvelrivals.com/20241123/41360_1195653.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Sentinel Strike</text:p>
          </table:table-cell>
          <table:table-cell office:value-type="string" calcext:value-type="string">
            <text:p>https://r.res.easebar.com/pic/20241120/588f99a1-b1e0-4133-a626-35f8e6e4b158.png</text:p>
          </table:table-cell>
          <table:table-cell office:value-type="string" calcext:value-type="string">
            <text:p>Get up close to strike enemies. Landing the second hit enables a shield throw that can ricochet four times</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Freedom Charge</text:p>
          </table:table-cell>
          <table:table-cell office:value-type="string" calcext:value-type="string">
            <text:p>https://r.res.easebar.com/pic/20241120/301a3e56-eeee-47e4-b3b6-08c164b5f780.png</text:p>
          </table:table-cell>
          <table:table-cell office:value-type="string" calcext:value-type="string">
            <text:p>Shield held high, carve a path forward, granting both himself and allies along the path continuous Bonus Health and Movement Boosts. Allies also gain Ultimate Ability Charge Acceleration. Using Living Legend and Leading Dash while this ability is active can Launch Up enemies</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Leading Dash</text:p>
          </table:table-cell>
          <table:table-cell office:value-type="string" calcext:value-type="string">
            <text:p>https://r.res.easebar.com/pic/20241120/dfc71932-8e4a-47e1-8eaf-3dffddf51cb4.png</text:p>
          </table:table-cell>
          <table:table-cell office:value-type="string" calcext:value-type="string">
            <text:p>Boost speed and enable Fearless Leap to leap into the air</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Vibranium Energy Saw</text:p>
          </table:table-cell>
          <table:table-cell office:value-type="string" calcext:value-type="string">
            <text:p>https://r.res.easebar.com/pic/20241120/ba7fc0c4-f0c7-4ce7-a792-63374163cc22.png</text:p>
          </table:table-cell>
          <table:table-cell office:value-type="string" calcext:value-type="string">
            <text:p>Hurl the energy-charged shield to strike enemies in a path</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Liberty Rush</text:p>
          </table:table-cell>
          <table:table-cell office:value-type="string" calcext:value-type="string">
            <text:p>https://r.res.easebar.com/pic/20241120/63eef162-7c33-46a8-8f48-aa74b29f910a.png</text:p>
          </table:table-cell>
          <table:table-cell office:value-type="string" calcext:value-type="string">
            <text:p>Raise the shield and charge forward</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Super-Soldier Slam</text:p>
          </table:table-cell>
          <table:table-cell office:value-type="string" calcext:value-type="string">
            <text:p>https://r.res.easebar.com/pic/20241120/0261fd68-7164-4852-a86a-a5d02f914b2a.png</text:p>
          </table:table-cell>
          <table:table-cell office:value-type="string" calcext:value-type="string">
            <text:p>Slam down from the sky onto the targeted area, Launching Up enemies</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Living Legend</text:p>
          </table:table-cell>
          <table:table-cell office:value-type="string" calcext:value-type="string">
            <text:p>https://r.res.easebar.com/pic/20241120/97a1851f-7f3d-4297-a8ba-3d4650422a58.png</text:p>
          </table:table-cell>
          <table:table-cell office:value-type="string" calcext:value-type="string">
            <text:p>Raise the shield to deflect incoming projectiles, sending them ricocheting in random directions</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Captain's Spirit</text:p>
          </table:table-cell>
          <table:table-cell office:value-type="string" calcext:value-type="string">
            <text:p>https://r.res.easebar.com/pic/20250410/c34a6f5c-8be1-4bcb-a0f0-f5572a64e6e9.png</text:p>
          </table:table-cell>
          <table:table-cell office:value-type="string" calcext:value-type="string">
            <text:p>Inspired by Captain America's resolve, Winter Soldier can leap to the aid of a designated ally, slamming the ground with his mechanical arm to deal damage to nearby foes. Additionally, Captain America and Winter Soldier can interact with each other once both parties confirm. The duo collides and unleashes a shockwave that deals damage and inflicts slow on enemies</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CAPTAIN AMERICA</text:p>
          </table:table-cell>
          <table:table-cell office:value-type="string" calcext:value-type="string">
            <text:p>VIBRANIUM BASTION</text:p>
          </table:table-cell>
          <table:table-cell office:value-type="string" calcext:value-type="string">
            <text:p>https://r.res.easebar.com/pic/20260416/dba9f061-232b-4cca-8797-cf61c520201e.png</text:p>
          </table:table-cell>
          <table:table-cell office:value-type="string" calcext:value-type="string">
            <text:p>Black Cat shares her luck with her allies. When White Fox embraces her newfound fortune, she unleashestracking Spirit Tails to grant Healing and Speed to allies, while damaging and Slowing foes. When Captain America enjoys his luck, his shield's block radius expands and allows him to aim deflectedProjectiles directly toward his target</text:p>
          </table:table-cell>
          <table:table-cell office:value-type="string" calcext:value-type="string">
            <text:p>https://www.marvelrivals.com/20241123/41360_1195652.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Daggers of Denak</text:p>
          </table:table-cell>
          <table:table-cell office:value-type="string" calcext:value-type="string">
            <text:p>https://r.res.easebar.com/pic/20241120/005933a8-1d97-42c6-aac7-27e1bc018038.png</text:p>
          </table:table-cell>
          <table:table-cell office:value-type="string" calcext:value-type="string">
            <text:p>Cast Daggers of Denak forward</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Eye of Agamotto</text:p>
          </table:table-cell>
          <table:table-cell office:value-type="string" calcext:value-type="string">
            <text:p>https://r.res.easebar.com/pic/20241120/0fd358bd-cf3c-4029-9455-3693bc12cbb5.png</text:p>
          </table:table-cell>
          <table:table-cell office:value-type="string" calcext:value-type="string">
            <text:p>Separate nearby enemies' Souls from their bodies. Damage dealt to these Souls is transferred to their physical bodies</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Cloak of Levitation</text:p>
          </table:table-cell>
          <table:table-cell office:value-type="string" calcext:value-type="string">
            <text:p>https://r.res.easebar.com/pic/20241120/bcd20b65-6414-40bd-9f37-524652c0ed5b.png</text:p>
          </table:table-cell>
          <table:table-cell office:value-type="string" calcext:value-type="string">
            <text:p>Ascend and then enter a brief state of sustained flight</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Maelstrom of Madness</text:p>
          </table:table-cell>
          <table:table-cell office:value-type="string" calcext:value-type="string">
            <text:p>https://r.res.easebar.com/pic/20241120/fc0621cc-3ee2-490c-bd45-28986775291c.png</text:p>
          </table:table-cell>
          <table:table-cell office:value-type="string" calcext:value-type="string">
            <text:p>Release Dark Magic to deal damage to nearby enemies</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Pentagram of Farallah</text:p>
          </table:table-cell>
          <table:table-cell office:value-type="string" calcext:value-type="string">
            <text:p>https://r.res.easebar.com/pic/20241120/9161c8ab-2eb3-4546-b454-c9d18e0ddad5.png</text:p>
          </table:table-cell>
          <table:table-cell office:value-type="string" calcext:value-type="string">
            <text:p>Open portals between two locations, enabling all units to travel through them</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Shield of the Seraphim</text:p>
          </table:table-cell>
          <table:table-cell office:value-type="string" calcext:value-type="string">
            <text:p>https://r.res.easebar.com/pic/20241120/9a8c0b57-316f-42da-bcca-9923be81d771.png</text:p>
          </table:table-cell>
          <table:table-cell office:value-type="string" calcext:value-type="string">
            <text:p>Create a protective barrier against damage</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Price of Magic</text:p>
          </table:table-cell>
          <table:table-cell office:value-type="string" calcext:value-type="string">
            <text:p>https://r.res.easebar.com/pic/20241120/14622714-9438-4212-8a0b-738f282a64bc.png</text:p>
          </table:table-cell>
          <table:table-cell office:value-type="string" calcext:value-type="string">
            <text:p>Dark Magic accumulates with every hit on an enemy. If Dark Magic peaks for too long, Doctor Strange will be cursed with Anti-Heal</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Enchanted Enhancement</text:p>
          </table:table-cell>
          <table:table-cell office:value-type="string" calcext:value-type="string">
            <text:p>https://r.res.easebar.com/pic/20250410/99eb7c66-a521-4b6b-aa54-1048db609e28.png</text:p>
          </table:table-cell>
          <table:table-cell office:value-type="string" calcext:value-type="string">
            <text:p>Doctor Strange shares his arcane mastery, replacing Scarlet Witch's Chthonian Burst with Mystic Burst upon activation. Hold down the attack button to unleash a rapid, relentless salvo of magical missiles in the target direction</text:p>
          </table:table-cell>
          <table:table-cell office:value-type="string" calcext:value-type="string">
            <text:p>https://www.marvelrivals.com/20241123/41360_1195649.html</text:p>
          </table:table-cell>
          <table:table-cell table:number-columns-repeated="16379"/>
        </table:table-row>
        <table:table-row table:style-name="ro1">
          <table:table-cell office:value-type="string" calcext:value-type="string">
            <text:p>DOCTOR STRANGE</text:p>
          </table:table-cell>
          <table:table-cell office:value-type="string" calcext:value-type="string">
            <text:p>PSIONIC VORTEX</text:p>
          </table:table-cell>
          <table:table-cell office:value-type="string" calcext:value-type="string">
            <text:p>https://r.res.easebar.com/pic/20260213/b0dacbcf-e7ec-4ddf-9e37-cc7a6c38d97b.png</text:p>
          </table:table-cell>
          <table:table-cell office:value-type="string" calcext:value-type="string">
            <text:p>Invisible Woman enhances Doctor Strange's Maelstrom of Madness with a psionic explosion. The explosion damages and pulls enemies toward Doctor Strange. Based on the explosion's damage, Doctor Strange and nearby allies gain Bonus Health</text:p>
          </table:table-cell>
          <table:table-cell office:value-type="string" calcext:value-type="string">
            <text:p>https://www.marvelrivals.com/20241123/41360_1195649.html</text:p>
          </table:table-cell>
          <table:table-cell table:number-columns-repeated="16379"/>
        </table:table-row>
        <table:table-row table:style-name="ro1" table:number-rows-repeated="104807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29P0" style:volatile="true">
      <number:currency-symbol/>
      <number:number number:decimal-places="0" number:min-decimal-places="0" number:min-integer-digits="1" number:grouping="true"/>
      <number:text>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 </number:text>
      <number:fill-character> </number:fill-character>
      <number:text>(</number:text>
      <number:number number:decimal-places="0" number:min-decimal-places="0" number:min-integer-digits="1" number:grouping="true"/>
      <number:text>)</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5P0" style:volatile="true">
      <number:text> </number:text>
      <number:currency-symbol/>
      <number:fill-character> </number:fill-character>
      <number:number number:decimal-places="0" number:min-decimal-places="0" number:min-integer-digits="1" number:grouping="true"/>
      <number:text> </number:text>
    </number:currency-style>
    <number:currency-style style:name="N145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number:text>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47P0" style:volatile="true">
      <number:text> </number:text>
      <number:currency-symbol/>
      <number:fill-character> </number:fill-character>
      <number:number number:decimal-places="2" number:min-decimal-places="2" number:min-integer-digits="1" number:grouping="true"/>
      <number:text> </number:text>
    </number:currency-style>
    <number:currency-style style:name="N147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number:text>
      <number:currency-symbol/>
      <number:fill-character> </number:fill-character>
      <number:text>-</number:text>
      <number:number number:decimal-places="0" number:min-decimal-places="0" number:min-integer-digits="0"/>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Hero_20_Abilities" style:display-name="PageStyle_Hero Abiliti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penpyxl</meta:initial-creator>
    <meta:creation-date>2026-04-21T06:33:34</meta:creation-date>
    <dc:date>2026-04-21T13:14:37.881000000</dc:date>
    <meta:generator>LibreOffice/7.5.3.2$Windows_X86_64 LibreOffice_project/9f56dff12ba03b9acd7730a5a481eea045e468f3</meta:generator>
    <meta:editing-duration>PT11H29M50S</meta:editing-duration>
    <meta:editing-cycles>1</meta:editing-cycles>
    <meta:document-statistic meta:table-count="1" meta:cell-count="2520" meta:object-count="0"/>
    <meta:user-defined meta:name="AppVersion">3.1</meta:user-defined>
  </office:meta>
</office:document-meta>
</file>